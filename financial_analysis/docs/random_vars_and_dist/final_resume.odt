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</office:font-face-decls>
  <office:automatic-styles>
    <style:style style:name="Table1" style:family="table">
      <style:table-properties style:width="3.157cm" fo:margin-left="8.864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252cm"/>
    </style:style>
    <style:style style:name="Table1.A1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ffffff"/>
    </style:style>
    <style:style style:name="Table1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ffffff"/>
    </style:style>
    <style:style style:name="Table1.A4" style:family="table-cell">
      <style:table-cell-properties style:vertical-align="middle" fo:padding-left="0.049cm" fo:padding-right="0.049cm" fo:padding-top="0.049cm" fo:padding-bottom="0.265cm" fo:border="0.05pt solid #ffffff"/>
    </style:style>
    <style:style style:name="Table2" style:family="table">
      <style:table-properties style:width="5.115cm" fo:margin-left="8.864cm" table:align="left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3.21cm"/>
    </style:style>
    <style:style style:name="Table2.A1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ffffff"/>
    </style:style>
    <style:style style:name="Table2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ffffff"/>
    </style:style>
    <style:style style:name="Table2.A4" style:family="table-cell">
      <style:table-cell-properties style:vertical-align="middle" fo:padding-left="0.049cm" fo:padding-right="0.049cm" fo:padding-top="0.049cm" fo:padding-bottom="0.265cm" fo:border="0.05pt solid #ffffff"/>
    </style:style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orphans="1" fo:text-indent="0cm" style:auto-text-indent="false" fo:padding="0.049cm" fo:border="0.06pt solid #ffffff"/>
    </style:style>
    <style:style style:name="P2" style:family="paragraph" style:parent-style-name="Text_20_body" style:list-style-name="L2">
      <style:paragraph-properties fo:margin-left="0cm" fo:margin-right="0cm" fo:margin-top="0cm" fo:margin-bottom="0cm" style:contextual-spacing="false" fo:orphans="1" fo:text-indent="0cm" style:auto-text-indent="false" fo:padding="0.049cm" fo:border="0.06pt solid #ffffff"/>
      <style:text-properties loext:padding="0.049cm" loext:border="0.06pt solid #ffffff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ffffff" loext:opacity="100%" style:font-name="ui-sans-serif" fo:font-size="14pt" fo:letter-spacing="normal" fo:font-style="normal" fo:font-weight="normal" fo:background-color="#323232" style:font-name-asian="ui-sans-serif" style:font-size-asian="14pt" style:font-style-asian="normal" style:font-weight-asian="normal" style:font-name-complex="ui-sans-serif" style:font-size-complex="14pt" style:font-style-complex="normal" style:font-weight-complex="normal" loext:padding="0.049cm" loext:border="0.06pt solid #ffffff"/>
    </style:style>
    <style:style style:name="P4" style:family="paragraph" style:parent-style-name="Text_20_body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ffffff" loext:opacity="100%" style:font-name="ui-sans-serif" fo:font-size="12pt" fo:letter-spacing="normal" fo:font-style="normal" fo:font-weight="normal" fo:background-color="#323232" loext:padding="0.049cm" loext:border="0.06pt solid #ffffff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12" style:family="paragraph" style:parent-style-name="Horizontal_20_Line">
      <style:paragraph-properties fo:margin-left="0cm" fo:margin-right="0cm" fo:margin-top="0cm" fo:margin-bottom="0cm" style:contextual-spacing="false" fo:line-height="150%"/>
    </style:style>
    <style:style style:name="P13" style:family="paragraph" style:parent-style-name="Heading_20_2">
      <style:paragraph-properties fo:margin-left="0cm" fo:margin-right="0cm" fo:margin-top="0cm" fo:margin-bottom="0.106cm" style:contextual-spacing="false" fo:line-height="140%" fo:text-indent="0cm" style:auto-text-indent="false" fo:padding="0.049cm" fo:border="0.06pt solid #ffffff"/>
      <style:text-properties fo:font-variant="normal" fo:text-transform="none" fo:color="#ffffff" loext:opacity="100%" style:font-name="ui-sans-serif" fo:font-size="15pt" fo:letter-spacing="normal" fo:font-style="normal" fo:font-weight="bold" loext:padding="0.049cm" loext:border="0.06pt solid #ffffff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ffffff" loext:opacity="100%" style:font-name="ui-monospace" loext:padding-left="0.529cm" loext:padding-right="0.529cm" loext:padding-top="0.049cm" loext:padding-bottom="0.318cm" loext:border="0.06pt solid #ffffff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ffffff" loext:opacity="100%" style:font-name="ui-monospace" fo:font-size="12pt" fo:letter-spacing="normal" fo:font-style="normal" fo:font-weight="normal" fo:background-color="#181818" loext:padding-left="0.529cm" loext:padding-right="0.529cm" loext:padding-top="0.049cm" loext:padding-bottom="0.318cm" loext:border="0.06pt solid #ffffff"/>
    </style:style>
    <style:style style:name="P16" style:family="paragraph" style:parent-style-name="Heading_20_3">
      <style:paragraph-properties fo:margin-left="0cm" fo:margin-right="0cm" fo:margin-top="0.423cm" fo:margin-bottom="0.106cm" style:contextual-spacing="false" fo:line-height="155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18" style:family="paragraph" style:parent-style-name="Text_20_body" style:list-style-name="L5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21" style:family="paragraph" style:parent-style-name="Text_20_body" style:list-style-name="L8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24" style:family="paragraph" style:parent-style-name="Text_20_body" style:list-style-name="L10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26" style:family="paragraph" style:parent-style-name="Text_20_body" style:list-style-name="L11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27" style:family="paragraph" style:parent-style-name="Text_20_body" style:list-style-name="L11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28" style:family="paragraph" style:parent-style-name="Heading_20_3">
      <style:paragraph-properties fo:margin-left="0cm" fo:margin-right="0cm" fo:margin-top="0.423cm" fo:margin-bottom="0.106cm" style:contextual-spacing="false" fo:line-height="155%" fo:text-indent="0cm" style:auto-text-indent="false" fo:padding="0.049cm" fo:border="0.06pt solid #ffffff"/>
      <style:text-properties fo:font-variant="normal" fo:text-transform="none" fo:color="#ffffff" loext:opacity="100%" style:font-name="ui-sans-serif" fo:font-size="13.5pt" fo:letter-spacing="normal" fo:font-style="normal" fo:font-weight="bold" loext:padding="0.049cm" loext:border="0.06pt solid #ffffff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31" style:family="paragraph" style:parent-style-name="Text_20_body" style:list-style-name="L14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32" style:family="paragraph" style:parent-style-name="Text_20_body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P33" style:family="paragraph" style:parent-style-name="Text_20_body" style:list-style-name="L15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34" style:family="paragraph" style:parent-style-name="Text_20_body" style:list-style-name="L16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35" style:family="paragraph" style:parent-style-name="Text_20_body" style:list-style-name="L17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36" style:family="paragraph" style:parent-style-name="Text_20_body" style:list-style-name="L18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</style:style>
    <style:style style:name="P37" style:family="paragraph" style:parent-style-name="Text_20_body" style:list-style-name="L18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38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  <style:text-properties fo:color="#ffffff" loext:opacity="100%" fo:font-weight="bold"/>
    </style:style>
    <style:style style:name="P39" style:family="paragraph" style:parent-style-name="Table_20_Heading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ffffff" loext:opacity="100%" fo:font-weight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align="end" style:justify-single-word="false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44" style:family="paragraph" style:parent-style-name="Text_20_body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45" style:family="paragraph" style:parent-style-name="Heading_20_3">
      <style:paragraph-properties fo:margin-left="0cm" fo:margin-right="0cm" fo:margin-top="0.423cm" fo:margin-bottom="0.106cm" style:contextual-spacing="false" fo:line-height="155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3.5pt" fo:letter-spacing="normal" fo:font-style="normal" fo:font-weight="bold" loext:padding="0.049cm" loext:border="0.06pt solid #ffffff"/>
    </style:style>
    <style:style style:name="P46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ffffff" loext:opacity="100%" style:font-name="KaTeX Main" fo:font-size="12pt" fo:letter-spacing="normal" fo:font-style="normal" fo:font-weight="normal" loext:padding="0.049cm" loext:border="0.06pt solid #000000"/>
    </style:style>
    <style:style style:name="P48" style:family="paragraph" style:parent-style-name="Text_20_body" style:list-style-name="L19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ffffff" loext:opacity="100%" style:font-name="KaTeX Main" fo:font-size="12pt" fo:letter-spacing="normal" fo:font-style="normal" fo:font-weight="normal" loext:padding="0.049cm" loext:border="0.06pt solid #000000"/>
    </style:style>
    <style:style style:name="P50" style:family="paragraph" style:parent-style-name="Horizontal_20_Line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51" style:family="paragraph" style:parent-style-name="Heading_20_2">
      <style:paragraph-properties fo:margin-left="0cm" fo:margin-right="0cm" fo:margin-top="0cm" fo:margin-bottom="0.106cm" style:contextual-spacing="false" fo:line-height="14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5pt" fo:letter-spacing="normal" fo:font-style="normal" fo:font-weight="bold" loext:padding="0.049cm" loext:border="0.06pt solid #ffffff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fo:color="#ffffff" loext:opacity="100%" style:font-name="ui-monospace" loext:padding-left="0.529cm" loext:padding-right="0.529cm" loext:padding-top="0.049cm" loext:padding-bottom="0.318cm" loext:border="0.06pt solid #ffffff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fo:font-variant="normal" fo:text-transform="none" fo:color="#ffffff" loext:opacity="100%" style:font-name="ui-monospace" fo:font-size="12pt" fo:letter-spacing="normal" fo:font-style="normal" fo:font-weight="normal" fo:background-color="#181818" loext:padding-left="0.529cm" loext:padding-right="0.529cm" loext:padding-top="0.049cm" loext:padding-bottom="0.318cm" loext:border="0.06pt solid #ffffff"/>
    </style:style>
    <style:style style:name="P54" style:family="paragraph" style:parent-style-name="Heading_20_3">
      <style:paragraph-properties fo:margin-left="0cm" fo:margin-right="0cm" fo:margin-top="0cm" fo:margin-bottom="0cm" style:contextual-spacing="false" fo:line-height="155%" fo:orphans="2" fo:widows="2" fo:text-indent="0cm" style:auto-text-indent="false" fo:padding="0.049cm" fo:border="0.06pt solid #ffffff"/>
    </style:style>
    <style:style style:name="P55" style:family="paragraph" style:parent-style-name="Text_20_body" style:list-style-name="L20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56" style:family="paragraph" style:parent-style-name="Text_20_body" style:list-style-name="L20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57" style:family="paragraph" style:parent-style-name="Text_20_body" style:list-style-name="L21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58" style:family="paragraph" style:parent-style-name="Text_20_body" style:list-style-name="L22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59" style:family="paragraph" style:parent-style-name="Text_20_body" style:list-style-name="L22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60" style:family="paragraph" style:parent-style-name="Text_20_body" style:list-style-name="L23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61" style:family="paragraph" style:parent-style-name="Text_20_body" style:list-style-name="L23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62" style:family="paragraph" style:parent-style-name="Text_20_body" style:list-style-name="L24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63" style:family="paragraph" style:parent-style-name="Text_20_body" style:list-style-name="L25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65" style:family="paragraph" style:parent-style-name="Text_20_body" style:list-style-name="L26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66" style:family="paragraph" style:parent-style-name="Text_20_body" style:list-style-name="L27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68" style:family="paragraph" style:parent-style-name="Text_20_body" style:list-style-name="L28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69" style:family="paragraph" style:parent-style-name="Text_20_body" style:list-style-name="L29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70" style:family="paragraph" style:parent-style-name="Heading_20_3">
      <style:paragraph-properties fo:margin-left="0cm" fo:margin-right="0cm" fo:margin-top="0cm" fo:margin-bottom="0.106cm" style:contextual-spacing="false" fo:line-height="155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3.5pt" fo:letter-spacing="normal" fo:font-style="normal" fo:font-weight="bold" loext:padding="0.049cm" loext:border="0.06pt solid #ffffff"/>
    </style:style>
    <style:style style:name="P71" style:family="paragraph" style:parent-style-name="Text_20_body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73" style:family="paragraph" style:parent-style-name="Text_20_body" style:list-style-name="L30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74" style:family="paragraph" style:parent-style-name="Text_20_body" style:list-style-name="L31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75" style:family="paragraph" style:parent-style-name="Text_20_body" style:list-style-name="L3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76" style:family="paragraph" style:parent-style-name="Text_20_body" style:list-style-name="L32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77" style:family="paragraph" style:parent-style-name="Text_20_body" style:list-style-name="L33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P78" style:family="paragraph" style:parent-style-name="Text_20_body" style:list-style-name="L34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79" style:family="paragraph" style:parent-style-name="Text_20_body" style:list-style-name="L35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80" style:family="paragraph" style:parent-style-name="Text_20_body" style:list-style-name="L35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81" style:family="paragraph" style:parent-style-name="Text_20_body" style:list-style-name="L36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82" style:family="paragraph" style:parent-style-name="Text_20_body" style:list-style-name="L36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83" style:family="paragraph" style:parent-style-name="Text_20_body" style:list-style-name="L37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84" style:family="paragraph" style:parent-style-name="Text_20_body" style:list-style-name="L38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85" style:family="paragraph" style:parent-style-name="Text_20_body" style:list-style-name="L39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86" style:family="paragraph" style:parent-style-name="Text_20_body" style:list-style-name="L40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fo:letter-spacing="normal" loext:padding="0.049cm" loext:border="0.06pt solid #ffffff"/>
    </style:style>
    <style:style style:name="P87" style:family="paragraph" style:parent-style-name="Text_20_body" style:list-style-name="L41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88" style:family="paragraph" style:parent-style-name="Text_20_body" style:list-style-name="L42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89" style:family="paragraph" style:parent-style-name="Text_20_body" style:list-style-name="L43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P90" style:family="paragraph" style:parent-style-name="Text_20_body" style:list-style-name="L43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91" style:family="paragraph" style:parent-style-name="Text_20_body" style:list-style-name="L44">
      <style:paragraph-properties fo:margin-left="0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P92" style:family="paragraph" style:parent-style-name="Text_20_body" style:list-style-name="L44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fo:font-variant="normal" fo:text-transform="none" fo:color="#d8d8d8" loext:opacity="100%" style:font-name="ui-monospace" fo:font-size="12pt" fo:letter-spacing="normal" fo:font-style="normal" fo:font-weight="normal" fo:background-color="#181818" loext:padding="0.049cm" loext:border="0.06pt solid #ffffff"/>
    </style:style>
    <style:style style:name="P94" style:family="paragraph" style:parent-style-name="Text_20_body" style:list-style-name="L45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ffffff"/>
    </style:style>
    <style:style style:name="P95" style:family="paragraph" style:parent-style-name="Text_20_body">
      <style:paragraph-properties fo:margin-left="0.106cm" fo:margin-right="0cm" fo:margin-top="0cm" fo:margin-bottom="0.106cm" style:contextual-spacing="false" fo:line-height="150%" fo:orphans="2" fo:widows="2" fo:text-indent="0cm" style:auto-text-indent="false" fo:padding="0.049cm" fo:border="0.06pt solid #ffffff"/>
      <style:text-properties fo:font-variant="normal" fo:text-transform="none" fo:color="#ffffff" loext:opacity="100%" style:font-name="ui-sans-serif" fo:font-size="12pt" fo:letter-spacing="normal" fo:font-style="normal" fo:font-weight="normal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loext:padding="0.049cm" loext:border="0.06pt solid #ffffff"/>
    </style:style>
    <style:style style:name="P9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ffffff" loext:opacity="100%" style:font-name="ui-sans-serif" fo:font-size="12pt" fo:letter-spacing="normal" fo:font-style="normal" fo:font-weight="normal" loext:padding="0.049cm" loext:border="0.06pt solid #ffffff"/>
    </style:style>
    <style:style style:name="T2" style:family="text">
      <style:text-properties fo:font-variant="normal" fo:text-transform="none" fo:color="#ffffff" loext:opacity="100%" style:font-name="ui-sans-serif" fo:font-size="12pt" fo:letter-spacing="normal" fo:font-style="normal" fo:font-weight="bold" loext:padding="0.049cm" loext:border="0.06pt solid #ffffff"/>
    </style:style>
    <style:style style:name="T3" style:family="text">
      <style:text-properties fo:font-variant="normal" fo:text-transform="none" fo:color="#ffffff" loext:opacity="100%" style:font-name="ui-monospace" fo:font-size="12pt" fo:letter-spacing="normal" fo:font-style="normal" fo:font-weight="bold" fo:background-color="#424242" loext:char-shading-value="0" loext:padding-left="0.04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4" style:family="text">
      <style:text-properties fo:color="#be95fa" loext:opacity="100%" loext:padding="0.049cm" loext:border="0.06pt solid #ffffff"/>
    </style:style>
    <style:style style:name="T5" style:family="text">
      <style:text-properties fo:color="#ffa3ce" loext:opacity="100%" loext:padding="0.049cm" loext:border="0.06pt solid #ffffff"/>
    </style:style>
    <style:style style:name="T6" style:family="text">
      <style:text-properties loext:padding="0.049cm" loext:border="0.06pt solid #ffffff"/>
    </style:style>
    <style:style style:name="T7" style:family="text">
      <style:text-properties fo:color="#66d492" loext:opacity="100%" loext:padding="0.049cm" loext:border="0.06pt solid #ffffff"/>
    </style:style>
    <style:style style:name="T8" style:family="text">
      <style:text-properties fo:font-variant="normal" fo:text-transform="none" fo:color="#ffffff" loext:opacity="100%" style:font-name="ui-monospace" fo:font-size="12pt" fo:letter-spacing="normal" fo:font-style="normal" fo:font-weight="bold" fo:background-color="#424242" loext:char-shading-value="0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-left="0.04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9" style:family="text">
      <style:text-properties fo:font-variant="normal" fo:text-transform="none" fo:color="#ffffff" loext:opacity="100%" style:font-name="ui-sans-serif" fo:font-size="12pt" fo:letter-spacing="normal" fo:font-style="normal" fo:font-weight="normal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T10" style:family="text">
      <style:text-properties fo:color="#ff9e6c" loext:opacity="100%" loext:padding="0.049cm" loext:border="0.06pt solid #ffffff"/>
    </style:style>
    <style:style style:name="T11" style:family="text">
      <style:text-properties fo:font-family="'KaTeX Math'" fo:font-style="italic"/>
    </style:style>
    <style:style style:name="T12" style:family="text">
      <style:text-properties fo:font-family="'KaTeX Size3'"/>
    </style:style>
    <style:style style:name="T13" style:family="text">
      <style:text-properties fo:font-variant="normal" fo:text-transform="none" fo:color="#ffffff" loext:opacity="100%" style:font-name="ui-monospace" fo:font-size="12pt" fo:letter-spacing="normal" fo:font-style="normal" fo:font-weight="normal" fo:background-color="#424242" loext:char-shading-value="0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-left="0.04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14" style:family="text">
      <style:text-properties fo:font-variant="normal" fo:text-transform="none" fo:color="#ffffff" loext:opacity="100%" style:font-name="ui-monospace" fo:font-size="13.5pt" fo:letter-spacing="normal" fo:font-style="normal" fo:font-weight="bold" fo:background-color="#424242" loext:char-shading-value="0" loext:padding-left="0.04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15" style:family="text">
      <style:text-properties fo:font-variant="normal" fo:text-transform="none" fo:color="#ffffff" loext:opacity="100%" style:font-name="ui-sans-serif" fo:font-size="13.5pt" fo:letter-spacing="normal" fo:font-style="normal" fo:font-weight="bold" loext:padding="0.049cm" loext:border="0.06pt solid #ffffff"/>
    </style:style>
    <style:style style:name="T16" style:family="text">
      <style:text-properties fo:font-variant="normal" fo:text-transform="none" fo:color="#ffffff" loext:opacity="100%" fo:letter-spacing="normal" loext:padding="0.049cm" loext:border="0.06pt solid #ffffff"/>
    </style:style>
    <style:style style:name="T17" style:family="text">
      <style:text-properties fo:font-family="'KaTeX Math'" fo:font-style="italic" loext:padding="0.049cm" loext:border="0.06pt solid #000000"/>
    </style:style>
    <style:style style:name="T18" style:family="text">
      <style:text-properties style:font-name="KaTeX Main" loext:padding="0.049cm" loext:border="0.06pt solid #000000"/>
    </style:style>
    <style:style style:name="T19" style:family="text">
      <style:text-properties fo:font-variant="normal" fo:text-transform="none" fo:color="#ffffff" loext:opacity="100%" style:font-name="ui-sans-serif" fo:font-size="12pt" fo:letter-spacing="normal" fo:font-style="normal" fo:font-weight="bold" style:font-name-asian="ui-sans-serif" style:font-size-asian="12pt" style:font-style-asian="normal" style:font-weight-asian="normal" style:font-name-complex="ui-sans-serif" style:font-size-complex="12pt" style:font-style-complex="normal" style:font-weight-complex="normal" loext:padding="0.049cm" loext:border="0.06pt solid #ffffff"/>
    </style:style>
    <style:style style:name="T20" style:family="text">
      <style:text-properties style:font-name="ui-sans-serif" fo:font-size="12pt" fo:font-style="normal" fo:font-weight="normal"/>
    </style:style>
    <style:style style:name="T21" style:family="text">
      <style:text-properties fo:color="#ffffff" loext:opacity="100%" fo:font-size="12pt" style:text-underline-style="solid" style:text-underline-width="auto" style:text-underline-color="font-color" loext:padding="0.049cm" loext:border="0.06pt solid #fffff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0.06pt solid #ffffff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background-color="#171717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tage-slideover-sidebar">
        <text:list text:style-name="L1">
          <text:list-item>
            <text:list>
              <text:list-item>
                <text:p text:style-name="P1"/>
              </text:list-item>
            </text:list>
          </text:list-item>
          <text:list-item>
            <text:p text:style-name="P1"/>
          </text:list-item>
        </text:list>
        <text:section text:style-name="Sect2" text:name="history">
          <text:list text:style-name="L2">
            <text:list-item>
              <text:p text:style-name="P2"/>
            </text:list-item>
          </text:list>
        </text:section>
      </text:section>
      <text:section text:style-name="Sect2" text:name="thread">
        <text:p text:style-name="P3">Llevo 2 meses sin estudiar esto. Retomo el curso, ¿sabes cual y para qué? </text:p>
        <text:p text:style-name="P4"><draw:frame draw:style-name="fr1" draw:name="Frame1" text:anchor-type="char" svg:width="0.041cm" draw:z-index="0"><draw:text-box fo:min-height="0.041cm"><text:p text:style-name="P5"><text:line-break/></text:p></draw:text-box></draw:frame>Voy a apoyarme en tus memorandos para responder con precisión y sin inventar.</text:p>
        <text:p text:style-name="P6">Thought for 1m 5s</text:p>
        <text:p text:style-name="P4">22/04/2026 11:20:04 CEST</text:p>
        <text:p text:style-name="P7">Sí.</text:p>
        <text:list text:style-name="L3">
          <text:list-item>
            <text:p text:style-name="P8"><text:span text:style-name="T1">El curso es </text:span><text:span text:style-name="Strong_20_Emphasis"><text:span text:style-name="T1">“</text:span></text:span><text:span text:style-name="Strong_20_Emphasis"><text:span text:style-name="T2">Python and Statistics for Financial Analysis”</text:span></text:span><text:span text:style-name="T1"> de Coursera, impartido por </text:span><text:span text:style-name="Strong_20_Emphasis"><text:span text:style-name="T2">Xuhu Wan</text:span></text:span><text:span text:style-name="T1">. Cubre Python con </text:span><text:span text:style-name="Source_20_Text"><text:span text:style-name="T3">pandas</text:span></text:span><text:span text:style-name="T1">, análisis estadístico, regresión, datos financieros e inferencia estadística, y está orientado a construir y evaluar modelos sencillos de trading sobre datos de mercado. <text:line-break/></text:span><text:span text:style-name="Strong_20_Emphasis"><text:span text:style-name="T2">English summary:</text:span></text:span><text:span text:style-name="T1"> The course is </text:span><text:span text:style-name="Emphasis"><text:span text:style-name="T1">Python and Statistics for Financial Analysis</text:span></text:span><text:span text:style-name="T1">, focused on Python, statistics, and financial data analysis.<text:line-break/>[retomar el curso = resume the course] [datos financieros = financial data] [modelo de trading = trading model]</text:span></text:p>
          </text:list-item>
          <text:list-item>
            <text:p text:style-name="P8"><text:span text:style-name="T1">No lo estás haciendo “por cultura general”. Lo estás usando para tu giro hacia </text:span><text:span text:style-name="Strong_20_Emphasis"><text:span text:style-name="T2">FinTech técnico / trading systems / automatización financiera</text:span></text:span><text:span text:style-name="T1">, porque encaja con tu perfil, te da salida profesional y te sirve para construir portfolio real. En tus notas aparece explícitamente como parte de ese reposicionamiento.<text:line-break/></text:span><text:span text:style-name="Strong_20_Emphasis"><text:span text:style-name="T2">English summary:</text:span></text:span><text:span text:style-name="T1"> You are taking it to move toward technical FinTech, trading systems, and financial automation.<text:line-break/>[giro profesional = career pivot] [automatización financiera = financial automation] [reposicionamiento = repositioning]</text:span></text:p>
          </text:list-item>
          <text:list-item>
            <text:p text:style-name="P8"><text:soft-page-break/><text:span text:style-name="T1">En lo técnico, el “para qué” concreto era este: aprender a </text:span><text:span text:style-name="Strong_20_Emphasis"><text:span text:style-name="T2">importar, manipular, visualizar y modelar datos bursátiles</text:span></text:span><text:span text:style-name="T1"> con Python; entender probabilidad y estadística aplicadas a retornos y riesgo; y terminar pudiendo montar estrategias simples y luego modelos con regresión para evaluarlos con métricas de inversión.<text:line-break/></text:span><text:span text:style-name="Strong_20_Emphasis"><text:span text:style-name="T2">English summary:</text:span></text:span><text:span text:style-name="T1"> The practical goal is to analyze stock data with Python and use statistics to model returns and risk.<text:line-break/>[retornos = returns] [riesgo = risk] [regresión lineal = linear regression] [evaluar estrategia = evaluate a strategy]</text:span></text:p>
          </text:list-item>
          <text:list-item>
            <text:p text:style-name="P8"><text:span text:style-name="T1">Además, según tus memorandos, </text:span><text:span text:style-name="Strong_20_Emphasis"><text:span text:style-name="T2">ya habías cerrado el módulo 1</text:span></text:span><text:span text:style-name="T1"> y aprobado el quiz, y estabas metido en el </text:span><text:span text:style-name="Strong_20_Emphasis"><text:span text:style-name="T2">módulo 2</text:span></text:span><text:span text:style-name="T1">, centrado en distribuciones, esperanza, varianza, </text:span><text:span text:style-name="Source_20_Text"><text:span text:style-name="T3">log return</text:span></text:span><text:span text:style-name="T1">, PDF y CDF. O sea: no vuelves desde cero; vuelves a la parte estadística aplicada a finanzas.<text:line-break/></text:span><text:span text:style-name="Strong_20_Emphasis"><text:span text:style-name="T2">English summary:</text:span></text:span><text:span text:style-name="T1"> You had already finished module 1 and were working on module 2, focused on probability distributions and returns.<text:line-break/>[esperanza = expected value] [varianza = variance] [desviación típica = standard deviation] [log return = logarithmic return]</text:span></text:p>
          </text:list-item>
          <text:list-item>
            <text:p text:style-name="P8"><text:span text:style-name="T1">Resumen directo: </text:span><text:span text:style-name="Strong_20_Emphasis"><text:span text:style-name="T2">sí sé cuál es y para qué</text:span></text:span><text:span text:style-name="T1">.<text:line-break/>Curso: </text:span><text:span text:style-name="Strong_20_Emphasis"><text:span text:style-name="T2">Python and Statistics for Financial Analysis</text:span></text:span><text:span text:style-name="T1">.<text:line-break/>Objetivo: </text:span><text:span text:style-name="Strong_20_Emphasis"><text:span text:style-name="T2">usar Python + estadística para análisis financiero y como base para tu transición a FinTech/trading systems</text:span></text:span><text:span text:style-name="T1">.<text:line-break/></text:span><text:span text:style-name="Strong_20_Emphasis"><text:span text:style-name="T2">English summary:</text:span></text:span><text:span text:style-name="T1"> Yes: the course is clear, and its purpose is to build practical financial-analysis skills for your FinTech transition.<text:line-break/>[análisis financiero = financial analysis] [base técnica = technical foundation] [transición a FinTech = transition into FinTech]</text:span></text:p>
          </text:list-item>
        </text:list>
        <text:p text:style-name="P9"><text:soft-page-break/><text:span text:style-name="T1">Dónde lo retomaría yo: </text:span><text:span text:style-name="Strong_20_Emphasis"><text:span text:style-name="T2">Módulo 2, bloque PDF vs CDF y modelado de </text:span></text:span><text:span text:style-name="Strong_20_Emphasis"><text:span text:style-name="Source_20_Text"><text:span text:style-name="T3">log returns</text:span></text:span></text:span><text:span text:style-name="T1">, porque es justo donde lo dejaste registrado. </text:span></text:p>
        <text:p text:style-name="P9"><text:span text:style-name="T1">Si quieres, te hago ahora un </text:span><text:span text:style-name="Strong_20_Emphasis"><text:span text:style-name="T2">recordatorio de 10 minutos</text:span></text:span><text:span text:style-name="T1"> del punto exacto en el que lo dejaste.</text:span></text:p>
        <text:p text:style-name="P10"><draw:frame draw:style-name="fr1" draw:name="Frame2" text:anchor-type="char" svg:width="0.041cm" draw:z-index="1"><draw:text-box fo:min-height="0.041cm"><text:p text:style-name="P5"><text:line-break/></text:p></draw:text-box></draw:frame>Estaba con el video más importante. Me gustaría entenderlo sin volverme loco. Aydame, empecemos con el código practico. Expicame línea por linea, texto por texto, casi como si fuera tonto y refrescandome todo, lo siguiente, y traduciendo y con palabras inglés/español: Models of Stock Return import pandas as pd import numpy as np import matplotlib.pyplot as plt % matplotlib inline ms = pd.DataFrame.from_csv('../data/microsoft.csv') ms.head() Open High Low Close Adj Close Volume Date 2014-12-31 46.730000 47.439999 46.450001 46.450001 42.848763 21552500 2015-01-02 46.660000 47.419998 46.540001 46.759998 43.134731 27913900 2015-01-05 46.369999 46.730000 46.250000 46.330002 42.738068 39673900 2015-01-06 46.380001 46.750000 45.540001 45.650002 42.110783 36447900 2015-01-07 45.980000 46.459999 45.490002 46.230000 42.645817 29114100 Distribution of Log return # let play around with ms data by calculating the log daily return ms['LogReturn'] = np.log(ms['Close']).shift(-1) - np.log(ms['Close']) # Plot a histogram to show the distribution of log return of Microsoft's stock. # You can see it is very close to a normal distribution from scipy.stats import norm mu = ms['LogReturn'].mean() sigma = ms['LogReturn'].std(ddof=1) ​ density = pd.DataFrame() density['x'] = np.arange(ms['LogReturn'].min()-0.01, ms['LogReturn'].max()+0.01, 0.001) density['pdf'] = norm.pdf(density['x'], mu, sigma) ​ ms['LogReturn'].hist(bins=50, figsize=(15, 8)) plt.plot(density['x'], density['pdf'], color='red') plt.show() Calculate the probability of the stock price will drop over a certain percentage in a day # probability that the stock price of microsoft will drop over 5% in a day prob_return1 = norm.cdf(-0.05, mu, sigma) print('The <text:soft-page-break/>Probability is ', prob_return1) The Probability is 0.000171184826087 # Now is your turn, calculate the probability that the stock price of microsoft will drop over 10% in a day prob_return1 = None print('The Probability is ', prob_return1) The Probability is 6.05677563486e-13 Expected Output: The Probability is 6.05677563486e-13 Calculate the probability of the stock price will drop over a certain percentage in a year # drop over 40% in 220 days mu220 = 220*mu sigma220 = (220**0.5) * sigma print('The probability of dropping over 40% in 220 days is ', norm.cdf(-0.4, mu220, sigma220)) The probability of dropping over 40% in 220 days is 0.00291236331333 # drop over 20% in 220 days mu220 = 220*mu sigma220 = (220**0.5) * sigma drop20 = None print('The probability of dropping over 20% in 220 days is ', drop20) The probability of dropping over 20% in 220 days is 0.0353523772749 Expected Output: The probability of dropping over 20% in 220 days is 0.0353523772749 Calculate Value at risk (VaR) # Value at risk(VaR) VaR = norm.ppf(0.05, mu, sigma) print('Single day value at risk ', VaR) Single day value at risk -0.0225233624071 # Quatile # 5% quantile print('5% quantile ', norm.ppf(0.05, mu, sigma)) # 95% quantile print('95% quantile ', norm.ppf(0.95, mu, sigma)) 5% quantile -0.0225233624071 95% quantile 0.0241638253793 # This is your turn to calcuate the 25% and 75% Quantile of the return # 25% quantile q25 = None print('25% quantile ', q25) # 75% quantile q75 = None print('75% quantile ', q75) 25% quantile -0.00875205783841 75% quantile 0.0103925208107 Expected Output: 25% quantile -0.00875205783841 75% quantile 0.0103925208107 </text:p>
        <text:p text:style-name="P4"><draw:frame draw:style-name="fr1" draw:name="Frame3" text:anchor-type="char" svg:width="0.041cm" draw:z-index="2"><draw:text-box fo:min-height="0.041cm"><text:p text:style-name="P5"><text:line-break/></text:p></draw:text-box></draw:frame>Voy a desmenuzarlo por bloques y te marcaré también los puntos donde el código del curso ya está viejo o puede confundirte hoy.</text:p>
        <text:p text:style-name="P6">Thought for 2m 6s</text:p>
        <text:p text:style-name="P4">22/04/2026 11:24:25 CEST</text:p>
        <text:p text:style-name="P9"><text:span text:style-name="T1">Sí. Vamos a hacerlo </text:span><text:span text:style-name="Strong_20_Emphasis"><text:span text:style-name="T2">muy básico, muy práctico y sin saltos</text:span></text:span><text:span text:style-name="T1">.</text:span></text:p>
        <text:p text:style-name="P7"><text:soft-page-break/>Primero, 4 correcciones importantes para que no te líes:</text:p>
        <text:list text:style-name="L4">
          <text:list-item>
            <text:p text:style-name="P11"><text:span text:style-name="Source_20_Text"><text:span text:style-name="T3">"% matplotlib inline"</text:span></text:span><text:span text:style-name="T1"> en realidad debe ser </text:span><text:span text:style-name="Strong_20_Emphasis"><text:span text:style-name="Source_20_Text"><text:span text:style-name="T3">%matplotlib inline</text:span></text:span></text:span><text:span text:style-name="T1"> y solo funciona en </text:span><text:span text:style-name="Strong_20_Emphasis"><text:span text:style-name="T2">Jupyter Notebook</text:span></text:span><text:span text:style-name="T1">, no en un </text:span><text:span text:style-name="Source_20_Text"><text:span text:style-name="T3">.py</text:span></text:span><text:span text:style-name="T1">.<text:line-break/></text:span><text:span text:style-name="Strong_20_Emphasis"><text:span text:style-name="T2">English summary:</text:span></text:span><text:span text:style-name="T1"> </text:span><text:span text:style-name="Source_20_Text"><text:span text:style-name="T3">%matplotlib inline</text:span></text:span><text:span text:style-name="T1"> is a Jupyter-only command.<text:line-break/>[Jupyter Notebook = cuaderno Jupyter] [command = comando]</text:span></text:p>
          </text:list-item>
          <text:list-item>
            <text:p text:style-name="P11"><text:span text:style-name="Source_20_Text"><text:span text:style-name="T3">pd.DataFrame.from_csv(...)</text:span></text:span><text:span text:style-name="T1"> es </text:span><text:span text:style-name="Strong_20_Emphasis"><text:span text:style-name="T2">código antiguo</text:span></text:span><text:span text:style-name="T1">. Hoy lo normal es usar </text:span><text:span text:style-name="Source_20_Text"><text:span text:style-name="T3">pd.read_csv(...)</text:span></text:span><text:span text:style-name="T1">.<text:line-break/></text:span><text:span text:style-name="Strong_20_Emphasis"><text:span text:style-name="T2">English summary:</text:span></text:span><text:span text:style-name="T1"> </text:span><text:span text:style-name="Source_20_Text"><text:span text:style-name="T3">from_csv</text:span></text:span><text:span text:style-name="T1"> is old; </text:span><text:span text:style-name="Source_20_Text"><text:span text:style-name="T3">read_csv</text:span></text:span><text:span text:style-name="T1"> is the modern way.<text:line-break/>[old code = código antiguo] [modern way = forma moderna]</text:span></text:p>
          </text:list-item>
          <text:list-item>
            <text:p text:style-name="P11"><text:span text:style-name="T1">Estás calculando retornos con </text:span><text:span text:style-name="Strong_20_Emphasis"><text:span text:style-name="Source_20_Text"><text:span text:style-name="T3">Close</text:span></text:span></text:span><text:span text:style-name="T1">, pero en análisis real muchas veces se usa </text:span><text:span text:style-name="Strong_20_Emphasis"><text:span text:style-name="Source_20_Text"><text:span text:style-name="T3">Adj Close</text:span></text:span></text:span><text:span text:style-name="T1"> porque ajusta dividendos y splits. Para aprender, </text:span><text:span text:style-name="Source_20_Text"><text:span text:style-name="T3">Close</text:span></text:span><text:span text:style-name="T1"> vale.<text:line-break/></text:span><text:span text:style-name="Strong_20_Emphasis"><text:span text:style-name="T2">English summary:</text:span></text:span><text:span text:style-name="T1"> Real analysis often uses </text:span><text:span text:style-name="Source_20_Text"><text:span text:style-name="T3">Adj Close</text:span></text:span><text:span text:style-name="T1">, but </text:span><text:span text:style-name="Source_20_Text"><text:span text:style-name="T3">Close</text:span></text:span><text:span text:style-name="T1"> is fine for learning.<text:line-break/>[adjusted close = cierre ajustado] [split = desdoblamiento]</text:span></text:p>
          </text:list-item>
          <text:list-item>
            <text:p text:style-name="P11"><text:span text:style-name="T1">El curso mezcla a veces </text:span><text:span text:style-name="Strong_20_Emphasis"><text:span text:style-name="T2">log return</text:span></text:span><text:span text:style-name="T1"> con “caída del 5%” como si fuera exactamente lo mismo. </text:span><text:span text:style-name="Strong_20_Emphasis"><text:span text:style-name="T2">No es exacto</text:span></text:span><text:span text:style-name="T1">, aunque para movimientos diarios pequeños se parece bastante.<text:line-break/></text:span><text:span text:style-name="Strong_20_Emphasis"><text:span text:style-name="T2">English summary:</text:span></text:span><text:span text:style-name="T1"> The course uses an approximation: log return is close to percentage return for small daily moves.<text:line-break/>[approximation = aproximación] [percentage return = retorno porcentual]</text:span></text:p>
          </text:list-item>
        </text:list>
        <text:p text:style-name="P12"/>
        <text:h text:style-name="P13" text:outline-level="2">1) Título y carga de librerías</text:h>
        <text:section text:style-name="Sect3" text:name="code-block-viewer">
          <text:p text:style-name="P14"><text:span text:style-name="T4">imp</text:span><text:span text:style-name="T5">ort</text:span><text:span text:style-name="T6"> </text:span><text:span text:style-name="T4">pandas</text:span><text:span text:style-name="T6"> </text:span><text:span text:style-name="T5">as</text:span><text:span text:style-name="T6"> </text:span><text:span text:style-name="T4">pd</text:span></text:p>
          <text:p text:style-name="P15"><text:span text:style-name="T5">import</text:span><text:span text:style-name="T6"> </text:span><text:span text:style-name="T4">numpy</text:span><text:span text:style-name="T6"> </text:span><text:span text:style-name="T5">as</text:span><text:span text:style-name="T6"> </text:span><text:span text:style-name="T4">np</text:span></text:p>
          <text:p text:style-name="P15"><text:span text:style-name="T5">import</text:span><text:span text:style-name="T6"> </text:span><text:span text:style-name="T4">matplotlib</text:span><text:span text:style-name="T5">.</text:span><text:span text:style-name="T4">pyplot</text:span><text:span text:style-name="T6"> </text:span><text:span text:style-name="T5">as</text:span><text:span text:style-name="T6"> </text:span><text:span text:style-name="T4">plt</text:span></text:p>
          <text:p text:style-name="P15"><text:span text:style-name="T6">%</text:span><text:span text:style-name="T4">matplotlib</text:span><text:span text:style-name="T6"> </text:span><text:span text:style-name="T4">inline</text:span></text:p>
        </text:section>
        <text:h text:style-name="P16" text:outline-level="3">Línea por línea</text:h>
        <text:p text:style-name="P9"><text:span text:style-name="Source_20_Text"><text:span text:style-name="T3">import pandas as pd</text:span></text:span></text:p>
        <text:list text:style-name="L5">
          <text:list-item>
            <text:p text:style-name="P17"><text:soft-page-break/><text:span text:style-name="Strong_20_Emphasis"><text:span text:style-name="Source_20_Text"><text:span text:style-name="T3">pandas</text:span></text:span></text:span><text:span text:style-name="T1"> es la librería para tablas de datos.</text:span></text:p>
          </text:list-item>
          <text:list-item>
            <text:p text:style-name="P17"><text:span text:style-name="Source_20_Text"><text:span text:style-name="T3">pd</text:span></text:span><text:span text:style-name="T1"> es solo un </text:span><text:span text:style-name="Strong_20_Emphasis"><text:span text:style-name="T2">alias</text:span></text:span><text:span text:style-name="T1"> corto.</text:span></text:p>
          </text:list-item>
          <text:list-item>
            <text:p text:style-name="P17"><text:span text:style-name="T1">Piensa en </text:span><text:span text:style-name="Source_20_Text"><text:span text:style-name="T3">pandas</text:span></text:span><text:span text:style-name="T1"> como “Excel pero programable”.</text:span></text:p>
          </text:list-item>
          <text:list-item>
            <text:p text:style-name="P18">Lo usarás para cargar CSVs, filtrar columnas, calcular medias, etc.</text:p>
          </text:list-item>
        </text:list>
        <text:p text:style-name="P4">[table = tabla] [dataframe = tabla de datos] [alias = alias]</text:p>
        <text:p text:style-name="P9"><text:span text:style-name="Source_20_Text"><text:span text:style-name="T3">import numpy as np</text:span></text:span></text:p>
        <text:list text:style-name="L6">
          <text:list-item>
            <text:p text:style-name="P19"><text:span text:style-name="Strong_20_Emphasis"><text:span text:style-name="Source_20_Text"><text:span text:style-name="T3">numpy</text:span></text:span></text:span><text:span text:style-name="T1"> es la librería matemática base.</text:span></text:p>
          </text:list-item>
          <text:list-item>
            <text:p text:style-name="P19"><text:span text:style-name="Source_20_Text"><text:span text:style-name="T3">np</text:span></text:span><text:span text:style-name="T1"> también es un alias corto.</text:span></text:p>
          </text:list-item>
          <text:list-item>
            <text:p text:style-name="P19"><text:span text:style-name="T1">Aquí la usamos sobre todo para </text:span><text:span text:style-name="Source_20_Text"><text:span text:style-name="T3">np.log(...)</text:span></text:span><text:span text:style-name="T1"> y para generar rangos numéricos.</text:span></text:p>
          </text:list-item>
        </text:list>
        <text:p text:style-name="P4">[array = array] [natural log = logaritmo natural]</text:p>
        <text:p text:style-name="P9"><text:span text:style-name="Source_20_Text"><text:span text:style-name="T3">import matplotlib.pyplot as plt</text:span></text:span></text:p>
        <text:list text:style-name="L7">
          <text:list-item>
            <text:p text:style-name="P20"><text:span text:style-name="Source_20_Text"><text:span text:style-name="T3">matplotlib</text:span></text:span><text:span text:style-name="T1"> dibuja gráficos.</text:span></text:p>
          </text:list-item>
          <text:list-item>
            <text:p text:style-name="P20"><text:span text:style-name="Source_20_Text"><text:span text:style-name="T3">pyplot</text:span></text:span><text:span text:style-name="T1"> es el módulo típico para hacer plots.</text:span></text:p>
          </text:list-item>
          <text:list-item>
            <text:p text:style-name="P20"><text:span text:style-name="Source_20_Text"><text:span text:style-name="T3">plt</text:span></text:span><text:span text:style-name="T1"> es el alias habitual.</text:span></text:p>
          </text:list-item>
        </text:list>
        <text:p text:style-name="P4">[plot = gráfico] [chart = gráfico] [figure = figura]</text:p>
        <text:p text:style-name="P9"><text:span text:style-name="Source_20_Text"><text:span text:style-name="T3">%matplotlib inline</text:span></text:span></text:p>
        <text:list text:style-name="L8">
          <text:list-item>
            <text:p text:style-name="P21">Esto le dice a Jupyter: “muestra los gráficos dentro del notebook”.</text:p>
          </text:list-item>
          <text:list-item>
            <text:p text:style-name="P22"><text:span text:style-name="T1">Si estás en script </text:span><text:span text:style-name="Source_20_Text"><text:span text:style-name="T3">.py</text:span></text:span><text:span text:style-name="T1">, esto no va. Ahí usarías </text:span><text:span text:style-name="Source_20_Text"><text:span text:style-name="T3">plt.show()</text:span></text:span><text:span text:style-name="T1">.</text:span></text:p>
          </text:list-item>
        </text:list>
        <text:p text:style-name="P4">[inline = incrustado] [show = mostrar]</text:p>
        <text:p text:style-name="P9"><text:span text:style-name="Strong_20_Emphasis"><text:span text:style-name="T2">English summary:</text:span></text:span><text:span text:style-name="T1"> These lines load the data, math, and plotting libraries.<text:line-break/>[load libraries = cargar librerías]</text:span></text:p>
        <text:p text:style-name="P12"/>
        <text:h text:style-name="P13" text:outline-level="2">2) Cargar el CSV y ver las primeras filas</text:h>
        <text:section text:style-name="Sect3" text:name="Section1">
          <text:p text:style-name="P14"><text:bookmark text:name="code-block-viewer"/><text:span text:style-name="T4">ms</text:span><text:span text:style-name="T6"> </text:span><text:span text:style-name="T5">=</text:span><text:span text:style-name="T6"> </text:span><text:span text:style-name="T4">pd</text:span><text:span text:style-name="T5">.</text:span><text:span text:style-name="T6">DataFrame</text:span><text:span text:style-name="T5">.</text:span><text:span text:style-name="T6">from_csv(</text:span><text:span text:style-name="T7">'../data/microsoft.csv'</text:span><text:span text:style-name="T6">)</text:span></text:p>
          <text:p text:style-name="P15"><text:span text:style-name="T4">ms</text:span><text:span text:style-name="T5">.</text:span><text:span text:style-name="T6">head()</text:span></text:p>
        </text:section>
        <text:h text:style-name="P16" text:outline-level="3"><text:soft-page-break/>Línea por línea</text:h>
        <text:p text:style-name="P9"><text:span text:style-name="Source_20_Text"><text:span text:style-name="T3">ms = ...</text:span></text:span></text:p>
        <text:list text:style-name="L9">
          <text:list-item>
            <text:p text:style-name="P23"><text:span text:style-name="Source_20_Text"><text:span text:style-name="T3">ms</text:span></text:span><text:span text:style-name="T1"> será tu variable con los datos de Microsoft.</text:span></text:p>
          </text:list-item>
          <text:list-item>
            <text:p text:style-name="P23"><text:span text:style-name="T1">Podrías llamarla </text:span><text:span text:style-name="Source_20_Text"><text:span text:style-name="T3">microsoft</text:span></text:span><text:span text:style-name="T1">, pero el curso usa </text:span><text:span text:style-name="Source_20_Text"><text:span text:style-name="T3">ms</text:span></text:span><text:span text:style-name="T1">.</text:span></text:p>
          </text:list-item>
        </text:list>
        <text:p text:style-name="P4">[variable = variable] [dataset = conjunto de datos]</text:p>
        <text:p text:style-name="P9"><text:span text:style-name="Source_20_Text"><text:span text:style-name="T3">pd.DataFrame.from_csv('../data/microsoft.csv')</text:span></text:span></text:p>
        <text:list text:style-name="L10">
          <text:list-item>
            <text:p text:style-name="P24">Lee el archivo CSV.</text:p>
          </text:list-item>
          <text:list-item>
            <text:p text:style-name="P25"><text:span text:style-name="Source_20_Text"><text:span text:style-name="T3">../data/microsoft.csv</text:span></text:span><text:span text:style-name="T1"> significa:</text:span></text:p>
            <text:list>
              <text:list-item>
                <text:p text:style-name="P25"><text:span text:style-name="Source_20_Text"><text:span text:style-name="T3">..</text:span></text:span><text:span text:style-name="T1"> = sube una carpeta</text:span></text:p>
              </text:list-item>
              <text:list-item>
                <text:p text:style-name="P25"><text:span text:style-name="T1">luego entra en </text:span><text:span text:style-name="Source_20_Text"><text:span text:style-name="T3">data</text:span></text:span></text:p>
              </text:list-item>
              <text:list-item>
                <text:p text:style-name="P25"><text:span text:style-name="T1">y abre </text:span><text:span text:style-name="Source_20_Text"><text:span text:style-name="T3">microsoft.csv</text:span></text:span></text:p>
              </text:list-item>
            </text:list>
          </text:list-item>
        </text:list>
        <text:p text:style-name="P4">[path = ruta] [relative path = ruta relativa]</text:p>
        <text:p text:style-name="P9"><text:span text:style-name="Source_20_Text"><text:span text:style-name="T3">ms.head()</text:span></text:span></text:p>
        <text:list text:style-name="L11">
          <text:list-item>
            <text:p text:style-name="P26"><text:span text:style-name="Source_20_Text"><text:span text:style-name="T3">head()</text:span></text:span><text:span text:style-name="T1"> enseña las primeras 5 filas.</text:span></text:p>
          </text:list-item>
          <text:list-item>
            <text:p text:style-name="P27">Sirve para comprobar que el archivo cargó bien.</text:p>
          </text:list-item>
        </text:list>
        <text:p text:style-name="P4">[first rows = primeras filas] [preview = vista previa]</text:p>
        <text:h text:style-name="P28" text:outline-level="3">Qué significa cada columna</text:h>
        <text:list text:style-name="L12">
          <text:list-item>
            <text:p text:style-name="P29"><text:span text:style-name="Source_20_Text"><text:span text:style-name="T3">Open</text:span></text:span><text:span text:style-name="T1">: precio de apertura</text:span></text:p>
          </text:list-item>
          <text:list-item>
            <text:p text:style-name="P29"><text:span text:style-name="Source_20_Text"><text:span text:style-name="T3">High</text:span></text:span><text:span text:style-name="T1">: precio máximo del día</text:span></text:p>
          </text:list-item>
          <text:list-item>
            <text:p text:style-name="P29"><text:span text:style-name="Source_20_Text"><text:span text:style-name="T3">Low</text:span></text:span><text:span text:style-name="T1">: precio mínimo del día</text:span></text:p>
          </text:list-item>
          <text:list-item>
            <text:p text:style-name="P29"><text:span text:style-name="Source_20_Text"><text:span text:style-name="T3">Close</text:span></text:span><text:span text:style-name="T1">: precio de cierre</text:span></text:p>
          </text:list-item>
          <text:list-item>
            <text:p text:style-name="P29"><text:span text:style-name="Source_20_Text"><text:span text:style-name="T3">Adj Close</text:span></text:span><text:span text:style-name="T1">: cierre ajustado</text:span></text:p>
          </text:list-item>
          <text:list-item>
            <text:p text:style-name="P29"><text:span text:style-name="Source_20_Text"><text:span text:style-name="T3">Volume</text:span></text:span><text:span text:style-name="T1">: volumen negociado, número de acciones movidas</text:span></text:p>
          </text:list-item>
        </text:list>
        <text:p text:style-name="P4">[open = apertura] [high = máximo] [low = mínimo] [close = cierre] [volume = volumen]</text:p>
        <text:p text:style-name="P9"><text:soft-page-break/><text:span text:style-name="Strong_20_Emphasis"><text:span text:style-name="T2">English summary:</text:span></text:span><text:span text:style-name="T1"> This block loads Microsoft stock data and shows the first 5 rows.<text:line-break/>[stock data = datos bursátiles] [first 5 rows = primeras 5 filas]</text:span></text:p>
        <text:h text:style-name="P28" text:outline-level="3">Forma moderna de cargarlo hoy</text:h>
        <text:section text:style-name="Sect3" text:name="Section2">
          <text:p text:style-name="P14"><text:bookmark text:name="code-block-viewer Copy 1"/><text:span text:style-name="T4">ms</text:span><text:span text:style-name="T6"> </text:span><text:span text:style-name="T5">=</text:span><text:span text:style-name="T6"> </text:span><text:span text:style-name="T4">pd</text:span><text:span text:style-name="T5">.</text:span><text:span text:style-name="T6">read_csv(</text:span><text:span text:style-name="T7">'../data/microsoft.csv'</text:span><text:span text:style-name="T6">, </text:span><text:span text:style-name="T4">index_col</text:span><text:span text:style-name="T5">=</text:span><text:span text:style-name="T7">'Date'</text:span><text:span text:style-name="T6">, </text:span><text:span text:style-name="T4">parse_dates</text:span><text:span text:style-name="T5">=</text:span><text:span text:style-name="T6">[</text:span><text:span text:style-name="T7">'Date'</text:span><text:span text:style-name="T6">])</text:span></text:p>
        </text:section>
        <text:list text:style-name="L13">
          <text:list-item>
            <text:p text:style-name="P30"><text:span text:style-name="Source_20_Text"><text:span text:style-name="T8">index_col='Date'</text:span></text:span><text:span text:style-name="T9"> pone la fecha como índice.</text:span></text:p>
          </text:list-item>
          <text:list-item>
            <text:p text:style-name="P30"><text:span text:style-name="Source_20_Text"><text:span text:style-name="T3">parse_dates=['Date']</text:span></text:span><text:span text:style-name="T1"> convierte el texto en fecha real.</text:span></text:p>
          </text:list-item>
        </text:list>
        <text:p text:style-name="P4">[index = índice] [parse dates = convertir fechas]</text:p>
        <text:p text:style-name="P12"/>
        <text:h text:style-name="P13" text:outline-level="2">3) “Distribution of Log Return”</text:h>
        <text:p text:style-name="P4">Ese texto significa:</text:p>
        <text:list text:style-name="L14">
          <text:list-item>
            <text:p text:style-name="P31"><text:span text:style-name="Strong_20_Emphasis"><text:span text:style-name="T2">Distribution</text:span></text:span><text:span text:style-name="T1"> = distribución</text:span></text:p>
          </text:list-item>
          <text:list-item>
            <text:p text:style-name="P31"><text:span text:style-name="Strong_20_Emphasis"><text:span text:style-name="T2">Log return</text:span></text:span><text:span text:style-name="T1"> = retorno logarítmico</text:span></text:p>
          </text:list-item>
          <text:list-item>
            <text:p text:style-name="P31"><text:span text:style-name="Strong_20_Emphasis"><text:span text:style-name="T2">Stock return</text:span></text:span><text:span text:style-name="T1"> = retorno de la acción</text:span></text:p>
          </text:list-item>
        </text:list>
        <text:p text:style-name="P4">La idea es:<text:line-break/>“No quiero mirar solo precios; quiero mirar cómo cambian los precios de un día a otro”.</text:p>
        <text:p text:style-name="P9"><text:span text:style-name="Strong_20_Emphasis"><text:span text:style-name="T2">English summary:</text:span></text:span><text:span text:style-name="T1"> Now we stop looking at prices and start looking at returns.<text:line-break/>[return = retorno] [price change = cambio de precio]</text:span></text:p>
        <text:p text:style-name="P12"/>
        <text:h text:style-name="P13" text:outline-level="2">4) Calcular el log return diario</text:h>
        <text:section text:style-name="Sect3" text:name="Section3">
          <text:p text:style-name="P14"><text:bookmark text:name="code-block-viewer Copy 2"/><text:span text:style-name="T4">ms</text:span><text:span text:style-name="T6">[</text:span><text:span text:style-name="T7">'LogReturn'</text:span><text:span text:style-name="T6">] </text:span><text:span text:style-name="T5">=</text:span><text:span text:style-name="T6"> </text:span><text:span text:style-name="T4">np</text:span><text:span text:style-name="T5">.</text:span><text:span text:style-name="T6">log(</text:span><text:span text:style-name="T4">ms</text:span><text:span text:style-name="T6">[</text:span><text:span text:style-name="T7">'Close'</text:span><text:span text:style-name="T6">])</text:span><text:span text:style-name="T5">.</text:span><text:span text:style-name="T6">shift(</text:span><text:span text:style-name="T5">-</text:span><text:span text:style-name="T10">1</text:span><text:span text:style-name="T6">) </text:span><text:span text:style-name="T5">-</text:span><text:span text:style-name="T6"> </text:span><text:span text:style-name="T4">np</text:span><text:span text:style-name="T5">.</text:span><text:span text:style-name="T6">log(</text:span><text:span text:style-name="T4">ms</text:span><text:span text:style-name="T6">[</text:span><text:span text:style-name="T7">'Close'</text:span><text:span text:style-name="T6">])</text:span></text:p>
        </text:section>
        <text:p text:style-name="P32">Esta es la línea más importante del bloque. La parto en trozos.</text:p>
        <text:h text:style-name="P28" text:outline-level="3">Parte 1</text:h>
        <text:p text:style-name="P9"><text:span text:style-name="Source_20_Text"><text:span text:style-name="T3">ms['Close']</text:span></text:span></text:p>
        <text:list text:style-name="L15">
          <text:list-item>
            <text:p text:style-name="P33"><text:span text:style-name="T1">Coge la columna </text:span><text:span text:style-name="Source_20_Text"><text:span text:style-name="T3">Close</text:span></text:span><text:span text:style-name="T1">.</text:span></text:p>
          </text:list-item>
        </text:list>
        <text:p text:style-name="P4">[select a column = seleccionar una columna]</text:p>
        <text:h text:style-name="P28" text:outline-level="3"><text:soft-page-break/>Parte 2</text:h>
        <text:p text:style-name="P9"><text:span text:style-name="Source_20_Text"><text:span text:style-name="T3">np.log(ms['Close'])</text:span></text:span></text:p>
        <text:list text:style-name="L16">
          <text:list-item>
            <text:p text:style-name="P34">Hace el logaritmo natural de cada precio de cierre.</text:p>
          </text:list-item>
        </text:list>
        <text:p text:style-name="P4">Por ejemplo, si el cierre es 100:</text:p>
        <text:list text:style-name="L17">
          <text:list-item>
            <text:p text:style-name="P35"><text:span text:style-name="Source_20_Text"><text:span text:style-name="T3">np.log(100)</text:span></text:span><text:span text:style-name="T1"> ≈ 4.6052</text:span></text:p>
          </text:list-item>
        </text:list>
        <text:p text:style-name="P9"><text:span text:style-name="T1">No te importa ese número por sí solo.<text:line-break/>Lo importante es la </text:span><text:span text:style-name="Strong_20_Emphasis"><text:span text:style-name="T2">diferencia entre logs</text:span></text:span><text:span text:style-name="T1">.</text:span></text:p>
        <text:p text:style-name="P7">[natural logarithm = logaritmo natural] [difference = diferencia]</text:p>
        <text:h text:style-name="P28" text:outline-level="3">Parte 3</text:h>
        <text:p text:style-name="P9"><text:span text:style-name="Source_20_Text"><text:span text:style-name="T3">np.log(ms['Close']).shift(-1)</text:span></text:span></text:p>
        <text:list text:style-name="L18">
          <text:list-item>
            <text:p text:style-name="P36"><text:span text:style-name="Source_20_Text"><text:span text:style-name="T3">shift(-1)</text:span></text:span><text:span text:style-name="T1"> mueve la serie </text:span><text:span text:style-name="Strong_20_Emphasis"><text:span text:style-name="T2">una fila hacia arriba</text:span></text:span><text:span text:style-name="T1">.</text:span></text:p>
          </text:list-item>
          <text:list-item>
            <text:p text:style-name="P37">O sea: en la fila de hoy, colocas el valor de mañana.</text:p>
          </text:list-item>
        </text:list>
        <text:p text:style-name="P4">Ejemplo mental: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38">Día</text:p>
              </table:table-cell>
              <table:table-cell table:style-name="Table1.A1" office:value-type="string">
                <text:p text:style-name="P39">Close</text:p>
              </table:table-cell>
            </table:table-row>
          </table:table-header-rows>
          <table:table-row>
            <table:table-cell table:style-name="Table1.A2" office:value-type="string">
              <text:p text:style-name="P40">Lunes</text:p>
            </table:table-cell>
            <table:table-cell table:style-name="Table1.A2" office:value-type="string">
              <text:p text:style-name="P41">100</text:p>
            </table:table-cell>
          </table:table-row>
          <table:table-row>
            <table:table-cell table:style-name="Table1.A2" office:value-type="string">
              <text:p text:style-name="P40">Martes</text:p>
            </table:table-cell>
            <table:table-cell table:style-name="Table1.A2" office:value-type="string">
              <text:p text:style-name="P41">102</text:p>
            </table:table-cell>
          </table:table-row>
          <table:table-row>
            <table:table-cell table:style-name="Table1.A4" office:value-type="string">
              <text:p text:style-name="P40">Miércoles</text:p>
            </table:table-cell>
            <table:table-cell table:style-name="Table1.A4" office:value-type="string">
              <text:p text:style-name="P42">101</text:p>
            </table:table-cell>
          </table:table-row>
        </table:table>
        <text:p text:style-name="P43"><text:span text:style-name="T1">Después de </text:span><text:span text:style-name="Source_20_Text"><text:span text:style-name="T3">shift(-1)</text:span></text:span><text:span text:style-name="T1">:</text:span></text:p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P38">Día</text:p>
              </table:table-cell>
              <table:table-cell table:style-name="Table2.A1" office:value-type="string">
                <text:p text:style-name="P39">Close shifted(-1)</text:p>
              </table:table-cell>
            </table:table-row>
          </table:table-header-rows>
          <table:table-row>
            <table:table-cell table:style-name="Table2.A2" office:value-type="string">
              <text:p text:style-name="P40">Lunes</text:p>
            </table:table-cell>
            <table:table-cell table:style-name="Table2.A2" office:value-type="string">
              <text:p text:style-name="P41">102</text:p>
            </table:table-cell>
          </table:table-row>
          <table:table-row>
            <table:table-cell table:style-name="Table2.A2" office:value-type="string">
              <text:p text:style-name="P40">Martes</text:p>
            </table:table-cell>
            <table:table-cell table:style-name="Table2.A2" office:value-type="string">
              <text:p text:style-name="P41">101</text:p>
            </table:table-cell>
          </table:table-row>
          <table:table-row>
            <table:table-cell table:style-name="Table2.A4" office:value-type="string">
              <text:p text:style-name="P40">Miércoles</text:p>
            </table:table-cell>
            <table:table-cell table:style-name="Table2.A4" office:value-type="string">
              <text:p text:style-name="P42">NaN</text:p>
            </table:table-cell>
          </table:table-row>
        </table:table>
        <text:p text:style-name="P44">[shift = desplazar] [next day = día siguiente] [NaN = valor vacío]</text:p>
        <text:h text:style-name="P45" text:outline-level="3">Parte 4</text:h>
        <text:p text:style-name="P43"><text:span text:style-name="Source_20_Text"><text:span text:style-name="T3">np.log(ms['Close']).shift(-1) - np.log(ms['Close'])</text:span></text:span></text:p>
        <text:p text:style-name="P46"><text:soft-page-break/>Esto hace:</text:p>
        <text:p text:style-name="P43"><text:span text:style-name="Strong_20_Emphasis"><text:span text:style-name="T2">log(cierre de mañana) - log(cierre de hoy)</text:span></text:span></text:p>
        <text:p text:style-name="P46">Y por propiedad matemática eso es igual a:</text:p>
        <text:p text:style-name="P43"><text:span text:style-name="Strong_20_Emphasis"><text:span text:style-name="T2">log(cierre de mañana / cierre de hoy)</text:span></text:span></text:p>
        <text:p text:style-name="P43"><text:span text:style-name="T1">Eso es el </text:span><text:span text:style-name="Strong_20_Emphasis"><text:span text:style-name="T2">log return diario</text:span></text:span><text:span text:style-name="T1">.</text:span></text:p>
        <text:h text:style-name="P45" text:outline-level="3">Fórmula mental</text:h>
        <text:p text:style-name="P47"><draw:frame draw:style-name="fr2" draw:name="Frame4" text:anchor-type="char" svg:width="0.041cm" draw:z-index="6"><draw:text-box fo:min-height="0.041cm"><text:p text:style-name="P5">LogReturnt=ln⁡(Pt+1Pt)</text:p></draw:text-box></draw:frame>LogReturn<text:span text:style-name="T11">t</text:span>​=ln<text:span text:style-name="T12">(</text:span><text:span text:style-name="T11">Pt</text:span>​<text:span text:style-name="T11">Pt</text:span>+1​​<text:span text:style-name="T12">)</text:span></text:p>
        <text:p text:style-name="P44">Interpretación:</text:p>
        <text:list text:style-name="L19">
          <text:list-item>
            <text:p text:style-name="P48">si sale positivo, el precio subió</text:p>
          </text:list-item>
          <text:list-item>
            <text:p text:style-name="P48">si sale negativo, el precio bajó</text:p>
          </text:list-item>
          <text:list-item>
            <text:p text:style-name="P48">si sale cerca de 0, apenas cambió</text:p>
          </text:list-item>
        </text:list>
        <text:h text:style-name="P45" text:outline-level="3">Ejemplo simple</text:h>
        <text:p text:style-name="P44">Si hoy vale 100 y mañana 101:</text:p>
        <text:p text:style-name="P49"><draw:frame draw:style-name="fr2" draw:name="Frame5" text:anchor-type="char" svg:width="0.041cm" draw:z-index="3"><draw:text-box fo:min-height="0.041cm"><text:p text:style-name="P5">ln⁡(101/100)=ln⁡(1.01)≈0.00995</text:p></draw:text-box></draw:frame>ln(101/100)=ln(1.01)≈0.00995</text:p>
        <text:p text:style-name="P44">Eso es casi un 1%, pero en formato logarítmico.</text:p>
        <text:h text:style-name="P45" text:outline-level="3">Muy importante</text:h>
        <text:p text:style-name="P43"><text:span text:style-name="T1">La última fila queda </text:span><text:span text:style-name="Source_20_Text"><text:span text:style-name="T3">NaN</text:span></text:span><text:span text:style-name="T1">, porque no hay “mañana” para el último dato.</text:span></text:p>
        <text:p text:style-name="P43"><text:span text:style-name="Strong_20_Emphasis"><text:span text:style-name="T2">English summary:</text:span></text:span><text:span text:style-name="T1"> This line computes the daily log return: tomorrow’s log price minus today’s log price.<text:line-break/>[log return = retorno logarítmico] [positive = positivo] [negative = negativo]</text:span></text:p>
        <text:p text:style-name="P50"/>
        <text:h text:style-name="P51" text:outline-level="2">5) Ajustar una normal y dibujar histograma</text:h>
        <text:section text:style-name="Sect3" text:name="Section4">
          <text:p text:style-name="P52"><text:bookmark text:name="code-block-viewer Copy 3"/><text:span text:style-name="T5">from</text:span><text:span text:style-name="T6"> </text:span><text:span text:style-name="T4">scipy</text:span><text:span text:style-name="T5">.</text:span><text:span text:style-name="T4">stats</text:span><text:span text:style-name="T6"> </text:span><text:span text:style-name="T5">import</text:span><text:span text:style-name="T6"> </text:span><text:span text:style-name="T4">norm</text:span></text:p>
          <text:p text:style-name="P53"><text:soft-page-break/><text:span text:style-name="T4">mu</text:span><text:span text:style-name="T6"> </text:span><text:span text:style-name="T5">=</text:span><text:span text:style-name="T6"> 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mean()</text:span></text:p>
          <text:p text:style-name="P53"><text:span text:style-name="T4">sigma</text:span><text:span text:style-name="T6"> </text:span><text:span text:style-name="T5">=</text:span><text:span text:style-name="T6"> 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std(</text:span><text:span text:style-name="T4">ddof</text:span><text:span text:style-name="T5">=</text:span><text:span text:style-name="T10">1</text:span><text:span text:style-name="T6">)</text:span></text:p>
          <text:p text:style-name="P53"><text:span text:style-name="T4">density</text:span><text:span text:style-name="T6"> </text:span><text:span text:style-name="T5">=</text:span><text:span text:style-name="T6"> </text:span><text:span text:style-name="T4">pd</text:span><text:span text:style-name="T5">.</text:span><text:span text:style-name="T6">DataFrame()</text:span></text:p>
          <text:p text:style-name="P53"><text:span text:style-name="T4">density</text:span><text:span text:style-name="T6">[</text:span><text:span text:style-name="T7">'x'</text:span><text:span text:style-name="T6">] </text:span><text:span text:style-name="T5">=</text:span><text:span text:style-name="T6"> </text:span><text:span text:style-name="T4">np</text:span><text:span text:style-name="T5">.</text:span><text:span text:style-name="T6">arange(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min()</text:span><text:span text:style-name="T5">-</text:span><text:span text:style-name="T10">0.01</text:span><text:span text:style-name="T6">, 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max()</text:span><text:span text:style-name="T5">+</text:span><text:span text:style-name="T10">0.01</text:span><text:span text:style-name="T6">, </text:span><text:span text:style-name="T10">0.001</text:span><text:span text:style-name="T6">)</text:span></text:p>
          <text:p text:style-name="P53"><text:span text:style-name="T4">density</text:span><text:span text:style-name="T6">[</text:span><text:span text:style-name="T7">'pdf'</text:span><text:span text:style-name="T6">] </text:span><text:span text:style-name="T5">=</text:span><text:span text:style-name="T6"> </text:span><text:span text:style-name="T4">norm</text:span><text:span text:style-name="T5">.</text:span><text:span text:style-name="T6">pdf(</text:span><text:span text:style-name="T4">density</text:span><text:span text:style-name="T6">[</text:span><text:span text:style-name="T7">'x'</text:span><text:span text:style-name="T6">]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ms</text:span><text:span text:style-name="T6">[</text:span><text:span text:style-name="T7">'LogReturn'</text:span><text:span text:style-name="T6">]</text:span><text:span text:style-name="T5">.</text:span><text:span text:style-name="T6">hist(</text:span><text:span text:style-name="T4">bins</text:span><text:span text:style-name="T5">=</text:span><text:span text:style-name="T10">50</text:span><text:span text:style-name="T6">, </text:span><text:span text:style-name="T4">figsize</text:span><text:span text:style-name="T5">=</text:span><text:span text:style-name="T6">(</text:span><text:span text:style-name="T10">15</text:span><text:span text:style-name="T6">, </text:span><text:span text:style-name="T10">8</text:span><text:span text:style-name="T6">))</text:span></text:p>
          <text:p text:style-name="P53"><text:span text:style-name="T4">plt</text:span><text:span text:style-name="T5">.</text:span><text:span text:style-name="T6">plot(</text:span><text:span text:style-name="T4">density</text:span><text:span text:style-name="T6">[</text:span><text:span text:style-name="T7">'x'</text:span><text:span text:style-name="T6">], </text:span><text:span text:style-name="T4">density</text:span><text:span text:style-name="T6">[</text:span><text:span text:style-name="T7">'pdf'</text:span><text:span text:style-name="T6">], </text:span><text:span text:style-name="T4">color</text:span><text:span text:style-name="T5">=</text:span><text:span text:style-name="T7">'red'</text:span><text:span text:style-name="T6">)</text:span></text:p>
          <text:p text:style-name="P53"><text:span text:style-name="T4">plt</text:span><text:span text:style-name="T5">.</text:span><text:span text:style-name="T6">show()</text:span></text:p>
        </text:section>
        <text:h text:style-name="P54" text:outline-level="3"><text:span text:style-name="Source_20_Text"><text:span text:style-name="T13">from scipy.stats import norm</text:span></text:span></text:h>
        <text:list text:style-name="L20">
          <text:list-item>
            <text:p text:style-name="P55">Importa la distribución normal.</text:p>
          </text:list-item>
          <text:list-item>
            <text:p text:style-name="P56"><text:span text:style-name="Source_20_Text"><text:span text:style-name="T3">norm</text:span></text:span><text:span text:style-name="T1"> representa la </text:span><text:span text:style-name="Strong_20_Emphasis"><text:span text:style-name="T2">Normal distribution</text:span></text:span><text:span text:style-name="T1"> o </text:span><text:span text:style-name="Strong_20_Emphasis"><text:span text:style-name="T2">Gaussian distribution</text:span></text:span><text:span text:style-name="T1">.</text:span></text:p>
          </text:list-item>
        </text:list>
        <text:p text:style-name="P44">[normal distribution = distribución normal] [Gaussian = gaussiana]</text:p>
        <text:h text:style-name="P54" text:outline-level="3"><text:span text:style-name="Source_20_Text"><text:span text:style-name="T14">mu = ms['LogReturn'].mean()</text:span></text:span></text:h>
        <text:list text:style-name="L21">
          <text:list-item>
            <text:p text:style-name="P57"><text:span text:style-name="Source_20_Text"><text:span text:style-name="T3">mean()</text:span></text:span><text:span text:style-name="T1"> = media.</text:span></text:p>
          </text:list-item>
          <text:list-item>
            <text:p text:style-name="P57"><text:span text:style-name="Source_20_Text"><text:span text:style-name="T3">mu</text:span></text:span><text:span text:style-name="T1"> es la letra griega μ.</text:span></text:p>
          </text:list-item>
          <text:list-item>
            <text:p text:style-name="P57"><text:span text:style-name="T1">Aquí representa la </text:span><text:span text:style-name="Strong_20_Emphasis"><text:span text:style-name="T2">media de los log returns diarios</text:span></text:span><text:span text:style-name="T1">.</text:span></text:p>
          </text:list-item>
        </text:list>
        <text:p text:style-name="P44">[mean = media] [average = media]</text:p>
        <text:h text:style-name="P54" text:outline-level="3"><text:span text:style-name="Source_20_Text"><text:span text:style-name="T14">sigma = ms['LogReturn'].std(ddof=1)</text:span></text:span></text:h>
        <text:list text:style-name="L22">
          <text:list-item>
            <text:p text:style-name="P58"><text:span text:style-name="Source_20_Text"><text:span text:style-name="T3">std()</text:span></text:span><text:span text:style-name="T1"> = desviación típica o desviación estándar.</text:span></text:p>
          </text:list-item>
          <text:list-item>
            <text:p text:style-name="P58"><text:span text:style-name="Source_20_Text"><text:span text:style-name="T3">sigma</text:span></text:span><text:span text:style-name="T1"> es la letra griega σ.</text:span></text:p>
          </text:list-item>
          <text:list-item>
            <text:p text:style-name="P59">Mide cuánto se dispersan los retornos alrededor de la media.</text:p>
          </text:list-item>
        </text:list>
        <text:p text:style-name="P44">[standard deviation = desviación típica] [dispersion = dispersión]</text:p>
        <text:h text:style-name="P54" text:outline-level="3"><text:span text:style-name="T15">¿Qué es </text:span><text:span text:style-name="Source_20_Text"><text:span text:style-name="T14">ddof=1</text:span></text:span><text:span text:style-name="T15">?</text:span></text:h>
        <text:list text:style-name="L23">
          <text:list-item>
            <text:p text:style-name="P60">Es el ajuste muestral.</text:p>
          </text:list-item>
          <text:list-item>
            <text:p text:style-name="P61"><text:span text:style-name="T1">Hace que la desviación se calcule con </text:span><text:span text:style-name="Source_20_Text"><text:span text:style-name="T3">n-1</text:span></text:span><text:span text:style-name="T1">, no con </text:span><text:span text:style-name="Source_20_Text"><text:span text:style-name="T3">n</text:span></text:span><text:span text:style-name="T1">.</text:span></text:p>
          </text:list-item>
          <text:list-item>
            <text:p text:style-name="P60">En datos reales históricos, esto suele ser lo correcto como estimación.</text:p>
          </text:list-item>
        </text:list>
        <text:p text:style-name="P44">[sample = muestra] [population = población]</text:p>
        <text:h text:style-name="P54" text:outline-level="3"><text:soft-page-break/><text:span text:style-name="Source_20_Text"><text:span text:style-name="T14">density = pd.DataFrame()</text:span></text:span></text:h>
        <text:list text:style-name="L24">
          <text:list-item>
            <text:p text:style-name="P62"><text:span text:style-name="T1">Crea una tabla vacía llamada </text:span><text:span text:style-name="Source_20_Text"><text:span text:style-name="T3">density</text:span></text:span><text:span text:style-name="T1">.</text:span></text:p>
          </text:list-item>
        </text:list>
        <text:h text:style-name="P54" text:outline-level="3"><text:span text:style-name="Source_20_Text"><text:span text:style-name="T14">density['x'] = np.arange(...)</text:span></text:span></text:h>
        <text:list text:style-name="L25">
          <text:list-item>
            <text:p text:style-name="P63">Genera muchos puntos en el eje X.</text:p>
          </text:list-item>
          <text:list-item>
            <text:p text:style-name="P63">Desde un poco menos que el mínimo retorno observado</text:p>
          </text:list-item>
          <text:list-item>
            <text:p text:style-name="P63">hasta un poco más que el máximo</text:p>
          </text:list-item>
          <text:list-item>
            <text:p text:style-name="P63">saltando de 0.001 en 0.001</text:p>
          </text:list-item>
        </text:list>
        <text:p text:style-name="P44">[range = rango] [step = paso]</text:p>
        <text:h text:style-name="P54" text:outline-level="3"><text:span text:style-name="Source_20_Text"><text:span text:style-name="T14">density['pdf'] = norm.pdf(density['x'], mu, sigma)</text:span></text:span></text:h>
        <text:list text:style-name="L26">
          <text:list-item>
            <text:p text:style-name="P64"><text:span text:style-name="Source_20_Text"><text:span text:style-name="T3">pdf</text:span></text:span><text:span text:style-name="T1"> = </text:span><text:span text:style-name="Strong_20_Emphasis"><text:span text:style-name="T2">Probability Density Function</text:span></text:span><text:span text:style-name="T1"> = función de densidad.</text:span></text:p>
          </text:list-item>
          <text:list-item>
            <text:p text:style-name="P65">No es probabilidad directa.</text:p>
          </text:list-item>
          <text:list-item>
            <text:p text:style-name="P64"><text:span text:style-name="T1">Es la altura de la curva normal en cada punto </text:span><text:span text:style-name="Source_20_Text"><text:span text:style-name="T3">x</text:span></text:span><text:span text:style-name="T1">.</text:span></text:p>
          </text:list-item>
        </text:list>
        <text:p text:style-name="P44">[density = densidad] [pdf = función de densidad]</text:p>
        <text:h text:style-name="P54" text:outline-level="3"><text:span text:style-name="Source_20_Text"><text:span text:style-name="T14">ms['LogReturn'].hist(bins=50, figsize=(15, 8))</text:span></text:span></text:h>
        <text:list text:style-name="L27">
          <text:list-item>
            <text:p text:style-name="P66">Dibuja un histograma de los log returns.</text:p>
          </text:list-item>
          <text:list-item>
            <text:p text:style-name="P67"><text:span text:style-name="Source_20_Text"><text:span text:style-name="T3">bins=50</text:span></text:span><text:span text:style-name="T1"> divide el rango en 50 cajitas.</text:span></text:p>
          </text:list-item>
          <text:list-item>
            <text:p text:style-name="P67"><text:span text:style-name="Source_20_Text"><text:span text:style-name="T3">figsize=(15,8)</text:span></text:span><text:span text:style-name="T1"> pone tamaño grande al gráfico.</text:span></text:p>
          </text:list-item>
        </text:list>
        <text:p text:style-name="P44">[histogram = histograma] [bins = intervalos]</text:p>
        <text:h text:style-name="P54" text:outline-level="3"><text:span text:style-name="Source_20_Text"><text:span text:style-name="T14">plt.plot(density['x'], density['pdf'], color='red')</text:span></text:span></text:h>
        <text:list text:style-name="L28">
          <text:list-item>
            <text:p text:style-name="P68">Dibuja la curva normal teórica en rojo encima.</text:p>
          </text:list-item>
        </text:list>
        <text:h text:style-name="P54" text:outline-level="3"><text:span text:style-name="Source_20_Text"><text:span text:style-name="T14">plt.show()</text:span></text:span></text:h>
        <text:list text:style-name="L29">
          <text:list-item>
            <text:p text:style-name="P69">Muestra el gráfico.</text:p>
          </text:list-item>
        </text:list>
        <text:p text:style-name="P50"/>
        <text:h text:style-name="P70" text:outline-level="3"><text:soft-page-break/>Crítica importante aquí</text:h>
        <text:p text:style-name="P43"><text:span text:style-name="T1">Tal como está, </text:span><text:span text:style-name="Strong_20_Emphasis"><text:span text:style-name="T2">esto es técnicamente mejorable</text:span></text:span><text:span text:style-name="T1">.</text:span></text:p>
        <text:p text:style-name="P43"><text:span text:style-name="T1">¿Por qué?<text:line-break/>Porque el histograma suele mostrarse en </text:span><text:span text:style-name="Strong_20_Emphasis"><text:span text:style-name="T2">conteos</text:span></text:span><text:span text:style-name="T1"> y la </text:span><text:span text:style-name="Source_20_Text"><text:span text:style-name="T3">pdf</text:span></text:span><text:span text:style-name="T1"> está en </text:span><text:span text:style-name="Strong_20_Emphasis"><text:span text:style-name="T2">densidad</text:span></text:span><text:span text:style-name="T1">. Para compararlos bien, deberías normalizar el histograma:</text:span></text:p>
        <text:section text:style-name="Sect3" text:name="Section5">
          <text:p text:style-name="P52"><text:bookmark text:name="code-block-viewer Copy 4"/><text:span text:style-name="T4">ms</text:span><text:span text:style-name="T6">[</text:span><text:span text:style-name="T7">'LogReturn'</text:span><text:span text:style-name="T6">]</text:span><text:span text:style-name="T5">.</text:span><text:span text:style-name="T6">hist(</text:span><text:span text:style-name="T4">bins</text:span><text:span text:style-name="T5">=</text:span><text:span text:style-name="T10">50</text:span><text:span text:style-name="T6">, </text:span><text:span text:style-name="T4">density</text:span><text:span text:style-name="T5">=</text:span><text:span text:style-name="T10">True</text:span><text:span text:style-name="T6">, </text:span><text:span text:style-name="T4">figsize</text:span><text:span text:style-name="T5">=</text:span><text:span text:style-name="T6">(</text:span><text:span text:style-name="T10">15</text:span><text:span text:style-name="T6">, </text:span><text:span text:style-name="T10">8</text:span><text:span text:style-name="T6">))</text:span></text:p>
        </text:section>
        <text:p text:style-name="P71">Eso sí sería una comparación limpia.</text:p>
        <text:p text:style-name="P43"><text:span text:style-name="Strong_20_Emphasis"><text:span text:style-name="T2">English summary:</text:span></text:span><text:span text:style-name="T1"> This block estimates a normal distribution from the data and compares it with the histogram of returns.<text:line-break/>[pdf = probability density function] [histogram = histograma] [fit a distribution = ajustar una distribución]</text:span></text:p>
        <text:p text:style-name="P50"/>
        <text:h text:style-name="P51" text:outline-level="2">6) Probabilidad de caer más de un porcentaje en un día</text:h>
        <text:section text:style-name="Sect3" text:name="Section6">
          <text:p text:style-name="P52"><text:bookmark text:name="code-block-viewer Copy 5"/><text:span text:style-name="T4">prob_return1</text:span><text:span text:style-name="T6"> </text:span><text:span text:style-name="T5">=</text:span><text:span text:style-name="T6"> </text:span><text:span text:style-name="T4">norm</text:span><text:span text:style-name="T5">.</text:span><text:span text:style-name="T6">cdf(</text:span><text:span text:style-name="T5">-</text:span><text:span text:style-name="T10">0.05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print</text:span><text:span text:style-name="T6">(</text:span><text:span text:style-name="T7">'The Probability is '</text:span><text:span text:style-name="T6">, </text:span><text:span text:style-name="T4">prob_return1</text:span><text:span text:style-name="T6">)</text:span></text:p>
        </text:section>
        <text:h text:style-name="P54" text:outline-level="3"><text:span text:style-name="Source_20_Text"><text:span text:style-name="T13">norm.cdf(...)</text:span></text:span></text:h>
        <text:list text:style-name="L30">
          <text:list-item>
            <text:p text:style-name="P72"><text:span text:style-name="Source_20_Text"><text:span text:style-name="T3">cdf</text:span></text:span><text:span text:style-name="T1"> = </text:span><text:span text:style-name="Strong_20_Emphasis"><text:span text:style-name="T2">Cumulative Distribution Function</text:span></text:span></text:p>
          </text:list-item>
          <text:list-item>
            <text:p text:style-name="P73">significa probabilidad acumulada</text:p>
          </text:list-item>
          <text:list-item>
            <text:p text:style-name="P72"><text:span text:style-name="T1">te da: </text:span><text:span text:style-name="Strong_20_Emphasis"><text:span text:style-name="T2">P(X &lt;= valor)</text:span></text:span></text:p>
          </text:list-item>
        </text:list>
        <text:p text:style-name="P44">[cdf = función de distribución acumulada] [cumulative = acumulada]</text:p>
        <text:h text:style-name="P54" text:outline-level="3"><text:span text:style-name="Source_20_Text"><text:span text:style-name="T14">norm.cdf(-0.05, mu, sigma)</text:span></text:span></text:h>
        <text:p text:style-name="P44">Esto pregunta:</text:p>
        <text:p text:style-name="P43"><text:span text:style-name="Strong_20_Emphasis"><text:span text:style-name="T16">“</text:span></text:span><text:span text:style-name="Strong_20_Emphasis"><text:span text:style-name="T2">Si los log returns siguen una normal con media </text:span></text:span><text:span text:style-name="Strong_20_Emphasis"><text:span text:style-name="Source_20_Text"><text:span text:style-name="T3">mu</text:span></text:span></text:span><text:span text:style-name="Strong_20_Emphasis"><text:span text:style-name="T2"> y desviación </text:span></text:span><text:span text:style-name="Strong_20_Emphasis"><text:span text:style-name="Source_20_Text"><text:span text:style-name="T3">sigma</text:span></text:span></text:span><text:span text:style-name="Strong_20_Emphasis"><text:span text:style-name="T2">, cuál es la probabilidad de que el retorno sea menor o igual que -0.05?”</text:span></text:span></text:p>
        <text:p text:style-name="P46">Eso significa aproximadamente:</text:p>
        <text:list text:style-name="L31">
          <text:list-item>
            <text:p text:style-name="P74">caída del 5% o peor en un día</text:p>
          </text:list-item>
        </text:list>
        <text:h text:style-name="P45" text:outline-level="3"><text:soft-page-break/>Ojo: aproximación</text:h>
        <text:p text:style-name="P43"><text:span text:style-name="T1">Como estás usando </text:span><text:span text:style-name="Strong_20_Emphasis"><text:span text:style-name="T2">log return</text:span></text:span><text:span text:style-name="T1">, la versión exacta para “caída del 5% en precio” sería:</text:span></text:p>
        <text:section text:style-name="Sect3" text:name="Section7">
          <text:p text:style-name="P52"><text:bookmark text:name="code-block-viewer Copy 6"/><text:span text:style-name="T4">norm</text:span><text:span text:style-name="T5">.</text:span><text:span text:style-name="T6">cdf(</text:span><text:span text:style-name="T4">np</text:span><text:span text:style-name="T5">.</text:span><text:span text:style-name="T6">log(</text:span><text:span text:style-name="T10">0.95</text:span><text:span text:style-name="T6">), </text:span><text:span text:style-name="T4">mu</text:span><text:span text:style-name="T6">, </text:span><text:span text:style-name="T4">sigma</text:span><text:span text:style-name="T6">)</text:span></text:p>
        </text:section>
        <text:p text:style-name="P71">Porque:</text:p>
        <text:list text:style-name="L32">
          <text:list-item>
            <text:p text:style-name="P75"><draw:frame draw:style-name="fr2" draw:name="Frame6" text:anchor-type="char" svg:width="0.041cm" draw:z-index="4"><draw:text-box fo:min-height="0.041cm"><text:p text:style-name="P5">Pt+1/Pt=0.95</text:p></draw:text-box></draw:frame>si el precio cae 5%, entonces <text:span text:style-name="T17">Pt</text:span><text:span text:style-name="T18">+1​/</text:span><text:span text:style-name="T17">Pt</text:span><text:span text:style-name="T18">​=0.95</text:span></text:p>
          </text:list-item>
          <text:list-item>
            <text:p text:style-name="P76"><text:span text:style-name="T1">y el log return exacto es </text:span><text:span text:style-name="Source_20_Text"><text:span text:style-name="T3">log(0.95)</text:span></text:span></text:p>
          </text:list-item>
        </text:list>
        <text:p text:style-name="P43"><text:span text:style-name="T1">Pero para seguir el curso y obtener el mismo número, usan </text:span><text:span text:style-name="Source_20_Text"><text:span text:style-name="T3">-0.05</text:span></text:span><text:span text:style-name="T1">.</text:span></text:p>
        <text:p text:style-name="P43"><text:span text:style-name="Strong_20_Emphasis"><text:span text:style-name="T2">English summary:</text:span></text:span><text:span text:style-name="T1"> </text:span><text:span text:style-name="Source_20_Text"><text:span text:style-name="T3">cdf</text:span></text:span><text:span text:style-name="T1"> gives the probability that the return is below a threshold.<text:line-break/>[threshold = umbral] [drop = caída]</text:span></text:p>
        <text:h text:style-name="P45" text:outline-level="3">Tu ejercicio del 10%</text:h>
        <text:section text:style-name="Sect3" text:name="Section8">
          <text:p text:style-name="P52"><text:bookmark text:name="code-block-viewer Copy 7"/><text:span text:style-name="T4">prob_return1</text:span><text:span text:style-name="T6"> </text:span><text:span text:style-name="T5">=</text:span><text:span text:style-name="T6"> </text:span><text:span text:style-name="T4">norm</text:span><text:span text:style-name="T5">.</text:span><text:span text:style-name="T6">cdf(</text:span><text:span text:style-name="T5">-</text:span><text:span text:style-name="T10">0.10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print</text:span><text:span text:style-name="T6">(</text:span><text:span text:style-name="T7">'The Probability is '</text:span><text:span text:style-name="T6">, </text:span><text:span text:style-name="T4">prob_return1</text:span><text:span text:style-name="T6">)</text:span></text:p>
        </text:section>
        <text:list text:style-name="L33">
          <text:list-item>
            <text:p text:style-name="P77">Eso es lo que hay que poner para sacar el output esperado del curso.</text:p>
          </text:list-item>
        </text:list>
        <text:p text:style-name="P43"><text:span text:style-name="Strong_20_Emphasis"><text:span text:style-name="T2">English summary:</text:span></text:span><text:span text:style-name="T1"> For the course answer, use </text:span><text:span text:style-name="Source_20_Text"><text:span text:style-name="T3">-0.10</text:span></text:span><text:span text:style-name="T1"> as the threshold.<text:line-break/>[expected output = salida esperada]</text:span></text:p>
        <text:p text:style-name="P50"/>
        <text:h text:style-name="P51" text:outline-level="2">7) Probabilidad de caer más de un porcentaje en un año</text:h>
        <text:section text:style-name="Sect3" text:name="Section9">
          <text:p text:style-name="P52"><text:bookmark text:name="code-block-viewer Copy 8"/><text:span text:style-name="T4">mu220</text:span><text:span text:style-name="T6"> </text:span><text:span text:style-name="T5">=</text:span><text:span text:style-name="T6"> </text:span><text:span text:style-name="T10">220</text:span><text:span text:style-name="T5">*</text:span><text:span text:style-name="T4">mu</text:span></text:p>
          <text:p text:style-name="P53"><text:span text:style-name="T4">sigma220</text:span><text:span text:style-name="T6"> </text:span><text:span text:style-name="T5">=</text:span><text:span text:style-name="T6"> (</text:span><text:span text:style-name="T10">220</text:span><text:span text:style-name="T5">**</text:span><text:span text:style-name="T10">0.5</text:span><text:span text:style-name="T6">) </text:span><text:span text:style-name="T5">*</text:span><text:span text:style-name="T6"> </text:span><text:span text:style-name="T4">sigma</text:span></text:p>
          <text:p text:style-name="P53"><text:span text:style-name="T4">print</text:span><text:span text:style-name="T6">(</text:span><text:span text:style-name="T7">'The probability of dropping over 40% in 220 days is '</text:span><text:span text:style-name="T6">, </text:span><text:span text:style-name="T4">norm</text:span><text:span text:style-name="T5">.</text:span><text:span text:style-name="T6">cdf(</text:span><text:span text:style-name="T5">-</text:span><text:span text:style-name="T10">0.4</text:span><text:span text:style-name="T6">, </text:span><text:span text:style-name="T4">mu220</text:span><text:span text:style-name="T6">, </text:span><text:span text:style-name="T4">sigma220</text:span><text:span text:style-name="T6">))</text:span></text:p>
        </text:section>
        <text:p text:style-name="P43"><text:span text:style-name="T9">Aquí el curso asume aproximadamente </text:span><text:span text:style-name="Strong_20_Emphasis"><text:span text:style-name="T19">220 días de trading</text:span></text:span><text:span text:style-name="T9"> en un año.</text:span></text:p>
        <text:p text:style-name="P46">[trading days = días de mercado]</text:p>
        <text:h text:style-name="P54" text:outline-level="3"><text:span text:style-name="Source_20_Text"><text:span text:style-name="T14">mu220 = 220*mu</text:span></text:span></text:h>
        <text:list text:style-name="L34">
          <text:list-item>
            <text:p text:style-name="P78">Si sumas 220 retornos diarios, la media total esperada es 220 veces la media diaria.</text:p>
          </text:list-item>
        </text:list>
        <text:h text:style-name="P54" text:outline-level="3"><text:span text:style-name="Source_20_Text"><text:span text:style-name="T14">sigma220 = (220**0.5) * sigma</text:span></text:span></text:h>
        <text:list text:style-name="L35">
          <text:list-item>
            <text:p text:style-name="P79">La desviación típica de la suma no crece linealmente.</text:p>
          </text:list-item>
          <text:list-item>
            <text:p text:style-name="P79"><text:soft-page-break/>Crece con la raíz cuadrada del tiempo:</text:p>
            <text:list>
              <text:list-item>
                <text:p text:style-name="P80"><text:span text:style-name="Source_20_Text"><text:span text:style-name="T3">sqrt(220) * sigma</text:span></text:span></text:p>
              </text:list-item>
            </text:list>
          </text:list-item>
        </text:list>
        <text:p text:style-name="P44">Esto sale de una idea clave:</text:p>
        <text:list text:style-name="L36">
          <text:list-item>
            <text:p text:style-name="P81"><text:span text:style-name="T1">las </text:span><text:span text:style-name="Strong_20_Emphasis"><text:span text:style-name="T2">varianzas</text:span></text:span><text:span text:style-name="T1"> suman</text:span></text:p>
          </text:list-item>
          <text:list-item>
            <text:p text:style-name="P82">la desviación típica es la raíz de la varianza</text:p>
          </text:list-item>
        </text:list>
        <text:p text:style-name="P44">[variance = varianza] [square root = raíz cuadrada]</text:p>
        <text:h text:style-name="P45" text:outline-level="3">Luego:</text:h>
        <text:p text:style-name="P43"><text:span text:style-name="Source_20_Text"><text:span text:style-name="T3">norm.cdf(-0.4, mu220, sigma220)</text:span></text:span></text:p>
        <text:p text:style-name="P46">Eso pregunta:</text:p>
        <text:list text:style-name="L37">
          <text:list-item>
            <text:p text:style-name="P83">probabilidad de que el retorno acumulado anual sea menor o igual que -0.4</text:p>
          </text:list-item>
        </text:list>
        <text:p text:style-name="P44">O sea:</text:p>
        <text:list text:style-name="L38">
          <text:list-item>
            <text:p text:style-name="P84">aproximadamente perder 40% o más</text:p>
          </text:list-item>
        </text:list>
        <text:h text:style-name="P45" text:outline-level="3">Otra vez: crítica importante</text:h>
        <text:p text:style-name="P43"><text:span text:style-name="T1">Si trabajas con </text:span><text:span text:style-name="Strong_20_Emphasis"><text:span text:style-name="T2">log returns</text:span></text:span><text:span text:style-name="T1">, el umbral exacto para perder 40% de precio sería:</text:span></text:p>
        <text:section text:style-name="Sect3" text:name="Section10">
          <text:p text:style-name="P52"><text:bookmark text:name="code-block-viewer Copy 9"/><text:span text:style-name="T4">np</text:span><text:span text:style-name="T5">.</text:span><text:span text:style-name="T6">log(</text:span><text:span text:style-name="T10">0.60</text:span><text:span text:style-name="T6">)</text:span></text:p>
        </text:section>
        <text:p text:style-name="P43"><text:span text:style-name="T9">no </text:span><text:span text:style-name="Source_20_Text"><text:span text:style-name="T8">-0.4</text:span></text:span><text:span text:style-name="T9">.</text:span></text:p>
        <text:p text:style-name="P46">Pero el curso sigue usando la aproximación simple.</text:p>
        <text:h text:style-name="P45" text:outline-level="3">Tu ejercicio del 20%</text:h>
        <text:section text:style-name="Sect3" text:name="Section11">
          <text:p text:style-name="P52"><text:bookmark text:name="code-block-viewer Copy 10"/><text:span text:style-name="T4">drop20</text:span><text:span text:style-name="T6"> </text:span><text:span text:style-name="T5">=</text:span><text:span text:style-name="T6"> </text:span><text:span text:style-name="T4">norm</text:span><text:span text:style-name="T5">.</text:span><text:span text:style-name="T6">cdf(</text:span><text:span text:style-name="T5">-</text:span><text:span text:style-name="T10">0.2</text:span><text:span text:style-name="T6">, </text:span><text:span text:style-name="T4">mu220</text:span><text:span text:style-name="T6">, </text:span><text:span text:style-name="T4">sigma220</text:span><text:span text:style-name="T6">)</text:span></text:p>
          <text:p text:style-name="P53"><text:span text:style-name="T4">print</text:span><text:span text:style-name="T6">(</text:span><text:span text:style-name="T7">'The probability of dropping over 20% in 220 days is '</text:span><text:span text:style-name="T6">, </text:span><text:span text:style-name="T4">drop20</text:span><text:span text:style-name="T6">)</text:span></text:p>
        </text:section>
        <text:p text:style-name="P43"><text:span text:style-name="Strong_20_Emphasis"><text:span text:style-name="T19">English summary:</text:span></text:span><text:span text:style-name="T9"> For 220 days, the mean scales by 220 and the standard deviation scales by </text:span><text:span text:style-name="Source_20_Text"><text:span text:style-name="T8">sqrt(220)</text:span></text:span><text:span text:style-name="T9">.<text:line-break/>[scale with time = escalar con el tiempo] [annual return = retorno anual]</text:span></text:p>
        <text:p text:style-name="P50"><text:soft-page-break/></text:p>
        <text:h text:style-name="P51" text:outline-level="2">8) Value at Risk (VaR)</text:h>
        <text:section text:style-name="Sect3" text:name="Section12">
          <text:p text:style-name="P52"><text:bookmark text:name="code-block-viewer Copy 11"/><text:span text:style-name="T4">VaR</text:span><text:span text:style-name="T6"> </text:span><text:span text:style-name="T5">=</text:span><text:span text:style-name="T6"> </text:span><text:span text:style-name="T4">norm</text:span><text:span text:style-name="T5">.</text:span><text:span text:style-name="T6">ppf(</text:span><text:span text:style-name="T10">0.05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print</text:span><text:span text:style-name="T6">(</text:span><text:span text:style-name="T7">'Single day value at risk '</text:span><text:span text:style-name="T6">, </text:span><text:span text:style-name="T4">VaR</text:span><text:span text:style-name="T6">)</text:span></text:p>
        </text:section>
        <text:h text:style-name="P54" text:outline-level="3"><text:span text:style-name="Source_20_Text"><text:span text:style-name="T13">ppf</text:span></text:span></text:h>
        <text:list text:style-name="L39">
          <text:list-item>
            <text:p text:style-name="P85"><text:span text:style-name="Source_20_Text"><text:span text:style-name="T3">ppf</text:span></text:span><text:span text:style-name="T1"> = </text:span><text:span text:style-name="Strong_20_Emphasis"><text:span text:style-name="T2">Percent Point Function</text:span></text:span></text:p>
          </text:list-item>
          <text:list-item>
            <text:p text:style-name="P85"><text:span text:style-name="T1">es la inversa de la </text:span><text:span text:style-name="Source_20_Text"><text:span text:style-name="T3">cdf</text:span></text:span></text:p>
          </text:list-item>
          <text:list-item>
            <text:p text:style-name="P85"><text:span text:style-name="T1">en lenguaje normal: </text:span><text:span text:style-name="Strong_20_Emphasis"><text:span text:style-name="T2">cuantil</text:span></text:span></text:p>
          </text:list-item>
        </text:list>
        <text:p text:style-name="P44">[ppf = inverse cdf] [quantile = cuantil]</text:p>
        <text:h text:style-name="P54" text:outline-level="3"><text:span text:style-name="Source_20_Text"><text:span text:style-name="T14">norm.ppf(0.05, mu, sigma)</text:span></text:span></text:h>
        <text:p text:style-name="P44">Pregunta:</text:p>
        <text:list text:style-name="L40">
          <text:list-item>
            <text:p text:style-name="P86">“<text:span text:style-name="T20">¿Qué valor deja por debajo al 5% peor de los casos?”</text:span></text:p>
          </text:list-item>
        </text:list>
        <text:p text:style-name="P43"><text:span text:style-name="T1">Eso es el </text:span><text:span text:style-name="Strong_20_Emphasis"><text:span text:style-name="T2">cuantil del 5%</text:span></text:span><text:span text:style-name="T1">.</text:span></text:p>
        <text:p text:style-name="P43"><text:span text:style-name="T1">Si te sale </text:span><text:span text:style-name="Source_20_Text"><text:span text:style-name="T3">-0.0225...</text:span></text:span><text:span text:style-name="T1">, significa:</text:span></text:p>
        <text:list text:style-name="L41">
          <text:list-item>
            <text:p text:style-name="P87">aproximadamente, en el peor 5% de días, el retorno diario está por debajo de -2.25%</text:p>
          </text:list-item>
        </text:list>
        <text:h text:style-name="P45" text:outline-level="3">Ojo técnico</text:h>
        <text:p text:style-name="P43"><text:span text:style-name="T1">Eso es un </text:span><text:span text:style-name="Strong_20_Emphasis"><text:span text:style-name="T2">VaR en retorno</text:span></text:span><text:span text:style-name="T1">, no todavía en euros.</text:span></text:p>
        <text:p text:style-name="P46">Si tu cartera valiera 10.000 €:</text:p>
        <text:list text:style-name="L42">
          <text:list-item>
            <text:p text:style-name="P88"><text:span text:style-name="T1">VaR aproximado diario al 5% ≈ </text:span><text:span text:style-name="Source_20_Text"><text:span text:style-name="T3">10000 * 0.0225 = 225 €</text:span></text:span></text:p>
          </text:list-item>
        </text:list>
        <text:p text:style-name="P44">[portfolio = cartera] [loss = pérdida]</text:p>
        <text:p text:style-name="P43"><text:span text:style-name="Strong_20_Emphasis"><text:span text:style-name="T2">English summary:</text:span></text:span><text:span text:style-name="T1"> VaR here is the 5th percentile of daily returns.<text:line-break/>[5th percentile = percentil 5] [worst cases = peores casos]</text:span></text:p>
        <text:p text:style-name="P50"/>
        <text:h text:style-name="P51" text:outline-level="2">9) Quantiles: 5%, 95%, 25%, 75%</text:h>
        <text:section text:style-name="Sect3" text:name="Section13">
          <text:p text:style-name="P52"><text:bookmark text:name="code-block-viewer Copy 12"/><text:span text:style-name="T4">print</text:span><text:span text:style-name="T6">(</text:span><text:span text:style-name="T7">'5% quantile '</text:span><text:span text:style-name="T6">, </text:span><text:span text:style-name="T4">norm</text:span><text:span text:style-name="T5">.</text:span><text:span text:style-name="T6">ppf(</text:span><text:span text:style-name="T10">0.05</text:span><text:span text:style-name="T6">, </text:span><text:span text:style-name="T4">mu</text:span><text:span text:style-name="T6">, </text:span><text:span text:style-name="T4">sigma</text:span><text:span text:style-name="T6">))</text:span></text:p>
          <text:p text:style-name="P53"><text:span text:style-name="T4">print</text:span><text:span text:style-name="T6">(</text:span><text:span text:style-name="T7">'95% quantile '</text:span><text:span text:style-name="T6">, </text:span><text:span text:style-name="T4">norm</text:span><text:span text:style-name="T5">.</text:span><text:span text:style-name="T6">ppf(</text:span><text:span text:style-name="T10">0.95</text:span><text:span text:style-name="T6">, </text:span><text:span text:style-name="T4">mu</text:span><text:span text:style-name="T6">, </text:span><text:span text:style-name="T4">sigma</text:span><text:span text:style-name="T6">))</text:span></text:p>
        </text:section>
        <text:list text:style-name="L43">
          <text:list-item>
            <text:p text:style-name="P89"><text:soft-page-break/>5% quantile = punto por debajo del cual cae el 5% de los datos</text:p>
          </text:list-item>
          <text:list-item>
            <text:p text:style-name="P90">95% quantile = punto por debajo del cual cae el 95% de los datos</text:p>
          </text:list-item>
        </text:list>
        <text:p text:style-name="P44">[quantile = cuantil] [percentile = percentil]</text:p>
        <text:h text:style-name="P45" text:outline-level="3">Tus ejercicios</text:h>
        <text:section text:style-name="Sect3" text:name="Section14">
          <text:p text:style-name="P52"><text:bookmark text:name="code-block-viewer Copy 13"/><text:span text:style-name="T4">q25</text:span><text:span text:style-name="T6"> </text:span><text:span text:style-name="T5">=</text:span><text:span text:style-name="T6"> </text:span><text:span text:style-name="T4">norm</text:span><text:span text:style-name="T5">.</text:span><text:span text:style-name="T6">ppf(</text:span><text:span text:style-name="T10">0.25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print</text:span><text:span text:style-name="T6">(</text:span><text:span text:style-name="T7">'25% quantile '</text:span><text:span text:style-name="T6">, </text:span><text:span text:style-name="T4">q25</text:span><text:span text:style-name="T6">)</text:span></text:p>
          <text:p text:style-name="P53"><text:span text:style-name="T4">q75</text:span><text:span text:style-name="T6"> </text:span><text:span text:style-name="T5">=</text:span><text:span text:style-name="T6"> </text:span><text:span text:style-name="T4">norm</text:span><text:span text:style-name="T5">.</text:span><text:span text:style-name="T6">ppf(</text:span><text:span text:style-name="T10">0.75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print</text:span><text:span text:style-name="T6">(</text:span><text:span text:style-name="T7">'75% quantile '</text:span><text:span text:style-name="T6">, </text:span><text:span text:style-name="T4">q75</text:span><text:span text:style-name="T6">)</text:span></text:p>
        </text:section>
        <text:p text:style-name="P43"><text:span text:style-name="T9">Eso rellena los </text:span><text:span text:style-name="Source_20_Text"><text:span text:style-name="T8">None</text:span></text:span><text:span text:style-name="T9">.</text:span></text:p>
        <text:p text:style-name="P43"><text:span text:style-name="Strong_20_Emphasis"><text:span text:style-name="T2">English summary:</text:span></text:span><text:span text:style-name="T1"> </text:span><text:span text:style-name="Source_20_Text"><text:span text:style-name="T3">ppf</text:span></text:span><text:span text:style-name="T1"> gives quantiles such as the 25th, 50th, 75th, or 95th percentile.<text:line-break/>[25th percentile = percentil 25] [75th percentile = percentil 75]</text:span></text:p>
        <text:p text:style-name="P50"/>
        <text:h text:style-name="P51" text:outline-level="2">10) Qué está haciendo todo este bloque, en una sola frase</text:h>
        <text:p text:style-name="P44">Está haciendo esto:</text:p>
        <text:list text:style-name="L44">
          <text:list-item>
            <text:p text:style-name="P91">carga precios de Microsoft</text:p>
          </text:list-item>
          <text:list-item>
            <text:p text:style-name="P91">calcula retornos logarítmicos diarios</text:p>
          </text:list-item>
          <text:list-item>
            <text:p text:style-name="P92"><text:span text:style-name="T1">estima una normal con media </text:span><text:span text:style-name="Source_20_Text"><text:span text:style-name="T3">mu</text:span></text:span><text:span text:style-name="T1"> y desviación </text:span><text:span text:style-name="Source_20_Text"><text:span text:style-name="T3">sigma</text:span></text:span></text:p>
          </text:list-item>
          <text:list-item>
            <text:p text:style-name="P91">usa esa normal para calcular probabilidades de caídas y cuantiles de riesgo</text:p>
          </text:list-item>
        </text:list>
        <text:p text:style-name="P43"><text:span text:style-name="Strong_20_Emphasis"><text:span text:style-name="T2">English summary:</text:span></text:span><text:span text:style-name="T1"> The whole block models Microsoft daily log returns with a normal distribution and uses it to estimate risk.<text:line-break/>[risk estimate = estimación de riesgo] [model returns = modelar retornos]</text:span></text:p>
        <text:p text:style-name="P50"/>
        <text:h text:style-name="P51" text:outline-level="2">11) Código del curso, pero corregido hoy</text:h>
        <text:section text:style-name="Sect3" text:name="Section15">
          <text:p text:style-name="P52"><text:bookmark text:name="code-block-viewer Copy 14"/><text:span text:style-name="T5">import</text:span><text:span text:style-name="T6"> </text:span><text:span text:style-name="T4">pandas</text:span><text:span text:style-name="T6"> </text:span><text:span text:style-name="T5">as</text:span><text:span text:style-name="T6"> </text:span><text:span text:style-name="T4">pd</text:span></text:p>
          <text:p text:style-name="P53"><text:span text:style-name="T5">import</text:span><text:span text:style-name="T6"> </text:span><text:span text:style-name="T4">numpy</text:span><text:span text:style-name="T6"> </text:span><text:span text:style-name="T5">as</text:span><text:span text:style-name="T6"> </text:span><text:span text:style-name="T4">np</text:span></text:p>
          <text:p text:style-name="P53"><text:span text:style-name="T5">import</text:span><text:span text:style-name="T6"> </text:span><text:span text:style-name="T4">matplotlib</text:span><text:span text:style-name="T5">.</text:span><text:span text:style-name="T4">pyplot</text:span><text:span text:style-name="T6"> </text:span><text:span text:style-name="T5">as</text:span><text:span text:style-name="T6"> </text:span><text:span text:style-name="T4">plt</text:span></text:p>
          <text:p text:style-name="P53"><text:span text:style-name="T5">from</text:span><text:span text:style-name="T6"> </text:span><text:span text:style-name="T4">scipy</text:span><text:span text:style-name="T5">.</text:span><text:span text:style-name="T4">stats</text:span><text:span text:style-name="T6"> </text:span><text:span text:style-name="T5">import</text:span><text:span text:style-name="T6"> </text:span><text:span text:style-name="T4">norm</text:span></text:p>
          <text:p text:style-name="P93"># Read CSV and use Date as index</text:p>
          <text:p text:style-name="P53"><text:soft-page-break/><text:span text:style-name="T4">ms</text:span><text:span text:style-name="T6"> </text:span><text:span text:style-name="T5">=</text:span><text:span text:style-name="T6"> </text:span><text:span text:style-name="T4">pd</text:span><text:span text:style-name="T5">.</text:span><text:span text:style-name="T6">read_csv(</text:span><text:span text:style-name="T7">'../data/microsoft.csv'</text:span><text:span text:style-name="T6">, </text:span><text:span text:style-name="T4">index_col</text:span><text:span text:style-name="T5">=</text:span><text:span text:style-name="T7">'Date'</text:span><text:span text:style-name="T6">, </text:span><text:span text:style-name="T4">parse_dates</text:span><text:span text:style-name="T5">=</text:span><text:span text:style-name="T6">[</text:span><text:span text:style-name="T7">'Date'</text:span><text:span text:style-name="T6">])</text:span></text:p>
          <text:p text:style-name="P93"># Compute daily log returns</text:p>
          <text:p text:style-name="P53"><text:span text:style-name="T4">ms</text:span><text:span text:style-name="T6">[</text:span><text:span text:style-name="T7">'LogReturn'</text:span><text:span text:style-name="T6">] </text:span><text:span text:style-name="T5">=</text:span><text:span text:style-name="T6"> </text:span><text:span text:style-name="T4">np</text:span><text:span text:style-name="T5">.</text:span><text:span text:style-name="T6">log(</text:span><text:span text:style-name="T4">ms</text:span><text:span text:style-name="T6">[</text:span><text:span text:style-name="T7">'Close'</text:span><text:span text:style-name="T6">])</text:span><text:span text:style-name="T5">.</text:span><text:span text:style-name="T6">shift(</text:span><text:span text:style-name="T5">-</text:span><text:span text:style-name="T10">1</text:span><text:span text:style-name="T6">) </text:span><text:span text:style-name="T5">-</text:span><text:span text:style-name="T6"> </text:span><text:span text:style-name="T4">np</text:span><text:span text:style-name="T5">.</text:span><text:span text:style-name="T6">log(</text:span><text:span text:style-name="T4">ms</text:span><text:span text:style-name="T6">[</text:span><text:span text:style-name="T7">'Close'</text:span><text:span text:style-name="T6">])</text:span></text:p>
          <text:p text:style-name="P53"><text:span text:style-name="T4">ms</text:span><text:span text:style-name="T6"> </text:span><text:span text:style-name="T5">=</text:span><text:span text:style-name="T6"> </text:span><text:span text:style-name="T4">ms</text:span><text:span text:style-name="T5">.</text:span><text:span text:style-name="T6">dropna(</text:span><text:span text:style-name="T4">subset</text:span><text:span text:style-name="T5">=</text:span><text:span text:style-name="T6">[</text:span><text:span text:style-name="T7">'LogReturn'</text:span><text:span text:style-name="T6">])</text:span></text:p>
          <text:p text:style-name="P93"># Estimate mean and standard deviation</text:p>
          <text:p text:style-name="P53"><text:span text:style-name="T4">mu</text:span><text:span text:style-name="T6"> </text:span><text:span text:style-name="T5">=</text:span><text:span text:style-name="T6"> 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mean()</text:span></text:p>
          <text:p text:style-name="P53"><text:span text:style-name="T4">sigma</text:span><text:span text:style-name="T6"> </text:span><text:span text:style-name="T5">=</text:span><text:span text:style-name="T6"> 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std(</text:span><text:span text:style-name="T4">ddof</text:span><text:span text:style-name="T5">=</text:span><text:span text:style-name="T10">1</text:span><text:span text:style-name="T6">)</text:span></text:p>
          <text:p text:style-name="P93"># Build x-grid and normal PDF</text:p>
          <text:p text:style-name="P53"><text:span text:style-name="T4">density</text:span><text:span text:style-name="T6"> </text:span><text:span text:style-name="T5">=</text:span><text:span text:style-name="T6"> </text:span><text:span text:style-name="T4">pd</text:span><text:span text:style-name="T5">.</text:span><text:span text:style-name="T6">DataFrame()</text:span></text:p>
          <text:p text:style-name="P53"><text:span text:style-name="T4">density</text:span><text:span text:style-name="T6">[</text:span><text:span text:style-name="T7">'x'</text:span><text:span text:style-name="T6">] </text:span><text:span text:style-name="T5">=</text:span><text:span text:style-name="T6"> </text:span><text:span text:style-name="T4">np</text:span><text:span text:style-name="T5">.</text:span><text:span text:style-name="T6">arange(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min() </text:span><text:span text:style-name="T5">-</text:span><text:span text:style-name="T6"> </text:span><text:span text:style-name="T10">0.01</text:span><text:span text:style-name="T6">, </text:span><text:span text:style-name="T4">ms</text:span><text:span text:style-name="T6">[</text:span><text:span text:style-name="T7">'LogReturn'</text:span><text:span text:style-name="T6">]</text:span><text:span text:style-name="T5">.</text:span><text:span text:style-name="T6">max() </text:span><text:span text:style-name="T5">+</text:span><text:span text:style-name="T6"> </text:span><text:span text:style-name="T10">0.01</text:span><text:span text:style-name="T6">, </text:span><text:span text:style-name="T10">0.001</text:span><text:span text:style-name="T6">)</text:span></text:p>
          <text:p text:style-name="P53"><text:span text:style-name="T4">density</text:span><text:span text:style-name="T6">[</text:span><text:span text:style-name="T7">'pdf'</text:span><text:span text:style-name="T6">] </text:span><text:span text:style-name="T5">=</text:span><text:span text:style-name="T6"> </text:span><text:span text:style-name="T4">norm</text:span><text:span text:style-name="T5">.</text:span><text:span text:style-name="T6">pdf(</text:span><text:span text:style-name="T4">density</text:span><text:span text:style-name="T6">[</text:span><text:span text:style-name="T7">'x'</text:span><text:span text:style-name="T6">], </text:span><text:span text:style-name="T4">mu</text:span><text:span text:style-name="T6">, </text:span><text:span text:style-name="T4">sigma</text:span><text:span text:style-name="T6">)</text:span></text:p>
          <text:p text:style-name="P93"># Plot histogram and fitted normal density</text:p>
          <text:p text:style-name="P53"><text:span text:style-name="T4">ms</text:span><text:span text:style-name="T6">[</text:span><text:span text:style-name="T7">'LogReturn'</text:span><text:span text:style-name="T6">]</text:span><text:span text:style-name="T5">.</text:span><text:span text:style-name="T6">hist(</text:span><text:span text:style-name="T4">bins</text:span><text:span text:style-name="T5">=</text:span><text:span text:style-name="T10">50</text:span><text:span text:style-name="T6">, </text:span><text:span text:style-name="T4">density</text:span><text:span text:style-name="T5">=</text:span><text:span text:style-name="T10">True</text:span><text:span text:style-name="T6">, </text:span><text:span text:style-name="T4">figsize</text:span><text:span text:style-name="T5">=</text:span><text:span text:style-name="T6">(</text:span><text:span text:style-name="T10">15</text:span><text:span text:style-name="T6">, </text:span><text:span text:style-name="T10">8</text:span><text:span text:style-name="T6">))</text:span></text:p>
          <text:p text:style-name="P53"><text:span text:style-name="T4">plt</text:span><text:span text:style-name="T5">.</text:span><text:span text:style-name="T6">plot(</text:span><text:span text:style-name="T4">density</text:span><text:span text:style-name="T6">[</text:span><text:span text:style-name="T7">'x'</text:span><text:span text:style-name="T6">], </text:span><text:span text:style-name="T4">density</text:span><text:span text:style-name="T6">[</text:span><text:span text:style-name="T7">'pdf'</text:span><text:span text:style-name="T6">])</text:span></text:p>
          <text:p text:style-name="P53"><text:span text:style-name="T4">plt</text:span><text:span text:style-name="T5">.</text:span><text:span text:style-name="T6">show()</text:span></text:p>
          <text:p text:style-name="P93"># Daily drop probabilities (course approximation)</text:p>
          <text:p text:style-name="P53"><text:span text:style-name="T4">prob_drop_5</text:span><text:span text:style-name="T6"> </text:span><text:span text:style-name="T5">=</text:span><text:span text:style-name="T6"> </text:span><text:span text:style-name="T4">norm</text:span><text:span text:style-name="T5">.</text:span><text:span text:style-name="T6">cdf(</text:span><text:span text:style-name="T5">-</text:span><text:span text:style-name="T10">0.05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prob_drop_10</text:span><text:span text:style-name="T6"> </text:span><text:span text:style-name="T5">=</text:span><text:span text:style-name="T6"> </text:span><text:span text:style-name="T4">norm</text:span><text:span text:style-name="T5">.</text:span><text:span text:style-name="T6">cdf(</text:span><text:span text:style-name="T5">-</text:span><text:span text:style-name="T10">0.10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93"># 220-day scaling</text:p>
          <text:p text:style-name="P53"><text:span text:style-name="T4">mu220</text:span><text:span text:style-name="T6"> </text:span><text:span text:style-name="T5">=</text:span><text:span text:style-name="T6"> </text:span><text:span text:style-name="T10">220</text:span><text:span text:style-name="T6"> </text:span><text:span text:style-name="T5">*</text:span><text:span text:style-name="T6"> </text:span><text:span text:style-name="T4">mu</text:span></text:p>
          <text:p text:style-name="P53"><text:span text:style-name="T4">sigma220</text:span><text:span text:style-name="T6"> </text:span><text:span text:style-name="T5">=</text:span><text:span text:style-name="T6"> </text:span><text:span text:style-name="T4">np</text:span><text:span text:style-name="T5">.</text:span><text:span text:style-name="T6">sqrt(</text:span><text:span text:style-name="T10">220</text:span><text:span text:style-name="T6">) </text:span><text:span text:style-name="T5">*</text:span><text:span text:style-name="T6"> </text:span><text:span text:style-name="T4">sigma</text:span></text:p>
          <text:p text:style-name="P53"><text:span text:style-name="T4">prob_drop_40_220</text:span><text:span text:style-name="T6"> </text:span><text:span text:style-name="T5">=</text:span><text:span text:style-name="T6"> </text:span><text:span text:style-name="T4">norm</text:span><text:span text:style-name="T5">.</text:span><text:span text:style-name="T6">cdf(</text:span><text:span text:style-name="T5">-</text:span><text:span text:style-name="T10">0.40</text:span><text:span text:style-name="T6">, </text:span><text:span text:style-name="T4">mu220</text:span><text:span text:style-name="T6">, </text:span><text:span text:style-name="T4">sigma220</text:span><text:span text:style-name="T6">)</text:span></text:p>
          <text:p text:style-name="P53"><text:span text:style-name="T4">prob_drop_20_220</text:span><text:span text:style-name="T6"> </text:span><text:span text:style-name="T5">=</text:span><text:span text:style-name="T6"> </text:span><text:span text:style-name="T4">norm</text:span><text:span text:style-name="T5">.</text:span><text:span text:style-name="T6">cdf(</text:span><text:span text:style-name="T5">-</text:span><text:span text:style-name="T10">0.20</text:span><text:span text:style-name="T6">, </text:span><text:span text:style-name="T4">mu220</text:span><text:span text:style-name="T6">, </text:span><text:span text:style-name="T4">sigma220</text:span><text:span text:style-name="T6">)</text:span></text:p>
          <text:p text:style-name="P93"># Quantiles / VaR</text:p>
          <text:p text:style-name="P53"><text:span text:style-name="T4">var_5</text:span><text:span text:style-name="T6"> </text:span><text:span text:style-name="T5">=</text:span><text:span text:style-name="T6"> </text:span><text:span text:style-name="T4">norm</text:span><text:span text:style-name="T5">.</text:span><text:span text:style-name="T6">ppf(</text:span><text:span text:style-name="T10">0.05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q25</text:span><text:span text:style-name="T6"> </text:span><text:span text:style-name="T5">=</text:span><text:span text:style-name="T6"> </text:span><text:span text:style-name="T4">norm</text:span><text:span text:style-name="T5">.</text:span><text:span text:style-name="T6">ppf(</text:span><text:span text:style-name="T10">0.25</text:span><text:span text:style-name="T6">, </text:span><text:span text:style-name="T4">mu</text:span><text:span text:style-name="T6">, </text:span><text:span text:style-name="T4">sigma</text:span><text:span text:style-name="T6">)</text:span></text:p>
          <text:p text:style-name="P53"><text:span text:style-name="T4">q75</text:span><text:span text:style-name="T6"> </text:span><text:span text:style-name="T5">=</text:span><text:span text:style-name="T6"> </text:span><text:span text:style-name="T4">norm</text:span><text:span text:style-name="T5">.</text:span><text:span text:style-name="T6">ppf(</text:span><text:span text:style-name="T10">0.75</text:span><text:span text:style-name="T6">, </text:span><text:span text:style-name="T4">mu</text:span><text:span text:style-name="T6">, </text:span><text:span text:style-name="T4">sigma</text:span><text:span text:style-name="T6">)</text:span></text:p>
        </text:section>
        <text:p text:style-name="P43"><text:span text:style-name="Strong_20_Emphasis"><text:span text:style-name="T19">English summary:</text:span></text:span><text:span text:style-name="T9"> This is the same idea as the course, but updated to modern pandas and a properly scaled histogram.<text:line-break/>[updated code = código actualizado] [properly scaled = correctamente escalado]</text:span></text:p>
        <text:p text:style-name="P50"/>
        <text:h text:style-name="P51" text:outline-level="2">12) Lo mínimo que tienes que recordar hoy</text:h>
        <text:list text:style-name="L45">
          <text:list-item>
            <text:p text:style-name="P94"><text:span text:style-name="Source_20_Text"><text:span text:style-name="T3">Close</text:span></text:span><text:span text:style-name="T1"> = precio de cierre</text:span></text:p>
          </text:list-item>
          <text:list-item>
            <text:p text:style-name="P94"><text:span text:style-name="Source_20_Text"><text:span text:style-name="T3">LogReturn</text:span></text:span><text:span text:style-name="T1"> = </text:span><text:span text:style-name="Source_20_Text"><text:span text:style-name="T3">log(mañana) - log(hoy)</text:span></text:span></text:p>
          </text:list-item>
          <text:list-item>
            <text:p text:style-name="P94"><text:span text:style-name="Source_20_Text"><text:span text:style-name="T3">mu</text:span></text:span><text:span text:style-name="T1"> = media de retornos</text:span></text:p>
          </text:list-item>
          <text:list-item>
            <text:p text:style-name="P94"><text:soft-page-break/><text:span text:style-name="Source_20_Text"><text:span text:style-name="T3">sigma</text:span></text:span><text:span text:style-name="T1"> = volatilidad aproximada</text:span></text:p>
          </text:list-item>
          <text:list-item>
            <text:p text:style-name="P94"><text:span text:style-name="Source_20_Text"><text:span text:style-name="T3">pdf</text:span></text:span><text:span text:style-name="T1"> = densidad</text:span></text:p>
          </text:list-item>
          <text:list-item>
            <text:p text:style-name="P94"><text:span text:style-name="Source_20_Text"><text:span text:style-name="T3">cdf</text:span></text:span><text:span text:style-name="T1"> = probabilidad acumulada</text:span></text:p>
          </text:list-item>
          <text:list-item>
            <text:p text:style-name="P94"><text:span text:style-name="Source_20_Text"><text:span text:style-name="T3">ppf</text:span></text:span><text:span text:style-name="T1"> = cuantil / inversa de la cdf</text:span></text:p>
          </text:list-item>
          <text:list-item>
            <text:p text:style-name="P94"><text:span text:style-name="Source_20_Text"><text:span text:style-name="T3">220*mu</text:span></text:span><text:span text:style-name="T1"> y </text:span><text:span text:style-name="Source_20_Text"><text:span text:style-name="T3">sqrt(220)*sigma</text:span></text:span><text:span text:style-name="T1"> = escalado temporal aproximado</text:span></text:p>
          </text:list-item>
        </text:list>
        <text:p text:style-name="P43"><text:span text:style-name="Strong_20_Emphasis"><text:span text:style-name="T2">English summary:</text:span></text:span><text:span text:style-name="T1"> Remember the meanings of </text:span><text:span text:style-name="Source_20_Text"><text:span text:style-name="T3">LogReturn</text:span></text:span><text:span text:style-name="T1">, </text:span><text:span text:style-name="Source_20_Text"><text:span text:style-name="T3">mu</text:span></text:span><text:span text:style-name="T1">, </text:span><text:span text:style-name="Source_20_Text"><text:span text:style-name="T3">sigma</text:span></text:span><text:span text:style-name="T1">, </text:span><text:span text:style-name="Source_20_Text"><text:span text:style-name="T3">pdf</text:span></text:span><text:span text:style-name="T1">, </text:span><text:span text:style-name="Source_20_Text"><text:span text:style-name="T3">cdf</text:span></text:span><text:span text:style-name="T1">, and </text:span><text:span text:style-name="Source_20_Text"><text:span text:style-name="T3">ppf</text:span></text:span><text:span text:style-name="T1">.<text:line-break/>[volatility = volatilidad] [cumulative probability = probabilidad acumulada]</text:span></text:p>
        <text:p text:style-name="P43"><text:span text:style-name="T1">En el siguiente paso, te desmenuzo </text:span><text:span text:style-name="Strong_20_Emphasis"><text:span text:style-name="T2">solo este bloque</text:span></text:span><text:span text:style-name="T1">:</text:span></text:p>
        <text:section text:style-name="Sect3" text:name="Section16">
          <text:p text:style-name="P52"><text:bookmark text:name="code-block-viewer Copy 15"/><text:span text:style-name="T4">ms</text:span><text:span text:style-name="T6">[</text:span><text:span text:style-name="T7">'LogReturn'</text:span><text:span text:style-name="T6">] </text:span><text:span text:style-name="T5">=</text:span><text:span text:style-name="T6"> </text:span><text:span text:style-name="T4">np</text:span><text:span text:style-name="T5">.</text:span><text:span text:style-name="T6">log(</text:span><text:span text:style-name="T4">ms</text:span><text:span text:style-name="T6">[</text:span><text:span text:style-name="T7">'Close'</text:span><text:span text:style-name="T6">])</text:span><text:span text:style-name="T5">.</text:span><text:span text:style-name="T6">shift(</text:span><text:span text:style-name="T5">-</text:span><text:span text:style-name="T10">1</text:span><text:span text:style-name="T6">) </text:span><text:span text:style-name="T5">-</text:span><text:span text:style-name="T6"> </text:span><text:span text:style-name="T4">np</text:span><text:span text:style-name="T5">.</text:span><text:span text:style-name="T6">log(</text:span><text:span text:style-name="T4">ms</text:span><text:span text:style-name="T6">[</text:span><text:span text:style-name="T7">'Close'</text:span><text:span text:style-name="T6">])</text:span></text:p>
        </text:section>
        <text:p text:style-name="P95">con una tabla de 3 filas y números reales para que lo veas sin abstracción.</text:p>
        <text:section text:style-name="Sect2" text:name="thread-bottom-container">
          <text:p text:style-name="P96"><text:a xlink:type="simple" xlink:href="https://chatgpt.com/g/g-p-6978f80b183c8191922a4f32bd71fffd-investing/c/69e89292-d108-8394-8ed6-0e756f9660e0#settings/Connectors/Advanced" office:target-frame-name="_self" xlink:show="replace" text:style-name="Internet_20_link" text:visited-style-name="Visited_20_Internet_20_Link"><text:span text:style-name="T21">DEVELOPER MODE</text:span></text:a></text:p>
          <text:section text:style-name="Sect2" text:name="prompt-textarea">
            <text:p text:style-name="P97"/>
          </text:section>
        </text:section>
      </text:section>
      <text:p text:style-name="P98"><draw:frame draw:style-name="fr1" draw:name="aria-notify-live-region-assertive" text:anchor-type="char" svg:width="0.041cm" draw:z-index="5"><draw:text-box fo:min-height="0.041cm"><text:p text:style-name="P5"/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11:32:14.294660900</meta:creation-date>
    <dc:date>2026-04-22T11:32:53.209955200</dc:date>
    <meta:editing-duration>PT40S</meta:editing-duration>
    <meta:editing-cycles>1</meta:editing-cycles>
    <meta:document-statistic meta:table-count="2" meta:image-count="0" meta:object-count="0" meta:page-count="19" meta:paragraph-count="358" meta:word-count="3359" meta:character-count="21290" meta:non-whitespace-character-count="18356"/>
    <meta:generator>LibreOffice/25.8.5.2$Windows_X86_64 LibreOffice_project/9c8b85f387cc00a89945a79c9e6239f32e450ac2</meta:generator>
  </office:meta>
</office:document-meta>
</file>