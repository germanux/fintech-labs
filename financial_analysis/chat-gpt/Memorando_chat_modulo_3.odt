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Preformatted_20_Text">
      <style:paragraph-properties fo:margin-top="0cm" fo:margin-bottom="0.499cm"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emorando completo del chat — Curso Python &amp; Statistics for Financial Analysis, estadística aplicada, enfoque profesional y próximos pasos</text:h>
      <text:p text:style-name="Text_20_body"><text:span text:style-name="Strong_20_Emphasis">Fecha de elaboración:</text:span> 26/05/2026 12:31:00 CEST<text:line-break/><text:span text:style-name="Strong_20_Emphasis">Contexto:</text:span> Este memorando recopila de forma extensa lo trabajado en el chat: curso, dudas técnicas, conceptos estadísticos, código Python, interpretación financiera, orientación profesional, mercado laboral y recomendaciones prácticas. Está pensado para retomar el hilo sin releer toda la conversación.</text:p>
      <text:p text:style-name="Horizontal_20_Line"/>
      <text:h text:style-name="Heading_20_2" text:outline-level="2">1. Contexto general del retorno al curso</text:h>
      <text:p text:style-name="Text_20_body">El usuario retomó el curso tras aproximadamente dos meses sin estudiar. Se confirmó que el curso era <text:span text:style-name="Strong_20_Emphasis">Python and Statistics for Financial Analysis</text:span>, orientado a usar Python, pandas, estadística e inferencia para analizar datos financieros, retornos de acciones, modelos simples de trading y evaluación de riesgo.</text:p>
      <text:p text:style-name="Text_20_body">El objetivo del curso no era estudiar estadística por cultura general, sino construir una base útil para el reposicionamiento profesional hacia:</text:p>
      <text:list text:style-name="L1">
        <text:list-item>
          <text:p text:style-name="P1"><text:span text:style-name="Strong_20_Emphasis">FinTech técnico</text:span> (<text:span text:style-name="Emphasis">technical FinTech</text:span>)</text:p>
        </text:list-item>
        <text:list-item>
          <text:p text:style-name="P1"><text:span text:style-name="Strong_20_Emphasis">Trading systems</text:span> (<text:span text:style-name="Emphasis">sistemas de trading</text:span>)</text:p>
        </text:list-item>
        <text:list-item>
          <text:p text:style-name="P1"><text:span text:style-name="Strong_20_Emphasis">Data automation</text:span> (<text:span text:style-name="Emphasis">automatización de datos</text:span>)</text:p>
        </text:list-item>
        <text:list-item>
          <text:p text:style-name="P1"><text:span text:style-name="Strong_20_Emphasis">Financial analysis with Python</text:span> (<text:span text:style-name="Emphasis">análisis financiero con Python</text:span>)</text:p>
        </text:list-item>
        <text:list-item>
          <text:p text:style-name="P1">Eventual portfolio profesional con notebooks, backtesting y pipelines de datos</text:p>
        </text:list-item>
      </text:list>
      <text:p text:style-name="Text_20_body">Se aclaró que el usuario no estaba empezando desde cero. Ya había completado el módulo 1, entendido la estrategia de medias móviles y estaba en el módulo 2/3, centrado en distribuciones, inferencia y probabilidad aplicada a retornos.</text:p>
      <text:p text:style-name="Horizontal_20_Line"/>
      <text:h text:style-name="Heading_20_2" text:outline-level="2">2. Revisión del bloque “Models of Stock Return”</text:h>
      <text:h text:style-name="Heading_20_3" text:outline-level="3">2.1 Código inicial del curso</text:h>
      <text:p text:style-name="Text_20_body">El bloque inicial cargaba librerías:</text:p>
      <text:p text:style-name="Preformatted_20_Text"><text:span text:style-name="Source_20_Text">import pandas as pd</text:span></text:p>
      <text:p text:style-name="Preformatted_20_Text"><text:span text:style-name="Source_20_Text">import numpy as np</text:span></text:p>
      <text:p text:style-name="Preformatted_20_Text"><text:span text:style-name="Source_20_Text">import matplotlib.pyplot as plt</text:span></text:p>
      <text:p text:style-name="P2"><text:span text:style-name="Source_20_Text">%matplotlib inline</text:span></text:p>
      <text:p text:style-name="Text_20_body"><text:soft-page-break/>Se explicó:</text:p>
      <text:list text:style-name="L2">
        <text:list-item>
          <text:p text:style-name="P3"><text:span text:style-name="Source_20_Text">pandas</text:span> / <text:span text:style-name="Source_20_Text">pd</text:span>: manejo de tablas y series de datos. Similar a un Excel programable.</text:p>
        </text:list-item>
        <text:list-item>
          <text:p text:style-name="P3"><text:span text:style-name="Source_20_Text">numpy</text:span> / <text:span text:style-name="Source_20_Text">np</text:span>: operaciones matemáticas y arrays.</text:p>
        </text:list-item>
        <text:list-item>
          <text:p text:style-name="P3"><text:span text:style-name="Source_20_Text">matplotlib.pyplot</text:span> / <text:span text:style-name="Source_20_Text">plt</text:span>: gráficos.</text:p>
        </text:list-item>
        <text:list-item>
          <text:p text:style-name="P3"><text:span text:style-name="Source_20_Text">%matplotlib inline</text:span>: comando propio de Jupyter para mostrar gráficos dentro del notebook.</text:p>
        </text:list-item>
      </text:list>
      <text:p text:style-name="Text_20_body">Se corrigió que:</text:p>
      <text:list text:style-name="L3">
        <text:list-item>
          <text:p text:style-name="P4"><text:span text:style-name="Source_20_Text">%matplotlib inline</text:span> no sirve en scripts <text:span text:style-name="Source_20_Text">.py</text:span> normales.</text:p>
        </text:list-item>
        <text:list-item>
          <text:p text:style-name="P4"><text:span text:style-name="Source_20_Text">pd.DataFrame.from_csv(...)</text:span> es código antiguo.</text:p>
        </text:list-item>
        <text:list-item>
          <text:p text:style-name="P4">La forma moderna es:</text:p>
        </text:list-item>
      </text:list>
      <text:p text:style-name="P2"><text:span text:style-name="Source_20_Text">ms = pd.read_csv('../data/microsoft.csv', index_col='Date', parse_dates=['Date'])</text:span></text:p>
      <text:h text:style-name="Heading_20_3" text:outline-level="3">2.2 Columnas del CSV financiero</text:h>
      <text:p text:style-name="Text_20_body">Se repasaron las columnas:</text:p>
      <text:list text:style-name="L4">
        <text:list-item>
          <text:p text:style-name="P5"><text:span text:style-name="Source_20_Text">Open</text:span>: precio de apertura.</text:p>
        </text:list-item>
        <text:list-item>
          <text:p text:style-name="P5"><text:span text:style-name="Source_20_Text">High</text:span>: máximo del día.</text:p>
        </text:list-item>
        <text:list-item>
          <text:p text:style-name="P5"><text:span text:style-name="Source_20_Text">Low</text:span>: mínimo del día.</text:p>
        </text:list-item>
        <text:list-item>
          <text:p text:style-name="P5"><text:span text:style-name="Source_20_Text">Close</text:span>: cierre.</text:p>
        </text:list-item>
        <text:list-item>
          <text:p text:style-name="P5"><text:span text:style-name="Source_20_Text">Adj Close</text:span>: cierre ajustado por dividendos y splits.</text:p>
        </text:list-item>
        <text:list-item>
          <text:p text:style-name="P5"><text:span text:style-name="Source_20_Text">Volume</text:span>: volumen negociado.</text:p>
        </text:list-item>
      </text:list>
      <text:p text:style-name="Text_20_body">Se indicó que para aprender <text:span text:style-name="Source_20_Text">Close</text:span> era aceptable, aunque en análisis real suele preferirse <text:span text:style-name="Source_20_Text">Adj Close</text:span>.</text:p>
      <text:p text:style-name="Horizontal_20_Line"/>
      <text:h text:style-name="Heading_20_2" text:outline-level="2">3. Log Return: cálculo, interpretación y correcciones</text:h>
      <text:h text:style-name="Heading_20_3" text:outline-level="3">3.1 Línea clave</text:h>
      <text:p text:style-name="P2"><text:span text:style-name="Source_20_Text">ms['LogReturn'] = np.log(ms['Close']).shift(-1) - np.log(ms['Close'])</text:span></text:p>
      <text:p text:style-name="Text_20_body">Se explicó línea por línea:</text:p>
      <text:list text:style-name="L5">
        <text:list-item>
          <text:p text:style-name="P6"><text:span text:style-name="Source_20_Text">ms['Close']</text:span>: selecciona la columna de cierres.</text:p>
        </text:list-item>
        <text:list-item>
          <text:p text:style-name="P6"><text:span text:style-name="Source_20_Text">np.log(ms['Close'])</text:span>: aplica logaritmo natural a cada precio.</text:p>
        </text:list-item>
        <text:list-item>
          <text:p text:style-name="P6"><text:span text:style-name="Source_20_Text">.shift(-1)</text:span>: desplaza la serie una fila hacia arriba; en la fila de hoy coloca el cierre de mañana.</text:p>
        </text:list-item>
        <text:list-item>
          <text:p text:style-name="P6"><text:soft-page-break/>La resta calcula:</text:p>
        </text:list-item>
      </text:list>
      <text:p text:style-name="P2"><text:span text:style-name="Source_20_Text">log(precio mañana) - log(precio hoy)</text:span></text:p>
      <text:p text:style-name="Text_20_body">Por propiedad de logaritmos:</text:p>
      <text:p text:style-name="P2"><text:span text:style-name="Source_20_Text">log(P mañana) - log(P hoy) = log(P mañana / P hoy)</text:span></text:p>
      <text:p text:style-name="Text_20_body">Por tanto:</text:p>
      <text:p text:style-name="P2"><text:span text:style-name="Source_20_Text">LogReturn = ln(P_{t+1} / P_t)</text:span></text:p>
      <text:h text:style-name="Heading_20_3" text:outline-level="3">3.2 Interpretación</text:h>
      <text:list text:style-name="L6">
        <text:list-item>
          <text:p text:style-name="P7">Si <text:span text:style-name="Source_20_Text">LogReturn &gt; 0</text:span>, el precio subió.</text:p>
        </text:list-item>
        <text:list-item>
          <text:p text:style-name="P7">Si <text:span text:style-name="Source_20_Text">LogReturn &lt; 0</text:span>, el precio bajó.</text:p>
        </text:list-item>
        <text:list-item>
          <text:p text:style-name="P7">Si <text:span text:style-name="Source_20_Text">LogReturn ≈ 0</text:span>, apenas cambió.</text:p>
        </text:list-item>
      </text:list>
      <text:p text:style-name="Text_20_body">Se aclaró que la última fila suele quedar en <text:span text:style-name="Source_20_Text">NaN</text:span>, porque no existe el día siguiente.</text:p>
      <text:h text:style-name="Heading_20_3" text:outline-level="3">3.3 Simple Return vs Log Return</text:h>
      <text:p text:style-name="Text_20_body">Se distinguió entre:</text:p>
      <text:p text:style-name="Preformatted_20_Text"><text:span text:style-name="Source_20_Text">Simple Return = P_{t+1}/P_t - 1</text:span></text:p>
      <text:p text:style-name="P2"><text:span text:style-name="Source_20_Text">Log Return = ln(P_{t+1}/P_t)</text:span></text:p>
      <text:p text:style-name="Text_20_body">Para retornos pequeños diarios son parecidos, pero no idénticos.</text:p>
      <text:p text:style-name="Text_20_body">Ejemplo:</text:p>
      <text:list text:style-name="L7">
        <text:list-item>
          <text:p text:style-name="P8">Caída del 10% en precio → ratio <text:span text:style-name="Source_20_Text">0.90</text:span>.</text:p>
        </text:list-item>
        <text:list-item>
          <text:p text:style-name="P8">Log return exacto → <text:span text:style-name="Source_20_Text">np.log(0.90)</text:span>.</text:p>
        </text:list-item>
        <text:list-item>
          <text:p text:style-name="P8">No es exactamente <text:span text:style-name="Source_20_Text">-0.10</text:span>, aunque se parezca.</text:p>
        </text:list-item>
      </text:list>
      <text:p text:style-name="Horizontal_20_Line"/>
      <text:h text:style-name="Heading_20_2" text:outline-level="2">4. Histograma, PDF y CDF</text:h>
      <text:h text:style-name="Heading_20_3" text:outline-level="3">4.1 Histograma</text:h>
      <text:p text:style-name="Text_20_body">Un <text:span text:style-name="Strong_20_Emphasis">histogram</text:span> (<text:span text:style-name="Emphasis">histograma</text:span>) agrupa valores en intervalos llamados <text:span text:style-name="Strong_20_Emphasis">bins</text:span>.</text:p>
      <text:p text:style-name="Text_20_body">Ejemplo conceptual:</text:p>
      <text:list text:style-name="L8">
        <text:list-item>
          <text:p text:style-name="P9">Intervalo 1.1–1.2 → hay 5 valores.</text:p>
        </text:list-item>
        <text:list-item>
          <text:p text:style-name="P9">Intervalo 3.7–3.8 → hay 7 valores.</text:p>
        </text:list-item>
      </text:list>
      <text:p text:style-name="Text_20_body">El histograma no dibuja cada valor individual, sino cuántos valores caen en cada intervalo.</text:p>
      <text:p text:style-name="Text_20_body">Se explicó que:</text:p>
      <text:list text:style-name="L9">
        <text:list-item>
          <text:p text:style-name="P10"><text:span text:style-name="Source_20_Text">bins=50</text:span> divide el rango en 50 intervalos.</text:p>
        </text:list-item>
        <text:list-item>
          <text:p text:style-name="P10"><text:soft-page-break/><text:span text:style-name="Source_20_Text">bins=500</text:span> divide el rango en 500 intervalos.</text:p>
        </text:list-item>
        <text:list-item>
          <text:p text:style-name="P10">Pocos bins → gráfico basto.</text:p>
        </text:list-item>
        <text:list-item>
          <text:p text:style-name="P10">Demasiados bins → gráfico ruidoso o serrado.</text:p>
        </text:list-item>
      </text:list>
      <text:h text:style-name="Heading_20_3" text:outline-level="3">4.2 Normalización del histograma</text:h>
      <text:p text:style-name="Text_20_body">El curso usaba:</text:p>
      <text:p text:style-name="P2"><text:span text:style-name="Source_20_Text">normed=1</text:span></text:p>
      <text:p text:style-name="Text_20_body">En versiones modernas:</text:p>
      <text:p text:style-name="P2"><text:span text:style-name="Source_20_Text">density=True</text:span></text:p>
      <text:p text:style-name="Text_20_body">Se aclaró:</text:p>
      <text:list text:style-name="L10">
        <text:list-item>
          <text:p text:style-name="P11">No significa que la altura máxima sea 1.</text:p>
        </text:list-item>
        <text:list-item>
          <text:p text:style-name="P11">Significa que el área total bajo el histograma vale 1.</text:p>
        </text:list-item>
        <text:list-item>
          <text:p text:style-name="P11">Esto permite compararlo con una PDF teórica.</text:p>
        </text:list-item>
      </text:list>
      <text:h text:style-name="Heading_20_3" text:outline-level="3">4.3 Error encontrado: <text:span text:style-name="Source_20_Text">density=True</text:span></text:h>
      <text:p text:style-name="Text_20_body">El usuario tuvo este error:</text:p>
      <text:p text:style-name="P2"><text:span text:style-name="Source_20_Text">AttributeError: Unknown property density</text:span></text:p>
      <text:p text:style-name="Text_20_body">Se explicó que el entorno era antiguo. La solución era usar:</text:p>
      <text:p text:style-name="P2"><text:span text:style-name="Source_20_Text">ms['LogReturn'].dropna().hist(bins=50, normed=True, figsize=(15, 8))</text:span></text:p>
      <text:p text:style-name="Text_20_body">O directamente:</text:p>
      <text:p text:style-name="P2"><text:span text:style-name="Source_20_Text">plt.hist(ms['LogReturn'].dropna(), bins=50, normed=True)</text:span></text:p>
      <text:h text:style-name="Heading_20_3" text:outline-level="3">4.4 PDF — Probability Density Function</text:h>
      <text:p text:style-name="Text_20_body">Se trabajó mucho el concepto de PDF:</text:p>
      <text:list text:style-name="L11">
        <text:list-item>
          <text:p text:style-name="P12">PDF = <text:span text:style-name="Strong_20_Emphasis">Probability Density Function</text:span> = función de densidad de probabilidad.</text:p>
        </text:list-item>
        <text:list-item>
          <text:p text:style-name="P12">No da probabilidad exacta en un punto.</text:p>
        </text:list-item>
        <text:list-item>
          <text:p text:style-name="P12">En una variable continua, la probabilidad de un punto exacto es 0.</text:p>
        </text:list-item>
        <text:list-item>
          <text:p text:style-name="P12">La probabilidad real es el área bajo la curva entre dos puntos.</text:p>
        </text:list-item>
      </text:list>
      <text:p text:style-name="Text_20_body">Ejemplo:</text:p>
      <text:p text:style-name="P2"><text:span text:style-name="Source_20_Text">P(0.03 ≤ X ≤ 0.031) ≈ f(0.03) * 0.001</text:span></text:p>
      <text:p text:style-name="Text_20_body">La PDF mide densidad local, no probabilidad directa.</text:p>
      <text:p text:style-name="Text_20_body">Frase consolidada:</text:p>
      <text:p text:style-name="Preformatted_20_Text"><text:span text:style-name="Source_20_Text">PDF = densidad local alrededor de un valor.</text:span></text:p>
      <text:p text:style-name="P2"><text:span text:style-name="Source_20_Text">Probabilidad = área bajo la curva en un intervalo.</text:span></text:p>
      <text:h text:style-name="Heading_20_3" text:outline-level="3"><text:soft-page-break/>4.5 CDF — Cumulative Distribution Function</text:h>
      <text:p text:style-name="Text_20_body">La CDF se definió como:</text:p>
      <text:p text:style-name="P2"><text:span text:style-name="Source_20_Text">F(x) = P(X ≤ x)</text:span></text:p>
      <text:p text:style-name="Text_20_body">Es decir:</text:p>
      <text:list text:style-name="L12">
        <text:list-item>
          <text:p text:style-name="P13">Acumula probabilidad desde la izquierda hasta <text:span text:style-name="Source_20_Text">x</text:span>.</text:p>
        </text:list-item>
        <text:list-item>
          <text:p text:style-name="P13">Devuelve un número entre 0 y 1.</text:p>
        </text:list-item>
        <text:list-item>
          <text:p text:style-name="P13">Sirve para calcular probabilidades de estar por debajo de un umbral.</text:p>
        </text:list-item>
      </text:list>
      <text:p text:style-name="Text_20_body">Ejemplo:</text:p>
      <text:p text:style-name="P2"><text:span text:style-name="Source_20_Text">norm.cdf(np.log(0.90), mu, sigma)</text:span></text:p>
      <text:p text:style-name="Text_20_body">Significa:</text:p>
      <text:p text:style-name="P2"><text:span text:style-name="Source_20_Text">Probabilidad de que el log return sea menor o igual que log(0.90), es decir, caída del 10% o más.</text:span></text:p>
      <text:p text:style-name="Text_20_body">Para probabilidades por encima:</text:p>
      <text:p text:style-name="P2"><text:span text:style-name="Source_20_Text">1 - norm.cdf(np.log(1.03), mu, sigma)</text:span></text:p>
      <text:p text:style-name="Text_20_body">Significa:</text:p>
      <text:p text:style-name="P2"><text:span text:style-name="Source_20_Text">Probabilidad de subir 3% o más.</text:span></text:p>
      <text:p text:style-name="Horizontal_20_Line"/>
      <text:h text:style-name="Heading_20_2" text:outline-level="2">5. PPF, quantiles y VaR</text:h>
      <text:h text:style-name="Heading_20_3" text:outline-level="3">5.1 PPF</text:h>
      <text:p text:style-name="Text_20_body">PPF = <text:span text:style-name="Strong_20_Emphasis">Percent Point Function</text:span>.</text:p>
      <text:p text:style-name="Text_20_body">Se explicó como la inversa de la CDF.</text:p>
      <text:list text:style-name="L13">
        <text:list-item>
          <text:p text:style-name="P14">CDF: dado un valor, devuelve probabilidad acumulada.</text:p>
        </text:list-item>
        <text:list-item>
          <text:p text:style-name="P14">PPF: dada una probabilidad, devuelve el valor que deja esa probabilidad a la izquierda.</text:p>
        </text:list-item>
      </text:list>
      <text:p text:style-name="P2"><text:span text:style-name="Source_20_Text">norm.ppf(0.05, mu, sigma)</text:span></text:p>
      <text:p text:style-name="Text_20_body">Significa:</text:p>
      <text:p text:style-name="P2"><text:span text:style-name="Source_20_Text">Dame el valor por debajo del cual cae el 5% de los retornos.</text:span></text:p>
      <text:h text:style-name="Heading_20_3" text:outline-level="3">5.2 Quantile</text:h>
      <text:p text:style-name="Text_20_body">Un <text:span text:style-name="Strong_20_Emphasis">quantile</text:span> (<text:span text:style-name="Emphasis">cuantil</text:span>) es un punto de corte.</text:p>
      <text:p text:style-name="Text_20_body">Ejemplo:</text:p>
      <text:list text:style-name="L14">
        <text:list-item>
          <text:p text:style-name="P15">5% quantile: valor que deja el 5% de observaciones por debajo.</text:p>
        </text:list-item>
        <text:list-item>
          <text:p text:style-name="P15"><text:soft-page-break/>25% quantile: valor que deja el 25% por debajo.</text:p>
        </text:list-item>
        <text:list-item>
          <text:p text:style-name="P15">95% quantile: valor que deja el 95% por debajo.</text:p>
        </text:list-item>
      </text:list>
      <text:p text:style-name="Text_20_body">Se aclaró una confusión:</text:p>
      <text:p text:style-name="Preformatted_20_Text"><text:span text:style-name="Source_20_Text">q95 = 0.024 no significa “95% de probabilidad de ganar 2.4%”.</text:span></text:p>
      <text:p text:style-name="P2"><text:span text:style-name="Source_20_Text">Significa “el 95% de los retornos están por debajo de +2.4%”.</text:span></text:p>
      <text:h text:style-name="Heading_20_3" text:outline-level="3">5.3 VaR — Value at Risk</text:h>
      <text:p text:style-name="Text_20_body">VaR = <text:span text:style-name="Strong_20_Emphasis">Value at Risk</text:span> = valor en riesgo.</text:p>
      <text:p text:style-name="Text_20_body">Si:</text:p>
      <text:p text:style-name="P2"><text:span text:style-name="Source_20_Text">VaR = norm.ppf(0.05, mu, sigma)</text:span></text:p>
      <text:p text:style-name="Text_20_body">y sale <text:span text:style-name="Source_20_Text">-0.03</text:span>, significa:</text:p>
      <text:p text:style-name="P2"><text:span text:style-name="Source_20_Text">El 5% peor de los días tiene retornos iguales o peores que -3%.</text:span></text:p>
      <text:p text:style-name="Text_20_body">En lenguaje financiero:</text:p>
      <text:p text:style-name="P2"><text:span text:style-name="Source_20_Text">95% VaR ≈ pérdida máxima esperada en el 95% de los casos, dejando fuera el 5% peor.</text:span></text:p>
      <text:p text:style-name="Text_20_body">Se aclaró el signo:</text:p>
      <text:list text:style-name="L15">
        <text:list-item>
          <text:p text:style-name="P16">Cuantil del retorno: <text:span text:style-name="Source_20_Text">-3%</text:span>.</text:p>
        </text:list-item>
        <text:list-item>
          <text:p text:style-name="P16">VaR reportado como pérdida positiva: <text:span text:style-name="Source_20_Text">3%</text:span>.</text:p>
        </text:list-item>
      </text:list>
      <text:p text:style-name="Horizontal_20_Line"/>
      <text:h text:style-name="Heading_20_2" text:outline-level="2">6. Fat tails y limitación de la normal</text:h>
      <text:p text:style-name="Text_20_body">En el vídeo se mostró la diapositiva “Is it safe to use Normal Distribution?” con la cita de Fama y French.</text:p>
      <text:p text:style-name="Text_20_body">Idea central:</text:p>
      <text:list text:style-name="L16">
        <text:list-item>
          <text:p text:style-name="P17">Los retornos diarios y mensuales suelen ser más o menos simétricos alrededor de su media.</text:p>
        </text:list-item>
        <text:list-item>
          <text:p text:style-name="P17">Pero tienen <text:span text:style-name="Strong_20_Emphasis">fatter tails</text:span> (<text:span text:style-name="Emphasis">colas más pesadas</text:span>) que una normal.</text:p>
        </text:list-item>
      </text:list>
      <text:p text:style-name="Text_20_body">Significa:</text:p>
      <text:list text:style-name="L17">
        <text:list-item>
          <text:p text:style-name="P18">Hay más valores extremos de los que predice la normal.</text:p>
        </text:list-item>
        <text:list-item>
          <text:p text:style-name="P18">La normal puede infravalorar crashes y subidas extremas.</text:p>
        </text:list-item>
        <text:list-item>
          <text:p text:style-name="P18">El VaR basado en normal puede ser demasiado optimista.</text:p>
        </text:list-item>
      </text:list>
      <text:p text:style-name="Text_20_body">Se introdujo la <text:span text:style-name="Strong_20_Emphasis">t-distribution</text:span> (<text:span text:style-name="Emphasis">distribución t de Student</text:span>) como alternativa con colas más pesadas.</text:p>
      <text:p text:style-name="Horizontal_20_Line"/>
      <text:h text:style-name="Heading_20_2" text:outline-level="2"><text:soft-page-break/>7. Escalado temporal: de retorno diario a retorno anual</text:h>
      <text:p text:style-name="Text_20_body">El curso calculaba probabilidades de caídas en 220 días.</text:p>
      <text:p text:style-name="Text_20_body">Se explicó:</text:p>
      <text:p text:style-name="Preformatted_20_Text"><text:span text:style-name="Source_20_Text">mu220 = 220 * mu</text:span></text:p>
      <text:p text:style-name="P2"><text:span text:style-name="Source_20_Text">sigma220 = sqrt(220) * sigma</text:span></text:p>
      <text:h text:style-name="Heading_20_3" text:outline-level="3">7.1 Por qué <text:span text:style-name="Source_20_Text">mu220 = 220 * mu</text:span></text:h>
      <text:p text:style-name="Text_20_body">Si el retorno logarítmico total de 220 días es suma de retornos diarios:</text:p>
      <text:p text:style-name="P2"><text:span text:style-name="Source_20_Text">S_220 = X1 + X2 + ... + X220</text:span></text:p>
      <text:p text:style-name="Text_20_body">Entonces la media esperada suma:</text:p>
      <text:p text:style-name="P2"><text:span text:style-name="Source_20_Text">E[S_220] = 220 * mu</text:span></text:p>
      <text:h text:style-name="Heading_20_3" text:outline-level="3">7.2 Por qué <text:span text:style-name="Source_20_Text">sigma220 = sqrt(220) * sigma</text:span></text:h>
      <text:p text:style-name="Text_20_body">Las varianzas suman si se asume independencia:</text:p>
      <text:p text:style-name="P2"><text:span text:style-name="Source_20_Text">Var(S_220) = 220 * sigma²</text:span></text:p>
      <text:p text:style-name="Text_20_body">La desviación típica es la raíz:</text:p>
      <text:p text:style-name="P2"><text:span text:style-name="Source_20_Text">Std(S_220) = sqrt(220 * sigma²) = sqrt(220) * sigma</text:span></text:p>
      <text:p text:style-name="Text_20_body">Se aclaró que esta independencia de retornos diarios es una simplificación fuerte.</text:p>
      <text:h text:style-name="Heading_20_3" text:outline-level="3">7.3 Corrección para caídas porcentuales usando log returns</text:h>
      <text:p text:style-name="Text_20_body">Para caída del 40%:</text:p>
      <text:list text:style-name="L18">
        <text:list-item>
          <text:p text:style-name="P19">El precio queda en 60% del inicial.</text:p>
        </text:list-item>
        <text:list-item>
          <text:p text:style-name="P19">Umbral log correcto:</text:p>
        </text:list-item>
      </text:list>
      <text:p text:style-name="P2"><text:span text:style-name="Source_20_Text">np.log(0.60)</text:span></text:p>
      <text:p text:style-name="Text_20_body">No <text:span text:style-name="Source_20_Text">np.log(0.40)</text:span>.</text:p>
      <text:p text:style-name="Text_20_body">Para caída del 20%:</text:p>
      <text:p text:style-name="P2"><text:span text:style-name="Source_20_Text">np.log(0.80)</text:span></text:p>
      <text:p text:style-name="Horizontal_20_Line"/>
      <text:h text:style-name="Heading_20_2" text:outline-level="2">8. Módulo 3: Population, Sample, Parameter, Statistic</text:h>
      <text:h text:style-name="Heading_20_3" text:outline-level="3">8.1 Population y Sample</text:h>
      <text:p text:style-name="Text_20_body"><text:span text:style-name="Strong_20_Emphasis">Population</text:span> (<text:span text:style-name="Emphasis">población</text:span>): conjunto completo que se quiere estudiar.</text:p>
      <text:p text:style-name="Text_20_body"><text:span text:style-name="Strong_20_Emphasis">Sample</text:span> (<text:span text:style-name="Emphasis">muestra</text:span>): subconjunto de la población.</text:p>
      <text:p text:style-name="Text_20_body">En finanzas hay dos formas de verlo:</text:p>
      <text:list text:style-name="L19">
        <text:list-item>
          <text:p text:style-name="P20"><text:soft-page-break/>Población finita: todos los retornos históricos disponibles.</text:p>
        </text:list-item>
        <text:list-item>
          <text:p text:style-name="P20">Población conceptual: todos los retornos posibles generados por el proceso real del mercado, incluyendo futuro no observado.</text:p>
        </text:list-item>
      </text:list>
      <text:p text:style-name="Text_20_body">Para inferencia, normalmente interesa la segunda. Los datos históricos son una muestra del proceso real.</text:p>
      <text:h text:style-name="Heading_20_3" text:outline-level="3">8.2 Random Sampling</text:h>
      <text:p text:style-name="Text_20_body"><text:span text:style-name="Strong_20_Emphasis">Random sampling</text:span> = muestreo aleatorio.</text:p>
      <text:p text:style-name="Text_20_body">Dos tipos:</text:p>
      <text:list text:style-name="L20">
        <text:list-item>
          <text:p text:style-name="P21"><text:span text:style-name="Strong_20_Emphasis">Without replacement</text:span> (<text:span text:style-name="Emphasis">sin reemplazo</text:span>): no se devuelve el elemento; no puede repetirse.</text:p>
        </text:list-item>
        <text:list-item>
          <text:p text:style-name="P21"><text:span text:style-name="Strong_20_Emphasis">With replacement</text:span> (<text:span text:style-name="Emphasis">con reemplazo</text:span>): se devuelve el elemento; puede repetirse.</text:p>
        </text:list-item>
      </text:list>
      <text:p text:style-name="Text_20_body">En pandas:</text:p>
      <text:p text:style-name="Preformatted_20_Text"><text:span text:style-name="Source_20_Text">population.sample(n=5, replace=False)</text:span></text:p>
      <text:p text:style-name="P2"><text:span text:style-name="Source_20_Text">population.sample(n=5, replace=True)</text:span></text:p>
      <text:h text:style-name="Heading_20_3" text:outline-level="3">8.3 Parameter vs Statistic</text:h>
      <text:p text:style-name="Text_20_body"><text:span text:style-name="Strong_20_Emphasis">Parameter</text:span> (<text:span text:style-name="Emphasis">parámetro</text:span>): número que describe la población.</text:p>
      <text:p text:style-name="Text_20_body">Ejemplos:</text:p>
      <text:list text:style-name="L21">
        <text:list-item>
          <text:p text:style-name="P22">Media poblacional.</text:p>
        </text:list-item>
        <text:list-item>
          <text:p text:style-name="P22">Varianza poblacional.</text:p>
        </text:list-item>
        <text:list-item>
          <text:p text:style-name="P22">Desviación típica poblacional.</text:p>
        </text:list-item>
      </text:list>
      <text:p text:style-name="Text_20_body"><text:span text:style-name="Strong_20_Emphasis">Statistic</text:span> (<text:span text:style-name="Emphasis">estadístico</text:span>): número que describe una muestra.</text:p>
      <text:p text:style-name="Text_20_body">Ejemplos:</text:p>
      <text:list text:style-name="L22">
        <text:list-item>
          <text:p text:style-name="P23">Media muestral.</text:p>
        </text:list-item>
        <text:list-item>
          <text:p text:style-name="P23">Varianza muestral.</text:p>
        </text:list-item>
        <text:list-item>
          <text:p text:style-name="P23">Desviación típica muestral.</text:p>
        </text:list-item>
      </text:list>
      <text:p text:style-name="Text_20_body">Notación:</text:p>
      <text:list text:style-name="L23">
        <text:list-item>
          <text:p text:style-name="P24">Media poblacional: <text:span text:style-name="Source_20_Text">μ</text:span>.</text:p>
        </text:list-item>
        <text:list-item>
          <text:p text:style-name="P24">Media muestral: <text:span text:style-name="Source_20_Text">x̄</text:span>.</text:p>
        </text:list-item>
      </text:list>
      <text:p text:style-name="Horizontal_20_Line"/>
      <text:h text:style-name="Heading_20_2" text:outline-level="2">9. Varianza muestral, <text:span text:style-name="Source_20_Text">ddof</text:span> y grados de libertad</text:h>
      <text:h text:style-name="Heading_20_3" text:outline-level="3">9.1 <text:span text:style-name="Source_20_Text">ddof=0</text:span> y <text:span text:style-name="Source_20_Text">ddof=1</text:span></text:h>
      <text:p text:style-name="Text_20_body">Para población completa:</text:p>
      <text:p text:style-name="P2"><text:soft-page-break/><text:span text:style-name="Source_20_Text">population.var(ddof=0)</text:span></text:p>
      <text:p text:style-name="Text_20_body">Divide por <text:span text:style-name="Source_20_Text">N</text:span>.</text:p>
      <text:p text:style-name="Text_20_body">Para muestra:</text:p>
      <text:p text:style-name="P2"><text:span text:style-name="Source_20_Text">sample.var(ddof=1)</text:span></text:p>
      <text:p text:style-name="Text_20_body">Divide por <text:span text:style-name="Source_20_Text">n-1</text:span>.</text:p>
      <text:h text:style-name="Heading_20_3" text:outline-level="3">9.2 Por qué <text:span text:style-name="Source_20_Text">n-1</text:span></text:h>
      <text:p text:style-name="Text_20_body">Cuando calculamos varianza muestral, usamos la media de la muestra, no la media real de la población.</text:p>
      <text:p text:style-name="Text_20_body">Eso hace que las desviaciones respecto a esa media salgan algo minimizadas por construcción.</text:p>
      <text:p text:style-name="Text_20_body">Dividir por <text:span text:style-name="Source_20_Text">n-1</text:span> corrige el sesgo a la baja.</text:p>
      <text:p text:style-name="Text_20_body">Esto se llama <text:span text:style-name="Strong_20_Emphasis">Bessel’s correction</text:span> (<text:span text:style-name="Emphasis">corrección de Bessel</text:span>).</text:p>
      <text:h text:style-name="Heading_20_3" text:outline-level="3">9.3 Degrees of Freedom</text:h>
      <text:p text:style-name="Text_20_body"><text:span text:style-name="Strong_20_Emphasis">Degrees of freedom</text:span> (<text:span text:style-name="Emphasis">grados de libertad</text:span>) = número de valores que pueden variar libremente una vez impuesta una restricción.</text:p>
      <text:p text:style-name="Text_20_body">Ejemplo visto:</text:p>
      <text:list text:style-name="L24">
        <text:list-item>
          <text:p text:style-name="P25"><text:span text:style-name="Source_20_Text">n = 3</text:span></text:p>
        </text:list-item>
        <text:list-item>
          <text:p text:style-name="P25"><text:span text:style-name="Source_20_Text">x̄ = 100</text:span></text:p>
        </text:list-item>
      </text:list>
      <text:p text:style-name="Text_20_body">Entonces:</text:p>
      <text:p text:style-name="P2"><text:span text:style-name="Source_20_Text">x1 + x2 + x3 = 300</text:span></text:p>
      <text:p text:style-name="Text_20_body">Si eliges:</text:p>
      <text:p text:style-name="Preformatted_20_Text"><text:span text:style-name="Source_20_Text">x1 = 90</text:span></text:p>
      <text:p text:style-name="P2"><text:span text:style-name="Source_20_Text">x2 = 80</text:span></text:p>
      <text:p text:style-name="Text_20_body">entonces:</text:p>
      <text:p text:style-name="P2"><text:span text:style-name="Source_20_Text">x3 = 130</text:span></text:p>
      <text:p text:style-name="Text_20_body">El tercer valor ya no es libre.</text:p>
      <text:p text:style-name="Text_20_body">Con una media fijada, se pierde un grado de libertad:</text:p>
      <text:p text:style-name="P2"><text:span text:style-name="Source_20_Text">degrees of freedom = n - 1</text:span></text:p>
      <text:p text:style-name="Horizontal_20_Line"/>
      <text:h text:style-name="Heading_20_2" text:outline-level="2">10. Variation of Sample y distribución de la media muestral</text:h>
      <text:h text:style-name="Heading_20_3" text:outline-level="3">10.1 Idea principal</text:h>
      <text:p text:style-name="Text_20_body">Una muestra concreta puede tener una media distinta de otra muestra.</text:p>
      <text:p text:style-name="Text_20_body"><text:soft-page-break/>Si repetimos el muestreo muchas veces y calculamos una media por muestra, obtenemos muchas medias muestrales.</text:p>
      <text:p text:style-name="Text_20_body">Esas medias forman la <text:span text:style-name="Strong_20_Emphasis">sampling distribution of the sample mean</text:span> (<text:span text:style-name="Emphasis">distribución de la media muestral</text:span>).</text:p>
      <text:h text:style-name="Heading_20_3" text:outline-level="3">10.2 Código del curso</text:h>
      <text:p text:style-name="Preformatted_20_Text"><text:span text:style-name="Source_20_Text">meanlist = []</text:span></text:p>
      <text:p text:style-name="Preformatted_20_Text"><text:span text:style-name="Source_20_Text">varlist = []</text:span></text:p>
      <text:p text:style-name="Preformatted_20_Text"><text:span text:style-name="Source_20_Text">for t in range(1000):</text:span></text:p>
      <text:p text:style-name="Preformatted_20_Text"><text:span text:style-name="Source_20_Text"><text:s text:c="4"/>sample = pd.DataFrame(np.random.normal(10, 5, size=30))</text:span></text:p>
      <text:p text:style-name="Preformatted_20_Text"><text:span text:style-name="Source_20_Text"><text:s text:c="4"/>meanlist.append(sample[0].mean())</text:span></text:p>
      <text:p text:style-name="P2"><text:span text:style-name="Source_20_Text"><text:s text:c="4"/>varlist.append(sample[0].var(ddof=1))</text:span></text:p>
      <text:p text:style-name="Text_20_body">Se explicó:</text:p>
      <text:list text:style-name="L25">
        <text:list-item>
          <text:p text:style-name="P26"><text:span text:style-name="Source_20_Text">np.random.normal(10, 5, size=30)</text:span> genera 30 valores aleatorios de una normal con media 10 y desviación típica 5.</text:p>
        </text:list-item>
        <text:list-item>
          <text:p text:style-name="P26"><text:span text:style-name="Source_20_Text">pd.DataFrame(...)</text:span> los mete en una tabla de pandas.</text:p>
        </text:list-item>
        <text:list-item>
          <text:p text:style-name="P26"><text:span text:style-name="Source_20_Text">sample[0]</text:span> no es el primer valor, sino la primera columna completa.</text:p>
        </text:list-item>
        <text:list-item>
          <text:p text:style-name="P26"><text:span text:style-name="Source_20_Text">sample[0].mean()</text:span> calcula la media de esa muestra.</text:p>
        </text:list-item>
        <text:list-item>
          <text:p text:style-name="P26"><text:span text:style-name="Source_20_Text">sample[0].var(ddof=1)</text:span> calcula su varianza muestral.</text:p>
        </text:list-item>
        <text:list-item>
          <text:p text:style-name="P26">El bucle repite esto 1000 veces.</text:p>
        </text:list-item>
      </text:list>
      <text:p text:style-name="Text_20_body">Resultado:</text:p>
      <text:list text:style-name="L26">
        <text:list-item>
          <text:p text:style-name="P27"><text:span text:style-name="Source_20_Text">meanlist</text:span> contiene 1000 medias muestrales.</text:p>
        </text:list-item>
        <text:list-item>
          <text:p text:style-name="P27"><text:span text:style-name="Source_20_Text">varlist</text:span> contiene 1000 varianzas muestrales.</text:p>
        </text:list-item>
      </text:list>
      <text:h text:style-name="Heading_20_3" text:outline-level="3">10.3 Histograma de medias muestrales</text:h>
      <text:p text:style-name="Text_20_body">El histograma de <text:span text:style-name="Source_20_Text">meanlist</text:span> suele ser normal o aproximadamente normal.</text:p>
      <text:p text:style-name="Text_20_body">Si la población original es normal:</text:p>
      <text:p text:style-name="P2"><text:span text:style-name="Source_20_Text">X ~ N(μ, σ²)</text:span></text:p>
      <text:p text:style-name="Text_20_body">Entonces:</text:p>
      <text:p text:style-name="P2"><text:span text:style-name="Source_20_Text">x̄ ~ N(μ, σ²/n)</text:span></text:p>
      <text:p text:style-name="Text_20_body">Es decir:</text:p>
      <text:list text:style-name="L27">
        <text:list-item>
          <text:p text:style-name="P28">La media de las medias muestrales sigue centrada en <text:span text:style-name="Source_20_Text">μ</text:span>.</text:p>
        </text:list-item>
        <text:list-item>
          <text:p text:style-name="P28">La varianza de la media muestral es menor: <text:span text:style-name="Source_20_Text">σ²/n</text:span>.</text:p>
        </text:list-item>
        <text:list-item>
          <text:p text:style-name="P28">La desviación típica de la media muestral es <text:span text:style-name="Source_20_Text">σ/sqrt(n)</text:span>.</text:p>
        </text:list-item>
      </text:list>
      <text:h text:style-name="Heading_20_3" text:outline-level="3"><text:soft-page-break/>10.4 Histograma de varianzas muestrales</text:h>
      <text:p text:style-name="Text_20_body">El histograma de <text:span text:style-name="Source_20_Text">varlist</text:span> no es normal. Suele ser <text:span text:style-name="Strong_20_Emphasis">right-skewed</text:span> (<text:span text:style-name="Emphasis">sesgado a la derecha</text:span>):</text:p>
      <text:list text:style-name="L28">
        <text:list-item>
          <text:p text:style-name="P29">No es simétrico.</text:p>
        </text:list-item>
        <text:list-item>
          <text:p text:style-name="P29">Tiene cola más larga hacia valores grandes.</text:p>
        </text:list-item>
        <text:list-item>
          <text:p text:style-name="P29">Tiene sentido porque la varianza no puede ser negativa y a veces puede salir muy alta.</text:p>
        </text:list-item>
      </text:list>
      <text:p text:style-name="Horizontal_20_Line"/>
      <text:h text:style-name="Heading_20_2" text:outline-level="2">11. Standard Error</text:h>
      <text:h text:style-name="Heading_20_3" text:outline-level="3">11.1 Definición</text:h>
      <text:p text:style-name="Text_20_body">El <text:span text:style-name="Strong_20_Emphasis">standard error</text:span> (<text:span text:style-name="Emphasis">error estándar</text:span>) de la media es la desviación típica de las medias muestrales.</text:p>
      <text:p text:style-name="Text_20_body">Fórmula:</text:p>
      <text:p text:style-name="P2"><text:span text:style-name="Source_20_Text">SE = σ / sqrt(n)</text:span></text:p>
      <text:p text:style-name="Text_20_body">Si no conocemos <text:span text:style-name="Source_20_Text">σ</text:span>, usamos <text:span text:style-name="Source_20_Text">s</text:span>:</text:p>
      <text:p text:style-name="P2"><text:span text:style-name="Source_20_Text">SE ≈ s / sqrt(n)</text:span></text:p>
      <text:h text:style-name="Heading_20_3" text:outline-level="3">11.2 Qué mide</text:h>
      <text:p text:style-name="Text_20_body">Mide cuánto suele alejarse una media muestral de la media poblacional.</text:p>
      <text:p text:style-name="Text_20_body">No mide la dispersión de los datos individuales.</text:p>
      <text:p text:style-name="Text_20_body">Mide la dispersión de las medias muestrales.</text:p>
      <text:h text:style-name="Heading_20_3" text:outline-level="3">11.3 Diferencia con la varianza de la media muestral</text:h>
      <text:p text:style-name="Preformatted_20_Text"><text:span text:style-name="Source_20_Text">Var(x̄) = σ² / n</text:span></text:p>
      <text:p text:style-name="P2"><text:span text:style-name="Source_20_Text">SE(x̄) = σ / sqrt(n)</text:span></text:p>
      <text:p text:style-name="Text_20_body">Relación:</text:p>
      <text:p text:style-name="P2"><text:span text:style-name="Source_20_Text">SE(x̄) = sqrt(Var(x̄))</text:span></text:p>
      <text:h text:style-name="Heading_20_3" text:outline-level="3">11.4 Efecto del tamaño muestral</text:h>
      <text:p text:style-name="Text_20_body">Si <text:span text:style-name="Source_20_Text">n</text:span> aumenta:</text:p>
      <text:list text:style-name="L29">
        <text:list-item>
          <text:p text:style-name="P30"><text:span text:style-name="Source_20_Text">SE</text:span> disminuye.</text:p>
        </text:list-item>
        <text:list-item>
          <text:p text:style-name="P30">Las medias muestrales se concentran más cerca de <text:span text:style-name="Source_20_Text">μ</text:span>.</text:p>
        </text:list-item>
        <text:list-item>
          <text:p text:style-name="P30">La campana de la media muestral se hace más estrecha y más alta.</text:p>
        </text:list-item>
      </text:list>
      <text:p text:style-name="Text_20_body">Se aclaró que “ancho” de la campana no significa ancho total infinito, sino escala de dispersión típica alrededor de <text:span text:style-name="Source_20_Text">μ</text:span>.</text:p>
      <text:p text:style-name="Horizontal_20_Line"/>
      <text:h text:style-name="Heading_20_2" text:outline-level="2"><text:soft-page-break/>12. Intervalo de confianza</text:h>
      <text:h text:style-name="Heading_20_3" text:outline-level="3">12.1 Objetivo</text:h>
      <text:p text:style-name="Text_20_body">El vídeo de <text:span text:style-name="Strong_20_Emphasis">Confidence Interval</text:span> busca estimar la media poblacional <text:span text:style-name="Source_20_Text">μ</text:span> usando un intervalo con límite inferior y superior.</text:p>
      <text:p text:style-name="Text_20_body">No se pretende encontrar <text:span text:style-name="Source_20_Text">μ</text:span> exactamente, sino construir un rango razonable a partir de una muestra.</text:p>
      <text:h text:style-name="Heading_20_3" text:outline-level="3">12.2 Estandarización con Z</text:h>
      <text:p text:style-name="Text_20_body">Fórmula:</text:p>
      <text:p text:style-name="P2"><text:span text:style-name="Source_20_Text">Z = (x̄ - μ) / (σ / sqrt(n))</text:span></text:p>
      <text:p text:style-name="Text_20_body">Se aclaró:</text:p>
      <text:list text:style-name="L30">
        <text:list-item>
          <text:p text:style-name="P31">Restar <text:span text:style-name="Source_20_Text">μ</text:span> centra la distribución en 0.</text:p>
        </text:list-item>
        <text:list-item>
          <text:p text:style-name="P31">Dividir por <text:span text:style-name="Source_20_Text">SE</text:span> convierte la distancia a unidades de error estándar.</text:p>
        </text:list-item>
        <text:list-item>
          <text:p text:style-name="P31">Z no “hace que el área sea 1”; el área ya era 1.</text:p>
        </text:list-item>
        <text:list-item>
          <text:p text:style-name="P31">Z mide cuántos errores estándar está <text:span text:style-name="Source_20_Text">x̄</text:span> por encima o por debajo de <text:span text:style-name="Source_20_Text">μ</text:span>.</text:p>
        </text:list-item>
      </text:list>
      <text:p text:style-name="Text_20_body">Ejemplos:</text:p>
      <text:list text:style-name="L31">
        <text:list-item>
          <text:p text:style-name="P32"><text:span text:style-name="Source_20_Text">Z = 2</text:span>: la media muestral está 2 errores estándar por encima de <text:span text:style-name="Source_20_Text">μ</text:span>.</text:p>
        </text:list-item>
        <text:list-item>
          <text:p text:style-name="P32"><text:span text:style-name="Source_20_Text">Z = -1.5</text:span>: está 1.5 errores estándar por debajo.</text:p>
        </text:list-item>
      </text:list>
      <text:h text:style-name="Heading_20_3" text:outline-level="3">12.3 Alpha</text:h>
      <text:p text:style-name="Text_20_body"><text:span text:style-name="Source_20_Text">alpha</text:span> (<text:span text:style-name="Source_20_Text">α</text:span>) es la probabilidad que dejamos fuera del intervalo central.</text:p>
      <text:p text:style-name="Text_20_body">Si el intervalo de confianza es del 80%:</text:p>
      <text:p text:style-name="Preformatted_20_Text"><text:span text:style-name="Source_20_Text">1 - α = 0.80</text:span></text:p>
      <text:p text:style-name="Preformatted_20_Text"><text:span text:style-name="Source_20_Text">α = 0.20</text:span></text:p>
      <text:p text:style-name="P2"><text:span text:style-name="Source_20_Text">α/2 = 0.10</text:span></text:p>
      <text:p text:style-name="Text_20_body">Entonces:</text:p>
      <text:list text:style-name="L32">
        <text:list-item>
          <text:p text:style-name="P33">10% queda en la cola izquierda.</text:p>
        </text:list-item>
        <text:list-item>
          <text:p text:style-name="P33">80% queda en el centro.</text:p>
        </text:list-item>
        <text:list-item>
          <text:p text:style-name="P33">10% queda en la cola derecha.</text:p>
        </text:list-item>
      </text:list>
      <text:p text:style-name="Text_20_body">Cuantiles:</text:p>
      <text:p text:style-name="Preformatted_20_Text"><text:span text:style-name="Source_20_Text">z_left = norm.ppf(0.10)</text:span></text:p>
      <text:p text:style-name="P2"><text:span text:style-name="Source_20_Text">z_right = norm.ppf(0.90)</text:span></text:p>
      <text:p text:style-name="Text_20_body">Aproximadamente:</text:p>
      <text:p text:style-name="Preformatted_20_Text"><text:span text:style-name="Source_20_Text">z_left ≈ -1.2816</text:span></text:p>
      <text:p text:style-name="P2"><text:span text:style-name="Source_20_Text">z_right ≈ 1.2816</text:span></text:p>
      <text:h text:style-name="Heading_20_3" text:outline-level="3"><text:soft-page-break/>12.4 Fórmula práctica del intervalo</text:h>
      <text:p text:style-name="Text_20_body">Forma conceptual:</text:p>
      <text:p text:style-name="P2"><text:span text:style-name="Source_20_Text">x̄ ± z * SE</text:span></text:p>
      <text:p text:style-name="Text_20_body">Forma completa:</text:p>
      <text:p text:style-name="P2"><text:span text:style-name="Source_20_Text">x̄ - z * σ/sqrt(n) ≤ μ ≤ x̄ + z * σ/sqrt(n)</text:span></text:p>
      <text:p text:style-name="Text_20_body">Si usamos cuantiles con signo:</text:p>
      <text:p text:style-name="Preformatted_20_Text"><text:span text:style-name="Source_20_Text">interval_left = sample_mean + z_left * sample_std</text:span></text:p>
      <text:p text:style-name="P2"><text:span text:style-name="Source_20_Text">interval_right = sample_mean + z_right * sample_std</text:span></text:p>
      <text:p text:style-name="Text_20_body">Donde <text:span text:style-name="Source_20_Text">sample_std</text:span> en el código del curso realmente representa el error estándar estimado:</text:p>
      <text:p text:style-name="P2"><text:span text:style-name="Source_20_Text">sample_std = aapl['logReturn'].std(ddof=1) / (aapl.shape[0])**0.5</text:span></text:p>
      <text:p text:style-name="Text_20_body">Nombre mejor:</text:p>
      <text:p text:style-name="P2"><text:span text:style-name="Source_20_Text">sample_se = aapl['logReturn'].std(ddof=1) / np.sqrt(aapl.shape[0])</text:span></text:p>
      <text:h text:style-name="Heading_20_3" text:outline-level="3">12.5 Código del curso</text:h>
      <text:p text:style-name="Preformatted_20_Text"><text:span text:style-name="Source_20_Text">aapl = pd.DataFrame.from_csv('data/apple.csv')</text:span></text:p>
      <text:p text:style-name="Preformatted_20_Text"><text:span text:style-name="Source_20_Text">aapl['logReturn'] = np.log(aapl['Close'].shift(-1)) - np.log(aapl['Close'])</text:span></text:p>
      <text:p text:style-name="Preformatted_20_Text"/>
      <text:p text:style-name="Preformatted_20_Text"><text:span text:style-name="Source_20_Text">z_left = norm.ppf(0.1)</text:span></text:p>
      <text:p text:style-name="Preformatted_20_Text"><text:span text:style-name="Source_20_Text">z_right = norm.ppf(0.9)</text:span></text:p>
      <text:p text:style-name="Preformatted_20_Text"><text:span text:style-name="Source_20_Text">sample_mean = aapl['logReturn'].mean()</text:span></text:p>
      <text:p text:style-name="Preformatted_20_Text"><text:span text:style-name="Source_20_Text">sample_std = aapl['logReturn'].std(ddof=1) / (aapl.shape[0])**0.5</text:span></text:p>
      <text:p text:style-name="Preformatted_20_Text"/>
      <text:p text:style-name="Preformatted_20_Text"><text:span text:style-name="Source_20_Text">interval_left = sample_mean + z_left * sample_std</text:span></text:p>
      <text:p text:style-name="P2"><text:span text:style-name="Source_20_Text">interval_right = sample_mean + z_right * sample_std</text:span></text:p>
      <text:p text:style-name="Text_20_body">Se explicó:</text:p>
      <text:list text:style-name="L33">
        <text:list-item>
          <text:p text:style-name="P34"><text:span text:style-name="Source_20_Text">z_left</text:span>: cuantil izquierdo para dejar 10% en cola izquierda.</text:p>
        </text:list-item>
        <text:list-item>
          <text:p text:style-name="P34"><text:span text:style-name="Source_20_Text">z_right</text:span>: cuantil derecho para dejar 90% acumulado, dejando 10% en cola derecha.</text:p>
        </text:list-item>
        <text:list-item>
          <text:p text:style-name="P34"><text:span text:style-name="Source_20_Text">sample_mean</text:span>: media muestral de los log returns.</text:p>
        </text:list-item>
        <text:list-item>
          <text:p text:style-name="P34"><text:span text:style-name="Source_20_Text">sample_std</text:span>: mal nombre; realmente es error estándar.</text:p>
        </text:list-item>
        <text:list-item>
          <text:p text:style-name="P34"><text:span text:style-name="Source_20_Text">interval_left</text:span>: límite inferior.</text:p>
        </text:list-item>
        <text:list-item>
          <text:p text:style-name="P34"><text:span text:style-name="Source_20_Text">interval_right</text:span>: límite superior.</text:p>
        </text:list-item>
      </text:list>
      <text:h text:style-name="Heading_20_3" text:outline-level="3">12.6 Interpretación correcta</text:h>
      <text:p text:style-name="Text_20_body">No es correcto decir:</text:p>
      <text:p text:style-name="P2"><text:span text:style-name="Source_20_Text">Hay un 80% de probabilidad de que μ esté dentro de este intervalo concreto.</text:span></text:p>
      <text:p text:style-name="Text_20_body">La interpretación frecuentista correcta es:</text:p>
      <text:p text:style-name="P2"><text:soft-page-break/><text:span text:style-name="Source_20_Text">Si repitiéramos el proceso muchas veces —tomar muestra, calcular media, construir intervalo— aproximadamente el 80% de esos intervalos contendrían la verdadera media poblacional μ.</text:span></text:p>
      <text:p text:style-name="Text_20_body">Claves:</text:p>
      <text:list text:style-name="L34">
        <text:list-item>
          <text:p text:style-name="P35"><text:span text:style-name="Source_20_Text">μ</text:span> es fija, aunque desconocida.</text:p>
        </text:list-item>
        <text:list-item>
          <text:p text:style-name="P35">El intervalo cambia con cada muestra.</text:p>
        </text:list-item>
        <text:list-item>
          <text:p text:style-name="P35">Algunos intervalos contienen <text:span text:style-name="Source_20_Text">μ</text:span>; otros no.</text:p>
        </text:list-item>
        <text:list-item>
          <text:p text:style-name="P35">El 80% se refiere al método repetido, no a la probabilidad literal de este intervalo concreto.</text:p>
        </text:list-item>
      </text:list>
      <text:p text:style-name="Horizontal_20_Line"/>
      <text:h text:style-name="Heading_20_2" text:outline-level="2">13. Test de validación realizado</text:h>
      <text:p text:style-name="Text_20_body">Se hicieron 10 preguntas sobre:</text:p>
      <text:list text:style-name="L35">
        <text:list-item>
          <text:p text:style-name="P36">Population vs sample.</text:p>
        </text:list-item>
        <text:list-item>
          <text:p text:style-name="P36">Sample mean.</text:p>
        </text:list-item>
        <text:list-item>
          <text:p text:style-name="P36">Sampling distribution.</text:p>
        </text:list-item>
        <text:list-item>
          <text:p text:style-name="P36">Standard error.</text:p>
        </text:list-item>
        <text:list-item>
          <text:p text:style-name="P36">Efecto de <text:span text:style-name="Source_20_Text">n</text:span>.</text:p>
        </text:list-item>
        <text:list-item>
          <text:p text:style-name="P36">Varianza vs standard error.</text:p>
        </text:list-item>
        <text:list-item>
          <text:p text:style-name="P36">Z-score.</text:p>
        </text:list-item>
        <text:list-item>
          <text:p text:style-name="P36">Alpha.</text:p>
        </text:list-item>
        <text:list-item>
          <text:p text:style-name="P36">Confidence interval.</text:p>
        </text:list-item>
        <text:list-item>
          <text:p text:style-name="P36">Interpretación correcta.</text:p>
        </text:list-item>
      </text:list>
      <text:h text:style-name="Heading_20_3" text:outline-level="3">13.1 Resultado</text:h>
      <text:p text:style-name="Text_20_body">El usuario mostró comprensión sólida en:</text:p>
      <text:list text:style-name="L36">
        <text:list-item>
          <text:p text:style-name="P37">Población vs muestra.</text:p>
        </text:list-item>
        <text:list-item>
          <text:p text:style-name="P37">Media muestral.</text:p>
        </text:list-item>
        <text:list-item>
          <text:p text:style-name="P37">Distribución de medias muestrales.</text:p>
        </text:list-item>
        <text:list-item>
          <text:p text:style-name="P37">Standard error.</text:p>
        </text:list-item>
        <text:list-item>
          <text:p text:style-name="P37">Efecto de <text:span text:style-name="Source_20_Text">n</text:span>.</text:p>
        </text:list-item>
        <text:list-item>
          <text:p text:style-name="P37">Diferencia básica entre varianza y error estándar.</text:p>
        </text:list-item>
        <text:list-item>
          <text:p text:style-name="P37">Alpha y colas.</text:p>
        </text:list-item>
      </text:list>
      <text:h text:style-name="Heading_20_3" text:outline-level="3"><text:soft-page-break/>13.2 Correcciones necesarias</text:h>
      <text:p text:style-name="Text_20_body">Se corrigieron tres puntos:</text:p>
      <text:list text:style-name="L37">
        <text:list-item>
          <text:p text:style-name="P38">Z no normaliza el área; mide distancia en errores estándar.</text:p>
        </text:list-item>
        <text:list-item>
          <text:p text:style-name="P38">El intervalo de confianza no garantiza contener <text:span text:style-name="Source_20_Text">μ</text:span>.</text:p>
        </text:list-item>
        <text:list-item>
          <text:p text:style-name="P38">El nivel de confianza se refiere al rendimiento del método repetido, no a una probabilidad literal sobre el intervalo ya calculado.</text:p>
        </text:list-item>
      </text:list>
      <text:h text:style-name="Heading_20_3" text:outline-level="3">13.3 Veredicto</text:h>
      <text:p text:style-name="Text_20_body">El nivel se estimó en torno a <text:span text:style-name="Strong_20_Emphasis">75–80% operativo</text:span>, suficiente para pasar a la siguiente lección: <text:span text:style-name="Strong_20_Emphasis">hypothesis testing</text:span> (<text:span text:style-name="Emphasis">contraste de hipótesis</text:span>).</text:p>
      <text:p text:style-name="Horizontal_20_Line"/>
      <text:h text:style-name="Heading_20_2" text:outline-level="2">14. Dificultad percibida y reflexión sobre el curso</text:h>
      <text:p text:style-name="Text_20_body">El usuario expresó frustración porque el curso exige mucha explicación adicional. Se identificó que:</text:p>
      <text:list text:style-name="L38">
        <text:list-item>
          <text:p text:style-name="P39">El curso va rápido.</text:p>
        </text:list-item>
        <text:list-item>
          <text:p text:style-name="P39">Da por supuestos conceptos previos de estadística.</text:p>
        </text:list-item>
        <text:list-item>
          <text:p text:style-name="P39">Mezcla código, fórmulas y teoría sin suficiente intuición.</text:p>
        </text:list-item>
        <text:list-item>
          <text:p text:style-name="P39">Habla de términos como cuantil, inferencia, distribución muestral o intervalo de confianza como si fueran obvios.</text:p>
        </text:list-item>
      </text:list>
      <text:p text:style-name="Text_20_body">Se concluyó que la dificultad no indica falta de capacidad, sino que estadística es abstracta y menos intuitiva que otras áreas matemáticas más visuales como física, geometría, matrices o videojuegos.</text:p>
      <text:p text:style-name="Text_20_body">Se advirtió también sobre un patrón del usuario:</text:p>
      <text:p text:style-name="P2"><text:span text:style-name="Source_20_Text">Intentar cerrar cada concepto al 100% antes de avanzar puede ralentizar demasiado.</text:span></text:p>
      <text:p text:style-name="Text_20_body">Recomendación:</text:p>
      <text:p text:style-name="P2"><text:span text:style-name="Source_20_Text">Avanzar cuando se pueda usar el 70–80% del concepto sin humo.</text:span></text:p>
      <text:p text:style-name="Horizontal_20_Line"/>
      <text:h text:style-name="Heading_20_2" text:outline-level="2">15. Reflexión profesional: FinTech, banca, matemáticas y mercado laboral</text:h>
      <text:h text:style-name="Heading_20_3" text:outline-level="3">15.1 Duda inicial</text:h>
      <text:p text:style-name="Text_20_body">El usuario se preguntó si los salarios altos en banca de inversión y fintech se deben a:</text:p>
      <text:list text:style-name="L39">
        <text:list-item>
          <text:p text:style-name="P40">Mayor dinero disponible.</text:p>
        </text:list-item>
        <text:list-item>
          <text:p text:style-name="P40">Menos candidatos interesados.</text:p>
        </text:list-item>
        <text:list-item>
          <text:p text:style-name="P40">Mayor abstracción.</text:p>
        </text:list-item>
        <text:list-item>
          <text:p text:style-name="P40"><text:soft-page-break/>Mayor exigencia matemática.</text:p>
        </text:list-item>
        <text:list-item>
          <text:p text:style-name="P40">Sector más denso o menos atractivo que videojuegos.</text:p>
        </text:list-item>
      </text:list>
      <text:h text:style-name="Heading_20_3" text:outline-level="3">15.2 Respuesta consolidada</text:h>
      <text:p text:style-name="Text_20_body">Se explicó que los salarios altos en finanzas no se deben solo a matemáticas.</text:p>
      <text:p text:style-name="Text_20_body">Factores reales:</text:p>
      <text:list text:style-name="L40">
        <text:list-item>
          <text:p text:style-name="P41">Sector con mucho dinero.</text:p>
        </text:list-item>
        <text:list-item>
          <text:p text:style-name="P41">Riesgo operativo y financiero elevado.</text:p>
        </text:list-item>
        <text:list-item>
          <text:p text:style-name="P41">Errores caros.</text:p>
        </text:list-item>
        <text:list-item>
          <text:p text:style-name="P41">Regulación.</text:p>
        </text:list-item>
        <text:list-item>
          <text:p text:style-name="P41">Domain knowledge (<text:span text:style-name="Emphasis">conocimiento de dominio</text:span>).</text:p>
        </text:list-item>
        <text:list-item>
          <text:p text:style-name="P41">Menos candidatos atraídos por el sector.</text:p>
        </text:list-item>
        <text:list-item>
          <text:p text:style-name="P41">Sistemas críticos.</text:p>
        </text:list-item>
        <text:list-item>
          <text:p text:style-name="P41">Necesidad de fiabilidad, testing, integración y trazabilidad.</text:p>
        </text:list-item>
      </text:list>
      <text:h text:style-name="Heading_20_3" text:outline-level="3">15.3 Diferencia entre roles</text:h>
      <text:p text:style-name="Text_20_body">Se separaron roles:</text:p>
      <text:h text:style-name="Heading_20_4" text:outline-level="4">Quant / Research / Risk Modeling</text:h>
      <text:list text:style-name="L41">
        <text:list-item>
          <text:p text:style-name="P42">Mucha estadística.</text:p>
        </text:list-item>
        <text:list-item>
          <text:p text:style-name="P42">Probabilidad avanzada.</text:p>
        </text:list-item>
        <text:list-item>
          <text:p text:style-name="P42">Modelos matemáticos.</text:p>
        </text:list-item>
        <text:list-item>
          <text:p text:style-name="P42">A veces cálculo estocástico.</text:p>
        </text:list-item>
      </text:list>
      <text:h text:style-name="Heading_20_4" text:outline-level="4">Software Engineer en FinTech / Trading Systems / Backend financiero</text:h>
      <text:list text:style-name="L42">
        <text:list-item>
          <text:p text:style-name="P43">Menos matemática dura.</text:p>
        </text:list-item>
        <text:list-item>
          <text:p text:style-name="P43">Más Java, Spring, SQL, APIs, testing, cloud, CI/CD, observabilidad.</text:p>
        </text:list-item>
        <text:list-item>
          <text:p text:style-name="P43">Dominio financiero útil, pero no siempre imprescindible.</text:p>
        </text:list-item>
      </text:list>
      <text:p text:style-name="Text_20_body">Se concluyó que el perfil del usuario encaja más en:</text:p>
      <text:p text:style-name="P2"><text:span text:style-name="Source_20_Text">Engineering in financial systems</text:span></text:p>
      <text:p text:style-name="Text_20_body">que en:</text:p>
      <text:p text:style-name="P2"><text:span text:style-name="Source_20_Text">Pure quant finance</text:span></text:p>
      <text:h text:style-name="Heading_20_3" text:outline-level="3">15.4 Revisión de ofertas</text:h>
      <text:p text:style-name="Text_20_body">El usuario revisó ofertas de Irlanda y vio que muchas pedían requisitos estándar de ingeniería:</text:p>
      <text:list text:style-name="L43">
        <text:list-item>
          <text:p text:style-name="P44"><text:soft-page-break/>SOLID.</text:p>
        </text:list-item>
        <text:list-item>
          <text:p text:style-name="P44">Java.</text:p>
        </text:list-item>
        <text:list-item>
          <text:p text:style-name="P44">Spring.</text:p>
        </text:list-item>
        <text:list-item>
          <text:p text:style-name="P44">Fullstack.</text:p>
        </text:list-item>
        <text:list-item>
          <text:p text:style-name="P44">Testing.</text:p>
        </text:list-item>
        <text:list-item>
          <text:p text:style-name="P44">Arquitectura.</text:p>
        </text:list-item>
        <text:list-item>
          <text:p text:style-name="P44">Cloud básico.</text:p>
        </text:list-item>
        <text:list-item>
          <text:p text:style-name="P44">CI/CD.</text:p>
        </text:list-item>
        <text:list-item>
          <text:p text:style-name="P44">Buenas prácticas.</text:p>
        </text:list-item>
      </text:list>
      <text:p text:style-name="Text_20_body">No aparecían normalmente requisitos matemáticos fuertes ni experiencia financiera profunda.</text:p>
      <text:p text:style-name="Text_20_body">Conclusión:</text:p>
      <text:p text:style-name="P2"><text:span text:style-name="Source_20_Text">La estadística sirve como base, pero no debe bloquear el avance profesional.</text:span></text:p>
      <text:p text:style-name="Horizontal_20_Line"/>
      <text:h text:style-name="Heading_20_2" text:outline-level="2">16. Reorientación del esfuerzo de estudio</text:h>
      <text:p text:style-name="Text_20_body">Se acordó que tiene sentido terminar el curso, pero sin obsesionarse.</text:p>
      <text:p text:style-name="Text_20_body">Nueva prioridad recomendada:</text:p>
      <text:list text:style-name="L44">
        <text:list-item>
          <text:p text:style-name="P45">Terminar el curso con comprensión suficiente.</text:p>
        </text:list-item>
        <text:list-item>
          <text:p text:style-name="P45">Reforzar ingeniería software:</text:p>
          <text:list>
            <text:list-item>
              <text:p text:style-name="P45">SOLID.</text:p>
            </text:list-item>
            <text:list-item>
              <text:p text:style-name="P45">Clean code.</text:p>
            </text:list-item>
            <text:list-item>
              <text:p text:style-name="P45">Testing.</text:p>
            </text:list-item>
            <text:list-item>
              <text:p text:style-name="P45">Java/Spring.</text:p>
            </text:list-item>
            <text:list-item>
              <text:p text:style-name="P45">APIs.</text:p>
            </text:list-item>
            <text:list-item>
              <text:p text:style-name="P45">SQL.</text:p>
            </text:list-item>
            <text:list-item>
              <text:p text:style-name="P45">CI/CD.</text:p>
            </text:list-item>
            <text:list-item>
              <text:p text:style-name="P45">System design.</text:p>
            </text:list-item>
          </text:list>
        </text:list-item>
        <text:list-item>
          <text:p text:style-name="P45">Usar Python/estadística como complemento FinTech.</text:p>
        </text:list-item>
        <text:list-item>
          <text:p text:style-name="P45">Trabajar agentes de IA de forma práctica, no como moda.</text:p>
        </text:list-item>
        <text:list-item>
          <text:p text:style-name="P45">Construir portfolio técnico visible.</text:p>
        </text:list-item>
      </text:list>
      <text:p text:style-name="Text_20_body">Se advirtió:</text:p>
      <text:p text:style-name="P2"><text:span text:style-name="Source_20_Text">No pasar del error de obsesionarse con estadística al error contrario de ignorarla por completo.</text:span></text:p>
      <text:p text:style-name="Horizontal_20_Line"><text:soft-page-break/></text:p>
      <text:h text:style-name="Heading_20_2" text:outline-level="2">17. Documentos generados durante el chat</text:h>
      <text:p text:style-name="Text_20_body">Se generaron dos documentos Word sobre el vídeo de intervalo de confianza.</text:p>
      <text:h text:style-name="Heading_20_3" text:outline-level="3">17.1 Primer documento</text:h>
      <text:p text:style-name="Text_20_body">El usuario indicó que no servía suficientemente porque:</text:p>
      <text:list text:style-name="L45">
        <text:list-item>
          <text:p text:style-name="P46">Copiaba demasiado el texto original.</text:p>
        </text:list-item>
        <text:list-item>
          <text:p text:style-name="P46">La traducción estaba separada.</text:p>
        </text:list-item>
        <text:list-item>
          <text:p text:style-name="P46">Faltaban explicaciones.</text:p>
        </text:list-item>
        <text:list-item>
          <text:p text:style-name="P46">No se explicaba bien <text:span text:style-name="Source_20_Text">alpha</text:span>.</text:p>
        </text:list-item>
        <text:list-item>
          <text:p text:style-name="P46">No seguía bloque por bloque texto → traducción → explicación.</text:p>
        </text:list-item>
        <text:list-item>
          <text:p text:style-name="P46">Incluía pocas imágenes.</text:p>
        </text:list-item>
      </text:list>
      <text:h text:style-name="Heading_20_3" text:outline-level="3">17.2 Segundo documento</text:h>
      <text:p text:style-name="Text_20_body">Se rehízo con mejor estructura:</text:p>
      <text:list text:style-name="L46">
        <text:list-item>
          <text:p text:style-name="P47">Bloques cortos del vídeo.</text:p>
        </text:list-item>
        <text:list-item>
          <text:p text:style-name="P47">Texto original.</text:p>
        </text:list-item>
        <text:list-item>
          <text:p text:style-name="P47">Traducción inmediata.</text:p>
        </text:list-item>
        <text:list-item>
          <text:p text:style-name="P47">Explicación detallada.</text:p>
        </text:list-item>
        <text:list-item>
          <text:p text:style-name="P47">Ejemplos.</text:p>
        </text:list-item>
        <text:list-item>
          <text:p text:style-name="P47">Fórmulas.</text:p>
        </text:list-item>
        <text:list-item>
          <text:p text:style-name="P47">Código comentado.</text:p>
        </text:list-item>
        <text:list-item>
          <text:p text:style-name="P47">Diagramas recreados.</text:p>
        </text:list-item>
      </text:list>
      <text:p text:style-name="Text_20_body">El usuario valoró que el segundo documento estaba “bastante bien”.</text:p>
      <text:p text:style-name="Horizontal_20_Line"/>
      <text:h text:style-name="Heading_20_2" text:outline-level="2">18. Conceptos clave consolidados en inglés/español</text:h>
      <text:list text:style-name="L47">
        <text:list-item>
          <text:p text:style-name="P48"><text:span text:style-name="Strong_20_Emphasis">Population</text:span>: población.</text:p>
        </text:list-item>
        <text:list-item>
          <text:p text:style-name="P48"><text:span text:style-name="Strong_20_Emphasis">Sample</text:span>: muestra.</text:p>
        </text:list-item>
        <text:list-item>
          <text:p text:style-name="P48"><text:span text:style-name="Strong_20_Emphasis">Random sampling</text:span>: muestreo aleatorio.</text:p>
        </text:list-item>
        <text:list-item>
          <text:p text:style-name="P48"><text:span text:style-name="Strong_20_Emphasis">With replacement</text:span>: con reemplazo.</text:p>
        </text:list-item>
        <text:list-item>
          <text:p text:style-name="P48"><text:span text:style-name="Strong_20_Emphasis">Without replacement</text:span>: sin reemplazo.</text:p>
        </text:list-item>
        <text:list-item>
          <text:p text:style-name="P48"><text:span text:style-name="Strong_20_Emphasis">Parameter</text:span>: parámetro poblacional.</text:p>
        </text:list-item>
        <text:list-item>
          <text:p text:style-name="P48"><text:soft-page-break/><text:span text:style-name="Strong_20_Emphasis">Statistic</text:span>: estadístico muestral.</text:p>
        </text:list-item>
        <text:list-item>
          <text:p text:style-name="P48"><text:span text:style-name="Strong_20_Emphasis">Sample mean</text:span>: media muestral.</text:p>
        </text:list-item>
        <text:list-item>
          <text:p text:style-name="P48"><text:span text:style-name="Strong_20_Emphasis">Population mean</text:span>: media poblacional.</text:p>
        </text:list-item>
        <text:list-item>
          <text:p text:style-name="P48"><text:span text:style-name="Strong_20_Emphasis">Variance</text:span>: varianza.</text:p>
        </text:list-item>
        <text:list-item>
          <text:p text:style-name="P48"><text:span text:style-name="Strong_20_Emphasis">Standard deviation</text:span>: desviación típica.</text:p>
        </text:list-item>
        <text:list-item>
          <text:p text:style-name="P48"><text:span text:style-name="Strong_20_Emphasis">Standard error</text:span>: error estándar.</text:p>
        </text:list-item>
        <text:list-item>
          <text:p text:style-name="P48"><text:span text:style-name="Strong_20_Emphasis">Sampling distribution</text:span>: distribución muestral.</text:p>
        </text:list-item>
        <text:list-item>
          <text:p text:style-name="P48"><text:span text:style-name="Strong_20_Emphasis">Central Limit Theorem</text:span>: Teorema Central del Límite.</text:p>
        </text:list-item>
        <text:list-item>
          <text:p text:style-name="P48"><text:span text:style-name="Strong_20_Emphasis">PDF</text:span>: función de densidad de probabilidad.</text:p>
        </text:list-item>
        <text:list-item>
          <text:p text:style-name="P48"><text:span text:style-name="Strong_20_Emphasis">CDF</text:span>: función de distribución acumulada.</text:p>
        </text:list-item>
        <text:list-item>
          <text:p text:style-name="P48"><text:span text:style-name="Strong_20_Emphasis">PPF</text:span>: función inversa de la CDF / percent point function.</text:p>
        </text:list-item>
        <text:list-item>
          <text:p text:style-name="P48"><text:span text:style-name="Strong_20_Emphasis">Quantile</text:span>: cuantil.</text:p>
        </text:list-item>
        <text:list-item>
          <text:p text:style-name="P48"><text:span text:style-name="Strong_20_Emphasis">VaR</text:span>: Value at Risk / valor en riesgo.</text:p>
        </text:list-item>
        <text:list-item>
          <text:p text:style-name="P48"><text:span text:style-name="Strong_20_Emphasis">Fat tails</text:span>: colas pesadas.</text:p>
        </text:list-item>
        <text:list-item>
          <text:p text:style-name="P48"><text:span text:style-name="Strong_20_Emphasis">Z-score</text:span>: puntuación Z.</text:p>
        </text:list-item>
        <text:list-item>
          <text:p text:style-name="P48"><text:span text:style-name="Strong_20_Emphasis">Alpha</text:span>: probabilidad fuera del intervalo central.</text:p>
        </text:list-item>
        <text:list-item>
          <text:p text:style-name="P48"><text:span text:style-name="Strong_20_Emphasis">Confidence interval</text:span>: intervalo de confianza.</text:p>
        </text:list-item>
        <text:list-item>
          <text:p text:style-name="P48"><text:span text:style-name="Strong_20_Emphasis">Hypothesis testing</text:span>: contraste de hipótesis.</text:p>
        </text:list-item>
      </text:list>
      <text:p text:style-name="Horizontal_20_Line"/>
      <text:h text:style-name="Heading_20_2" text:outline-level="2">19. Fórmulas clave consolidadas</text:h>
      <text:h text:style-name="Heading_20_3" text:outline-level="3">Log return</text:h>
      <text:p text:style-name="P2"><text:span text:style-name="Source_20_Text">LogReturn = ln(P_{t+1} / P_t)</text:span></text:p>
      <text:h text:style-name="Heading_20_3" text:outline-level="3">Simple return</text:h>
      <text:p text:style-name="P2"><text:span text:style-name="Source_20_Text">SimpleReturn = P_{t+1}/P_t - 1</text:span></text:p>
      <text:h text:style-name="Heading_20_3" text:outline-level="3">CDF</text:h>
      <text:p text:style-name="P2"><text:span text:style-name="Source_20_Text">F(x) = P(X ≤ x)</text:span></text:p>
      <text:h text:style-name="Heading_20_3" text:outline-level="3">Standard error</text:h>
      <text:p text:style-name="P2"><text:span text:style-name="Source_20_Text">SE = σ / sqrt(n)</text:span></text:p>
      <text:h text:style-name="Heading_20_3" text:outline-level="3">Varianza de la media muestral</text:h>
      <text:p text:style-name="P2"><text:span text:style-name="Source_20_Text">Var(x̄) = σ² / n</text:span></text:p>
      <text:h text:style-name="Heading_20_3" text:outline-level="3"><text:soft-page-break/>Distribución de la media muestral si la población es normal</text:h>
      <text:p text:style-name="Preformatted_20_Text"><text:span text:style-name="Source_20_Text">X ~ N(μ, σ²)</text:span></text:p>
      <text:p text:style-name="P2"><text:span text:style-name="Source_20_Text">x̄ ~ N(μ, σ²/n)</text:span></text:p>
      <text:h text:style-name="Heading_20_3" text:outline-level="3">Z-score de la media muestral</text:h>
      <text:p text:style-name="P2"><text:span text:style-name="Source_20_Text">Z = (x̄ - μ) / (σ / sqrt(n))</text:span></text:p>
      <text:h text:style-name="Heading_20_3" text:outline-level="3">Intervalo de confianza</text:h>
      <text:p text:style-name="P2"><text:span text:style-name="Source_20_Text">x̄ ± z * SE</text:span></text:p>
      <text:h text:style-name="Heading_20_3" text:outline-level="3">Escalado temporal de log returns</text:h>
      <text:p text:style-name="Preformatted_20_Text"><text:span text:style-name="Source_20_Text">mu_T = T * mu</text:span></text:p>
      <text:p text:style-name="P2"><text:span text:style-name="Source_20_Text">sigma_T = sqrt(T) * sigma</text:span></text:p>
      <text:p text:style-name="Horizontal_20_Line"/>
      <text:h text:style-name="Heading_20_2" text:outline-level="2">20. Errores y matices importantes corregidos</text:h>
      <text:list text:style-name="L48">
        <text:list-item>
          <text:p text:style-name="P49"><text:span text:style-name="Source_20_Text">density=True</text:span> puede fallar en entornos antiguos; usar <text:span text:style-name="Source_20_Text">normed=True</text:span>.</text:p>
        </text:list-item>
        <text:list-item>
          <text:p text:style-name="P49"><text:span text:style-name="Source_20_Text">sample[0]</text:span> en un DataFrame no es el primer elemento, sino la columna 0 completa.</text:p>
        </text:list-item>
        <text:list-item>
          <text:p text:style-name="P49">La PDF no da probabilidad en un punto.</text:p>
        </text:list-item>
        <text:list-item>
          <text:p text:style-name="P49">La CDF acumula probabilidad hasta un punto.</text:p>
        </text:list-item>
        <text:list-item>
          <text:p text:style-name="P49">La PPF devuelve el punto dado un nivel de probabilidad.</text:p>
        </text:list-item>
        <text:list-item>
          <text:p text:style-name="P49"><text:span text:style-name="Source_20_Text">np.log(0.90)</text:span> es el umbral correcto para caída del 10% con log returns.</text:p>
        </text:list-item>
        <text:list-item>
          <text:p text:style-name="P49">Para caída del 40%, el umbral correcto es <text:span text:style-name="Source_20_Text">np.log(0.60)</text:span>, no <text:span text:style-name="Source_20_Text">np.log(0.40)</text:span>.</text:p>
        </text:list-item>
        <text:list-item>
          <text:p text:style-name="P49"><text:span text:style-name="Source_20_Text">N(μ, σ²)</text:span> significa distribución normal, no tamaño de población.</text:p>
        </text:list-item>
        <text:list-item>
          <text:p text:style-name="P49">La varianza de la media muestral es <text:span text:style-name="Source_20_Text">σ²/n</text:span>, no <text:span text:style-name="Source_20_Text">σ²/sqrt(n)</text:span>.</text:p>
        </text:list-item>
        <text:list-item>
          <text:p text:style-name="P49">El error estándar es <text:span text:style-name="Source_20_Text">σ/sqrt(n)</text:span>.</text:p>
        </text:list-item>
        <text:list-item>
          <text:p text:style-name="P49">Z no normaliza el área; convierte a unidades de error estándar.</text:p>
        </text:list-item>
        <text:list-item>
          <text:p text:style-name="P49">El intervalo de confianza no garantiza contener <text:span text:style-name="Source_20_Text">μ</text:span>.</text:p>
        </text:list-item>
        <text:list-item>
          <text:p text:style-name="P49">El nivel de confianza se interpreta como cobertura del método repetido.</text:p>
        </text:list-item>
        <text:list-item>
          <text:p text:style-name="P49">La normal puede subestimar colas extremas en retornos financieros.</text:p>
        </text:list-item>
        <text:list-item>
          <text:p text:style-name="P49">El código del curso usa nombres confusos como <text:span text:style-name="Source_20_Text">sample_std</text:span> para algo que realmente es <text:span text:style-name="Source_20_Text">standard error</text:span>.</text:p>
        </text:list-item>
      </text:list>
      <text:p text:style-name="Horizontal_20_Line"/>
      <text:h text:style-name="Heading_20_2" text:outline-level="2"><text:soft-page-break/>21. Estado actual del aprendizaje</text:h>
      <text:p text:style-name="Text_20_body">El usuario ha entendido operativamente:</text:p>
      <text:list text:style-name="L49">
        <text:list-item>
          <text:p text:style-name="P50">Modelado de retornos con log returns.</text:p>
        </text:list-item>
        <text:list-item>
          <text:p text:style-name="P50">Histograma, PDF, CDF y PPF.</text:p>
        </text:list-item>
        <text:list-item>
          <text:p text:style-name="P50">Quantiles y VaR.</text:p>
        </text:list-item>
        <text:list-item>
          <text:p text:style-name="P50">Normal distribution y sus limitaciones.</text:p>
        </text:list-item>
        <text:list-item>
          <text:p text:style-name="P50">Fat tails.</text:p>
        </text:list-item>
        <text:list-item>
          <text:p text:style-name="P50">Escalado temporal básico.</text:p>
        </text:list-item>
        <text:list-item>
          <text:p text:style-name="P50">Population vs sample.</text:p>
        </text:list-item>
        <text:list-item>
          <text:p text:style-name="P50">Parameter vs statistic.</text:p>
        </text:list-item>
        <text:list-item>
          <text:p text:style-name="P50">ddof, varianza muestral y grados de libertad.</text:p>
        </text:list-item>
        <text:list-item>
          <text:p text:style-name="P50">Sampling distribution.</text:p>
        </text:list-item>
        <text:list-item>
          <text:p text:style-name="P50">Standard error.</text:p>
        </text:list-item>
        <text:list-item>
          <text:p text:style-name="P50">Fundamento del confidence interval.</text:p>
        </text:list-item>
        <text:list-item>
          <text:p text:style-name="P50">Interpretación correcta del intervalo de confianza.</text:p>
        </text:list-item>
      </text:list>
      <text:p text:style-name="Text_20_body">El usuario aún debe consolidar:</text:p>
      <text:list text:style-name="L50">
        <text:list-item>
          <text:p text:style-name="P51">Manipulación algebraica de fórmulas estadísticas.</text:p>
        </text:list-item>
        <text:list-item>
          <text:p text:style-name="P51">Interpretación intuitiva de intervalos de confianza.</text:p>
        </text:list-item>
        <text:list-item>
          <text:p text:style-name="P51">Conexión entre Z, alpha, quantiles y confidence interval.</text:p>
        </text:list-item>
        <text:list-item>
          <text:p text:style-name="P51">Uso práctico en código sin perderse en notación.</text:p>
        </text:list-item>
      </text:list>
      <text:p text:style-name="Text_20_body">Nivel estimado:</text:p>
      <text:p text:style-name="P2"><text:span text:style-name="Source_20_Text">Suficiente para avanzar a hypothesis testing, con repaso ligero de confidence interval si aparece duda.</text:span></text:p>
      <text:p text:style-name="Horizontal_20_Line"/>
      <text:h text:style-name="Heading_20_2" text:outline-level="2">22. Próximo paso recomendado</text:h>
      <text:p text:style-name="Text_20_body">Pasar a la lección de <text:span text:style-name="Strong_20_Emphasis">Hypothesis Testing</text:span> (<text:span text:style-name="Emphasis">contraste de hipótesis</text:span>), teniendo en mente que se apoyará en lo ya visto:</text:p>
      <text:list text:style-name="L51">
        <text:list-item>
          <text:p text:style-name="P52">Sampling distribution.</text:p>
        </text:list-item>
        <text:list-item>
          <text:p text:style-name="P52">Standard error.</text:p>
        </text:list-item>
        <text:list-item>
          <text:p text:style-name="P52">Z-score.</text:p>
        </text:list-item>
        <text:list-item>
          <text:p text:style-name="P52">Alpha.</text:p>
        </text:list-item>
        <text:list-item>
          <text:p text:style-name="P52">Cola izquierda / cola derecha.</text:p>
        </text:list-item>
        <text:list-item>
          <text:p text:style-name="P52"><text:soft-page-break/>P-value.</text:p>
        </text:list-item>
        <text:list-item>
          <text:p text:style-name="P52">Confidence interval.</text:p>
        </text:list-item>
      </text:list>
      <text:p text:style-name="Text_20_body">Recomendación de estudio:</text:p>
      <text:list text:style-name="L52">
        <text:list-item>
          <text:p text:style-name="P53">No intentar entender cada fórmula al 100% antes de ver el contexto.</text:p>
        </text:list-item>
        <text:list-item>
          <text:p text:style-name="P53">Buscar primero la pregunta práctica:</text:p>
          <text:list>
            <text:list-item>
              <text:p text:style-name="P53">¿Qué quiero comprobar?</text:p>
            </text:list-item>
            <text:list-item>
              <text:p text:style-name="P53">¿Cuál es mi hipótesis?</text:p>
            </text:list-item>
            <text:list-item>
              <text:p text:style-name="P53">¿Qué probabilidad tendría ver este resultado si la hipótesis nula fuera cierta?</text:p>
            </text:list-item>
          </text:list>
        </text:list-item>
        <text:list-item>
          <text:p text:style-name="P53">Volver luego al detalle matemático.</text:p>
        </text:list-item>
      </text:list>
      <text:p text:style-name="Text_20_body">Frase guía:</text:p>
      <text:p text:style-name="P2"><text:span text:style-name="Source_20_Text">El contraste de hipótesis no pregunta “cuál es la media real”, sino “si una afirmación sobre la media fuera cierta, ¿sería raro observar lo que he observado?”.</text:span></text:p>
      <text:p text:style-name="Horizontal_20_Line"/>
      <text:h text:style-name="Heading_20_2" text:outline-level="2">23. Conclusión general del memorando</text:h>
      <text:p text:style-name="Text_20_body">Este chat ha servido para transformar un bloque estadístico muy denso del curso en una comprensión operativa. El usuario no solo ha repasado código, sino que ha construido intuición sobre distribuciones, probabilidad acumulada, estimación, error, incertidumbre y límites del modelo normal.</text:p>
      <text:p text:style-name="Text_20_body">A nivel profesional, se ha reajustado la estrategia: la estadística es útil y debe entenderse lo suficiente, pero el foco laboral más rentable para el usuario probablemente no es convertirse en quant puro, sino reforzar ingeniería software aplicada a sistemas financieros, datos, automatización y backend/fullstack con dominio financiero progresivo.</text:p>
      <text:p text:style-name="Text_20_body">La recomendación final es avanzar: terminar el curso sin perfeccionismo excesivo, consolidar el 70–80% operativo y dedicar cada vez más energía a portfolio técnico, ingeniería de software y oportunidades reales en FinTech/Java/backend/fullstac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7T09:50:03.081809000</meta:creation-date>
    <dc:date>2026-05-27T09:50:42.783008500</dc:date>
    <meta:editing-duration>PT40S</meta:editing-duration>
    <meta:editing-cycles>1</meta:editing-cycles>
    <meta:generator>LibreOffice/26.2.2.2$Windows_X86_64 LibreOffice_project/1f77d10d6938fd34972958f64b2bcfa54f8b1ba5</meta:generator>
    <meta:document-statistic meta:table-count="0" meta:image-count="0" meta:object-count="0" meta:page-count="22" meta:paragraph-count="600" meta:word-count="4033" meta:character-count="24523" meta:non-whitespace-character-count="21357"/>
  </office:meta>
</office:document-meta>
</file>