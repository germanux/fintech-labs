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body" svg:font-family="apple-system-body, ui-sans-serif, apple-system, system-ui, 'Segoe UI', Helvetica, 'Apple Color Emoji', Arial, sans-serif, 'Segoe UI Emoji', 'Segoe UI Symbol'"/>
  </office:font-face-decls>
  <office:automatic-styles>
    <style:style style:name="Table1" style:family="table">
      <style:table-properties style:width="3.157cm" fo:margin-left="8.864cm" table:align="left"/>
    </style:style>
    <style:style style:name="Table1.A" style:family="table-column">
      <style:table-column-properties style:column-width="1.905cm"/>
    </style:style>
    <style:style style:name="Table1.B" style:family="table-column">
      <style:table-column-properties style:column-width="1.252cm"/>
    </style:style>
    <style:style style:name="Table1.A1" style:family="table-cell">
      <style:table-cell-properties style:vertical-align="middle" fo:padding-left="0cm" fo:padding-right="0cm" fo:padding-top="0cm" fo:padding-bottom="0.212cm" fo:border-left="none" fo:border-right="none" fo:border-top="none" fo:border-bottom="0.75pt solid #ffffff"/>
    </style:style>
    <style:style style:name="Table1.A2" style:family="table-cell">
      <style:table-cell-properties style:vertical-align="middle" fo:padding-left="0cm" fo:padding-right="0cm" fo:padding-top="0cm" fo:padding-bottom="0.265cm" fo:border-left="none" fo:border-right="none" fo:border-top="none" fo:border-bottom="0.75pt solid #ffffff"/>
    </style:style>
    <style:style style:name="Table1.A4" style:family="table-cell">
      <style:table-cell-properties style:vertical-align="middle" fo:padding-left="0.049cm" fo:padding-right="0.049cm" fo:padding-top="0.049cm" fo:padding-bottom="0.265cm" fo:border="0.05pt solid #ffffff"/>
    </style:style>
    <style:style style:name="Table2" style:family="table">
      <style:table-properties style:width="5.115cm" fo:margin-left="8.864cm" table:align="left"/>
    </style:style>
    <style:style style:name="Table2.A" style:family="table-column">
      <style:table-column-properties style:column-width="1.905cm"/>
    </style:style>
    <style:style style:name="Table2.B" style:family="table-column">
      <style:table-column-properties style:column-width="3.21cm"/>
    </style:style>
    <style:style style:name="Table2.A1" style:family="table-cell">
      <style:table-cell-properties style:vertical-align="middle" fo:padding-left="0cm" fo:padding-right="0cm" fo:padding-top="0cm" fo:padding-bottom="0.212cm" fo:border-left="none" fo:border-right="none" fo:border-top="none" fo:border-bottom="0.75pt solid #ffffff"/>
    </style:style>
    <style:style style:name="Table2.A2" style:family="table-cell">
      <style:table-cell-properties style:vertical-align="middle" fo:padding-left="0cm" fo:padding-right="0cm" fo:padding-top="0cm" fo:padding-bottom="0.265cm" fo:border-left="none" fo:border-right="none" fo:border-top="none" fo:border-bottom="0.75pt solid #ffffff"/>
    </style:style>
    <style:style style:name="Table2.A4" style:family="table-cell">
      <style:table-cell-properties style:vertical-align="middle" fo:padding-left="0.049cm" fo:padding-right="0.049cm" fo:padding-top="0.049cm" fo:padding-bottom="0.265cm" fo:border="0.05pt solid #ffffff"/>
    </style:style>
    <style:style style:name="P1" style:family="paragraph" style:parent-style-name="Standard">
      <style:paragraph-properties fo:margin-left="0cm" fo:margin-right="0cm" fo:margin-top="0cm" fo:margin-bottom="0cm" style:contextual-spacing="false" fo:orphans="1" fo:text-indent="0cm" style:auto-text-indent="false"/>
    </style:style>
    <style:style style:name="P2" style:family="paragraph" style:parent-style-name="Text_20_body" style:list-style-name="L1">
      <style:paragraph-properties fo:margin-left="0cm" fo:margin-right="0cm" fo:margin-top="0cm" fo:margin-bottom="0cm" style:contextual-spacing="false" fo:orphans="1" fo:text-indent="0cm" style:auto-text-indent="false" fo:padding="0.049cm" fo:border="0.06pt solid #ffffff"/>
      <style:text-properties fo:font-variant="normal" fo:text-transform="none" fo:color="#ffffff" loext:opacity="100%" style:font-name="apple-system-body" fo:font-size="14pt" fo:letter-spacing="normal" fo:font-style="normal" fo:font-weight="normal" fo:background-color="#000000" style:font-name-asian="apple-system-body" style:font-size-asian="14pt" style:font-style-asian="normal" style:font-weight-asian="normal" style:font-name-complex="apple-system-body" style:font-size-complex="14pt" style:font-style-complex="normal" style:font-weight-complex="normal" loext:padding-left="0.212cm" loext:padding-right="0.049cm" loext:padding-top="0.049cm" loext:padding-bottom="0.049cm" loext:border="0.06pt solid #ffffff"/>
    </style:style>
    <style:style style:name="P3" style:family="paragraph" style:parent-style-name="Text_20_body" style:list-style-name="L2">
      <style:paragraph-properties fo:margin-left="0cm" fo:margin-right="0cm" fo:margin-top="0cm" fo:margin-bottom="0cm" style:contextual-spacing="false" fo:orphans="1" fo:text-indent="0cm" style:auto-text-indent="false" fo:padding="0.049cm" fo:border="0.06pt solid #ffffff"/>
    </style:style>
    <style:style style:name="P4" style:family="paragraph" style:parent-style-name="Text_20_body" style:list-style-name="L3">
      <style:paragraph-properties fo:margin-left="0cm" fo:margin-right="0cm" fo:margin-top="0cm" fo:margin-bottom="0cm" style:contextual-spacing="false" fo:orphans="1" fo:text-indent="0cm" style:auto-text-indent="false" fo:padding="0.049cm" fo:border="0.06pt solid #ffffff"/>
    </style:style>
    <style:style style:name="P5" style:family="paragraph" style:parent-style-name="Text_20_body">
      <style:paragraph-properties fo:margin-left="0cm" fo:margin-right="0cm" fo:margin-top="0cm" fo:margin-bottom="0cm" style:contextual-spacing="false" fo:orphans="1" fo:text-indent="0cm" style:auto-text-indent="false"/>
      <style:text-properties fo:font-variant="normal" fo:text-transform="none" fo:color="#ffffff" loext:opacity="100%" style:font-name="apple-system-body" fo:font-size="14pt" fo:letter-spacing="normal" fo:font-style="normal" fo:font-weight="normal" fo:background-color="#000000" style:font-name-asian="apple-system-body" style:font-size-asian="14pt" style:font-style-asian="normal" style:font-weight-asian="normal" style:font-name-complex="apple-system-body" style:font-size-complex="14pt" style:font-style-complex="normal" style:font-weight-complex="normal" loext:padding="0.049cm" loext:border="0.06pt solid #ffffff"/>
    </style:style>
    <style:style style:name="P6"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4pt" fo:letter-spacing="normal" fo:font-style="normal" fo:font-weight="normal" style:font-name-asian="apple-system-body" style:font-size-asian="14pt" style:font-style-asian="normal" style:font-weight-asian="normal" style:font-name-complex="apple-system-body" style:font-size-complex="14pt" style:font-style-complex="normal" style:font-weight-complex="normal" loext:padding="0.049cm" loext:border="0.06pt solid #ffffff"/>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fo:color="#ffffff" loext:opacity="100%" style:font-name="apple-system-body" fo:font-size="12pt" fo:letter-spacing="normal" fo:font-style="normal" fo:font-weight="normal" loext:padding="0.049cm" loext:border="0.06pt solid #ffffff"/>
    </style:style>
    <style:style style:name="P8"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9" style:family="paragraph" style:parent-style-name="Text_20_body">
      <style:paragraph-properties fo:margin-left="0cm" fo:margin-right="0cm" fo:margin-top="0cm" fo:margin-bottom="0.423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0" style:family="paragraph" style:parent-style-name="Text_20_body" style:list-style-name="L4">
      <style:paragraph-properties fo:margin-left="0cm" fo:margin-right="0cm" fo:margin-top="0cm" fo:margin-bottom="0cm" style:contextual-spacing="false" fo:line-height="150%" fo:text-indent="0cm" style:auto-text-indent="false" fo:padding="0.049cm" fo:border="0.06pt solid #ffffff"/>
    </style:style>
    <style:style style:name="P11" style:family="paragraph" style:parent-style-name="Text_20_body">
      <style:paragraph-properties fo:margin-left="0cm" fo:margin-right="0cm" fo:margin-top="0cm" fo:margin-bottom="0cm" style:contextual-spacing="false" fo:line-height="150%" fo:text-indent="0cm" style:auto-text-indent="false" fo:padding="0.049cm" fo:border="0.06pt solid #ffffff"/>
    </style:style>
    <style:style style:name="P12" style:family="paragraph" style:parent-style-name="Text_20_body">
      <style:paragraph-properties fo:margin-left="0cm" fo:margin-right="0cm" fo:margin-top="0cm" fo:margin-bottom="0cm" style:contextual-spacing="false" fo:line-height="142%" fo:text-indent="0cm" style:auto-text-indent="false"/>
      <style:text-properties loext:padding="0.049cm" loext:border="0.06pt solid #ffffff"/>
    </style:style>
    <style:style style:name="P13"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0.5pt" fo:letter-spacing="normal" fo:font-style="normal" fo:font-weight="normal" style:font-name-asian="apple-system-body" style:font-size-asian="10.5pt" style:font-style-asian="normal" style:font-weight-asian="normal" style:font-name-complex="apple-system-body" style:font-size-complex="10.5pt" style:font-style-complex="normal" style:font-weight-complex="normal" loext:padding="0.049cm" loext:border="0.06pt solid #ffffff"/>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5">
      <style:paragraph-properties fo:margin-left="0cm" fo:margin-right="0cm" fo:margin-top="0cm" fo:margin-bottom="0cm" style:contextual-spacing="false" fo:line-height="150%" fo:text-indent="0cm" style:auto-text-indent="false" fo:padding="0.049cm" fo:border="0.06pt solid #ffffff"/>
    </style:style>
    <style:style style:name="P16" style:family="paragraph" style:parent-style-name="Horizontal_20_Line">
      <style:paragraph-properties fo:margin-left="0cm" fo:margin-right="0cm" fo:margin-top="0cm" fo:margin-bottom="0cm" style:contextual-spacing="false" fo:line-height="150%"/>
    </style:style>
    <style:style style:name="P17" style:family="paragraph" style:parent-style-name="Heading_20_2">
      <style:paragraph-properties fo:margin-left="0cm" fo:margin-right="0cm" fo:margin-top="0cm" fo:margin-bottom="0.106cm" style:contextual-spacing="false" fo:line-height="140%" fo:text-indent="0cm" style:auto-text-indent="false" fo:padding="0.049cm" fo:border="0.06pt solid #ffffff"/>
      <style:text-properties fo:font-variant="normal" fo:text-transform="none" fo:color="#ffffff" loext:opacity="100%" style:font-name="apple-system-body" fo:font-size="15pt" fo:letter-spacing="normal" fo:font-style="normal" fo:font-weight="bold" loext:padding="0.049cm" loext:border="0.06pt solid #ffffff"/>
    </style:style>
    <style:style style:name="P18" style:family="paragraph" style:parent-style-name="Preformatted_20_Text">
      <loext:graphic-properties draw:fill="none" draw:fill-color="#000000"/>
      <style:paragraph-properties fo:margin-left="0cm" fo:margin-right="0cm" fo:margin-top="0cm" fo:margin-bottom="0cm" style:contextual-spacing="false" style:line-height-at-least="0.529cm" fo:text-indent="0cm" style:auto-text-indent="false" fo:background-color="transparent" fo:padding-left="0.529cm" fo:padding-right="0cm" fo:padding-top="0.049cm" fo:padding-bottom="0.318cm" fo:border-left="0.06pt solid #ffffff" fo:border-right="none" fo:border-top="0.06pt solid #ffffff" fo:border-bottom="0.06pt solid #ffffff"/>
    </style:style>
    <style:style style:name="P19" style:family="paragraph" style:parent-style-name="Heading_20_3">
      <style:paragraph-properties fo:margin-left="0cm" fo:margin-right="0cm" fo:margin-top="0.423cm" fo:margin-bottom="0.106cm" style:contextual-spacing="false" fo:line-height="155%"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20" style:family="paragraph" style:parent-style-name="Text_20_body" style:list-style-name="L6">
      <style:paragraph-properties fo:margin-left="0cm" fo:margin-right="0cm" fo:margin-top="0cm" fo:margin-bottom="0cm" style:contextual-spacing="false" fo:line-height="150%" fo:text-indent="0cm" style:auto-text-indent="false" fo:padding="0.049cm" fo:border="0.06pt solid #ffffff"/>
    </style:style>
    <style:style style:name="P21" style:family="paragraph" style:parent-style-name="Text_20_body" style:list-style-name="L6">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22" style:family="paragraph" style:parent-style-name="Text_20_body" style:list-style-name="L7">
      <style:paragraph-properties fo:margin-left="0cm" fo:margin-right="0cm" fo:margin-top="0cm" fo:margin-bottom="0cm" style:contextual-spacing="false" fo:line-height="150%" fo:text-indent="0cm" style:auto-text-indent="false" fo:padding="0.049cm" fo:border="0.06pt solid #ffffff"/>
    </style:style>
    <style:style style:name="P23" style:family="paragraph" style:parent-style-name="Text_20_body" style:list-style-name="L8">
      <style:paragraph-properties fo:margin-left="0cm" fo:margin-right="0cm" fo:margin-top="0cm" fo:margin-bottom="0cm" style:contextual-spacing="false" fo:line-height="150%" fo:text-indent="0cm" style:auto-text-indent="false" fo:padding="0.049cm" fo:border="0.06pt solid #ffffff"/>
    </style:style>
    <style:style style:name="P24" style:family="paragraph" style:parent-style-name="Text_20_body" style:list-style-name="L9">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25" style:family="paragraph" style:parent-style-name="Text_20_body" style:list-style-name="L9">
      <style:paragraph-properties fo:margin-left="0cm" fo:margin-right="0cm" fo:margin-top="0cm" fo:margin-bottom="0cm" style:contextual-spacing="false" fo:line-height="150%" fo:text-indent="0cm" style:auto-text-indent="false" fo:padding="0.049cm" fo:border="0.06pt solid #ffffff"/>
    </style:style>
    <style:style style:name="P26" style:family="paragraph" style:parent-style-name="Text_20_body" style:list-style-name="L10">
      <style:paragraph-properties fo:margin-left="0cm" fo:margin-right="0cm" fo:margin-top="0cm" fo:margin-bottom="0cm" style:contextual-spacing="false" fo:line-height="150%" fo:text-indent="0cm" style:auto-text-indent="false" fo:padding="0.049cm" fo:border="0.06pt solid #ffffff"/>
    </style:style>
    <style:style style:name="P27" style:family="paragraph" style:parent-style-name="Text_20_body" style:list-style-name="L11">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28" style:family="paragraph" style:parent-style-name="Text_20_body" style:list-style-name="L11">
      <style:paragraph-properties fo:margin-left="0cm" fo:margin-right="0cm" fo:margin-top="0cm" fo:margin-bottom="0cm" style:contextual-spacing="false" fo:line-height="150%" fo:text-indent="0cm" style:auto-text-indent="false" fo:padding="0.049cm" fo:border="0.06pt solid #ffffff"/>
    </style:style>
    <style:style style:name="P29" style:family="paragraph" style:parent-style-name="Text_20_body" style:list-style-name="L12">
      <style:paragraph-properties fo:margin-left="0cm" fo:margin-right="0cm" fo:margin-top="0cm" fo:margin-bottom="0cm" style:contextual-spacing="false" fo:line-height="150%" fo:text-indent="0cm" style:auto-text-indent="false" fo:padding="0.049cm" fo:border="0.06pt solid #ffffff"/>
    </style:style>
    <style:style style:name="P30" style:family="paragraph" style:parent-style-name="Text_20_body" style:list-style-name="L12">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31" style:family="paragraph" style:parent-style-name="Heading_20_3">
      <style:paragraph-properties fo:margin-left="0cm" fo:margin-right="0cm" fo:margin-top="0.423cm" fo:margin-bottom="0.106cm" style:contextual-spacing="false" fo:line-height="155%" fo:text-indent="0cm" style:auto-text-indent="false" fo:padding="0.049cm" fo:border="0.06pt solid #ffffff"/>
      <style:text-properties fo:font-variant="normal" fo:text-transform="none" fo:color="#ffffff" loext:opacity="100%" style:font-name="apple-system-body" fo:font-size="13.5pt" fo:letter-spacing="normal" fo:font-style="normal" fo:font-weight="bold" loext:padding="0.049cm" loext:border="0.06pt solid #ffffff"/>
    </style:style>
    <style:style style:name="P32" style:family="paragraph" style:parent-style-name="Text_20_body" style:list-style-name="L13">
      <style:paragraph-properties fo:margin-left="0cm" fo:margin-right="0cm" fo:margin-top="0cm" fo:margin-bottom="0cm" style:contextual-spacing="false" fo:line-height="150%" fo:text-indent="0cm" style:auto-text-indent="false" fo:padding="0.049cm" fo:border="0.06pt solid #ffffff"/>
    </style:style>
    <style:style style:name="P33" style:family="paragraph" style:parent-style-name="Text_20_body" style:list-style-name="L14">
      <style:paragraph-properties fo:margin-left="0cm" fo:margin-right="0cm" fo:margin-top="0cm" fo:margin-bottom="0cm" style:contextual-spacing="false" fo:line-height="150%" fo:text-indent="0cm" style:auto-text-indent="false" fo:padding="0.049cm" fo:border="0.06pt solid #ffffff"/>
    </style:style>
    <style:style style:name="P34" style:family="paragraph" style:parent-style-name="Text_20_body" style:list-style-name="L15">
      <style:paragraph-properties fo:margin-left="0cm" fo:margin-right="0cm" fo:margin-top="0cm" fo:margin-bottom="0cm" style:contextual-spacing="false" fo:line-height="150%" fo:text-indent="0cm" style:auto-text-indent="false" fo:padding="0.049cm" fo:border="0.06pt solid #ffffff"/>
    </style:style>
    <style:style style:name="P35"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36" style:family="paragraph" style:parent-style-name="Text_20_body" style:list-style-name="L16">
      <style:paragraph-properties fo:margin-left="0cm" fo:margin-right="0cm" fo:margin-top="0cm" fo:margin-bottom="0cm" style:contextual-spacing="false" fo:line-height="150%" fo:text-indent="0cm" style:auto-text-indent="false" fo:padding="0.049cm" fo:border="0.06pt solid #ffffff"/>
    </style:style>
    <style:style style:name="P37" style:family="paragraph" style:parent-style-name="Text_20_body" style:list-style-name="L17">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38" style:family="paragraph" style:parent-style-name="Text_20_body" style:list-style-name="L18">
      <style:paragraph-properties fo:margin-left="0cm" fo:margin-right="0cm" fo:margin-top="0cm" fo:margin-bottom="0cm" style:contextual-spacing="false" fo:line-height="150%" fo:text-indent="0cm" style:auto-text-indent="false" fo:padding="0.049cm" fo:border="0.06pt solid #ffffff"/>
    </style:style>
    <style:style style:name="P39" style:family="paragraph" style:parent-style-name="Text_20_body" style:list-style-name="L19">
      <style:paragraph-properties fo:margin-left="0cm" fo:margin-right="0cm" fo:margin-top="0cm" fo:margin-bottom="0cm" style:contextual-spacing="false" fo:line-height="150%" fo:text-indent="0cm" style:auto-text-indent="false" fo:padding="0.049cm" fo:border="0.06pt solid #ffffff"/>
    </style:style>
    <style:style style:name="P40" style:family="paragraph" style:parent-style-name="Text_20_body" style:list-style-name="L19">
      <style:paragraph-properties fo:margin-left="0cm" fo:margin-right="0cm" fo:margin-top="0cm" fo:margin-bottom="0.106cm" style:contextual-spacing="false" fo:line-height="150%"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41" style:family="paragraph" style:parent-style-name="Table_20_Heading">
      <style:paragraph-properties fo:margin-left="0cm" fo:margin-right="0cm" fo:margin-top="0cm" fo:margin-bottom="0cm" style:contextual-spacing="false" fo:text-indent="0cm" style:auto-text-indent="false"/>
      <style:text-properties fo:color="#ffffff" loext:opacity="100%" fo:font-weight="bold"/>
    </style:style>
    <style:style style:name="P42" style:family="paragraph" style:parent-style-name="Table_20_Heading">
      <style:paragraph-properties fo:margin-left="0cm" fo:margin-right="0cm" fo:margin-top="0cm" fo:margin-bottom="0cm" style:contextual-spacing="false" fo:text-align="right" style:justify-single-word="false" fo:text-indent="0cm" style:auto-text-indent="false"/>
      <style:text-properties fo:color="#ffffff" loext:opacity="100%" fo:font-weight="bold"/>
    </style:style>
    <style:style style:name="P43" style:family="paragraph" style:parent-style-name="Table_20_Contents">
      <style:paragraph-properties fo:margin-left="0cm" fo:margin-right="0cm" fo:margin-top="0cm" fo:margin-bottom="0cm" style:contextual-spacing="false" fo:text-indent="0cm" style:auto-text-indent="false"/>
    </style:style>
    <style:style style:name="P44" style:family="paragraph" style:parent-style-name="Table_20_Contents">
      <style:paragraph-properties fo:margin-left="0cm" fo:margin-right="0cm" fo:margin-top="0cm" fo:margin-bottom="0cm" style:contextual-spacing="false" fo:text-align="right" style:justify-single-word="false" fo:text-indent="0cm" style:auto-text-indent="false"/>
    </style:style>
    <style:style style:name="P45" style:family="paragraph" style:parent-style-name="Table_20_Contents">
      <style:paragraph-properties fo:margin-left="0cm" fo:margin-right="0cm" fo:margin-top="0cm" fo:margin-bottom="0cm" style:contextual-spacing="false" fo:text-align="right" style:justify-single-word="false"/>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fo:padding="0.049cm" fo:border="0.06pt solid #ffffff"/>
    </style:style>
    <style:style style:name="P47" style:family="paragraph" style:parent-style-name="Text_20_body">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48" style:family="paragraph" style:parent-style-name="Heading_20_3">
      <style:paragraph-properties fo:margin-left="0cm" fo:margin-right="0cm" fo:margin-top="0.423cm" fo:margin-bottom="0.106cm" style:contextual-spacing="false" fo:line-height="155%" fo:orphans="2" fo:widows="2" fo:text-indent="0cm" style:auto-text-indent="false" fo:padding="0.049cm" fo:border="0.06pt solid #ffffff"/>
      <style:text-properties fo:font-variant="normal" fo:text-transform="none" fo:color="#ffffff" loext:opacity="100%" style:font-name="apple-system-body" fo:font-size="13.5pt" fo:letter-spacing="normal" fo:font-style="normal" fo:font-weight="bold" loext:padding="0.049cm" loext:border="0.06pt solid #ffffff"/>
    </style:style>
    <style:style style:name="P49" style:family="paragraph" style:parent-style-name="Text_20_body">
      <style:paragraph-properties fo:margin-left="0cm" fo:margin-right="0cm" fo:margin-top="0cm" fo:margin-bottom="0.423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50" style:family="paragraph" style:parent-style-name="Text_20_body">
      <style:paragraph-properties fo:margin-left="0cm" fo:margin-right="0cm" fo:margin-top="0cm" fo:margin-bottom="0cm" style:contextual-spacing="false" fo:line-height="120%" fo:text-align="left" style:justify-single-word="false" fo:orphans="2" fo:widows="2" fo:text-indent="0cm" style:auto-text-indent="false"/>
      <style:text-properties fo:font-variant="normal" fo:text-transform="none" fo:color="#ffffff" loext:opacity="100%" style:font-name="KaTeX Main" fo:font-size="12pt" fo:letter-spacing="normal" fo:font-style="normal" fo:font-weight="normal" loext:padding="0.049cm" loext:border="0.06pt solid #000000"/>
    </style:style>
    <style:style style:name="P51" style:family="paragraph" style:parent-style-name="Text_20_body" style:list-style-name="L2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52" style:family="paragraph" style:parent-style-name="Text_20_body">
      <style:paragraph-properties fo:margin-left="0cm" fo:margin-right="0cm" fo:margin-top="0cm" fo:margin-bottom="0cm" style:contextual-spacing="false" fo:line-height="120%" fo:text-align="center" style:justify-single-word="false" fo:orphans="2" fo:widows="2" fo:text-indent="0cm" style:auto-text-indent="false"/>
      <style:text-properties fo:font-variant="normal" fo:text-transform="none" fo:color="#ffffff" loext:opacity="100%" style:font-name="KaTeX Main" fo:font-size="12pt" fo:letter-spacing="normal" fo:font-style="normal" fo:font-weight="normal" loext:padding="0.049cm" loext:border="0.06pt solid #000000"/>
    </style:style>
    <style:style style:name="P53" style:family="paragraph" style:parent-style-name="Horizontal_20_Line">
      <style:paragraph-properties fo:margin-left="0cm" fo:margin-right="0cm" fo:margin-top="0cm" fo:margin-bottom="0cm" style:contextual-spacing="false" fo:line-height="150%" fo:orphans="2" fo:widows="2" fo:text-indent="0cm" style:auto-text-indent="false"/>
    </style:style>
    <style:style style:name="P54" style:family="paragraph" style:parent-style-name="Heading_20_2">
      <style:paragraph-properties fo:margin-left="0cm" fo:margin-right="0cm" fo:margin-top="0cm" fo:margin-bottom="0.106cm" style:contextual-spacing="false" fo:line-height="140%" fo:orphans="2" fo:widows="2" fo:text-indent="0cm" style:auto-text-indent="false" fo:padding="0.049cm" fo:border="0.06pt solid #ffffff"/>
      <style:text-properties fo:font-variant="normal" fo:text-transform="none" fo:color="#ffffff" loext:opacity="100%" style:font-name="apple-system-body" fo:font-size="15pt" fo:letter-spacing="normal" fo:font-style="normal" fo:font-weight="bold" loext:padding="0.049cm" loext:border="0.06pt solid #ffffff"/>
    </style:style>
    <style:style style:name="P55" style:family="paragraph" style:parent-style-name="Preformatted_20_Text">
      <loext:graphic-properties draw:fill="none" draw:fill-color="#000000"/>
      <style:paragraph-properties fo:margin-left="0cm" fo:margin-right="0cm" fo:margin-top="0cm" fo:margin-bottom="0cm" style:contextual-spacing="false" style:line-height-at-least="0.529cm" fo:orphans="2" fo:widows="2" fo:text-indent="0cm" style:auto-text-indent="false" fo:background-color="transparent" fo:padding-left="0.529cm" fo:padding-right="0cm" fo:padding-top="0.049cm" fo:padding-bottom="0.318cm" fo:border-left="0.06pt solid #ffffff" fo:border-right="none" fo:border-top="0.06pt solid #ffffff" fo:border-bottom="0.06pt solid #ffffff"/>
    </style:style>
    <style:style style:name="P56" style:family="paragraph" style:parent-style-name="Heading_20_3">
      <style:paragraph-properties fo:margin-left="0cm" fo:margin-right="0cm" fo:margin-top="0cm" fo:margin-bottom="0cm" style:contextual-spacing="false" fo:line-height="155%" fo:orphans="2" fo:widows="2" fo:text-indent="0cm" style:auto-text-indent="false" fo:padding="0.049cm" fo:border="0.06pt solid #ffffff"/>
    </style:style>
    <style:style style:name="P57" style:family="paragraph" style:parent-style-name="Text_20_body" style:list-style-name="L2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58" style:family="paragraph" style:parent-style-name="Text_20_body" style:list-style-name="L21">
      <style:paragraph-properties fo:margin-left="0cm" fo:margin-right="0cm" fo:margin-top="0cm" fo:margin-bottom="0cm" style:contextual-spacing="false" fo:line-height="150%" fo:orphans="2" fo:widows="2" fo:text-indent="0cm" style:auto-text-indent="false" fo:padding="0.049cm" fo:border="0.06pt solid #ffffff"/>
    </style:style>
    <style:style style:name="P59" style:family="paragraph" style:parent-style-name="Text_20_body" style:list-style-name="L22">
      <style:paragraph-properties fo:margin-left="0cm" fo:margin-right="0cm" fo:margin-top="0cm" fo:margin-bottom="0cm" style:contextual-spacing="false" fo:line-height="150%" fo:orphans="2" fo:widows="2" fo:text-indent="0cm" style:auto-text-indent="false" fo:padding="0.049cm" fo:border="0.06pt solid #ffffff"/>
    </style:style>
    <style:style style:name="P60" style:family="paragraph" style:parent-style-name="Text_20_body" style:list-style-name="L23">
      <style:paragraph-properties fo:margin-left="0cm" fo:margin-right="0cm" fo:margin-top="0cm" fo:margin-bottom="0cm" style:contextual-spacing="false" fo:line-height="150%" fo:orphans="2" fo:widows="2" fo:text-indent="0cm" style:auto-text-indent="false" fo:padding="0.049cm" fo:border="0.06pt solid #ffffff"/>
    </style:style>
    <style:style style:name="P61" style:family="paragraph" style:parent-style-name="Text_20_body" style:list-style-name="L2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62" style:family="paragraph" style:parent-style-name="Text_20_body" style:list-style-name="L2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63" style:family="paragraph" style:parent-style-name="Text_20_body" style:list-style-name="L24">
      <style:paragraph-properties fo:margin-left="0cm" fo:margin-right="0cm" fo:margin-top="0cm" fo:margin-bottom="0cm" style:contextual-spacing="false" fo:line-height="150%" fo:orphans="2" fo:widows="2" fo:text-indent="0cm" style:auto-text-indent="false" fo:padding="0.049cm" fo:border="0.06pt solid #ffffff"/>
    </style:style>
    <style:style style:name="P64" style:family="paragraph" style:parent-style-name="Text_20_body" style:list-style-name="L25">
      <style:paragraph-properties fo:margin-left="0cm" fo:margin-right="0cm" fo:margin-top="0cm" fo:margin-bottom="0cm" style:contextual-spacing="false" fo:line-height="150%" fo:orphans="2" fo:widows="2" fo:text-indent="0cm" style:auto-text-indent="false" fo:padding="0.049cm" fo:border="0.06pt solid #ffffff"/>
    </style:style>
    <style:style style:name="P65" style:family="paragraph" style:parent-style-name="Text_20_body" style:list-style-name="L2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66" style:family="paragraph" style:parent-style-name="Text_20_body" style:list-style-name="L27">
      <style:paragraph-properties fo:margin-left="0cm" fo:margin-right="0cm" fo:margin-top="0cm" fo:margin-bottom="0cm" style:contextual-spacing="false" fo:line-height="150%" fo:orphans="2" fo:widows="2" fo:text-indent="0cm" style:auto-text-indent="false" fo:padding="0.049cm" fo:border="0.06pt solid #ffffff"/>
    </style:style>
    <style:style style:name="P67" style:family="paragraph" style:parent-style-name="Text_20_body" style:list-style-name="L2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68" style:family="paragraph" style:parent-style-name="Text_20_body" style:list-style-name="L2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69" style:family="paragraph" style:parent-style-name="Text_20_body" style:list-style-name="L28">
      <style:paragraph-properties fo:margin-left="0cm" fo:margin-right="0cm" fo:margin-top="0cm" fo:margin-bottom="0cm" style:contextual-spacing="false" fo:line-height="150%" fo:orphans="2" fo:widows="2" fo:text-indent="0cm" style:auto-text-indent="false" fo:padding="0.049cm" fo:border="0.06pt solid #ffffff"/>
    </style:style>
    <style:style style:name="P70" style:family="paragraph" style:parent-style-name="Text_20_body" style:list-style-name="L2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71" style:family="paragraph" style:parent-style-name="Text_20_body" style:list-style-name="L3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72" style:family="paragraph" style:parent-style-name="Heading_20_3">
      <style:paragraph-properties fo:margin-left="0cm" fo:margin-right="0cm" fo:margin-top="0cm" fo:margin-bottom="0.106cm" style:contextual-spacing="false" fo:line-height="155%" fo:orphans="2" fo:widows="2" fo:text-indent="0cm" style:auto-text-indent="false" fo:padding="0.049cm" fo:border="0.06pt solid #ffffff"/>
      <style:text-properties fo:font-variant="normal" fo:text-transform="none" fo:color="#ffffff" loext:opacity="100%" style:font-name="apple-system-body" fo:font-size="13.5pt" fo:letter-spacing="normal" fo:font-style="normal" fo:font-weight="bold" loext:padding="0.049cm" loext:border="0.06pt solid #ffffff"/>
    </style:style>
    <style:style style:name="P73" style:family="paragraph" style:parent-style-name="Text_20_body">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74" style:family="paragraph" style:parent-style-name="Text_20_body" style:list-style-name="L31">
      <style:paragraph-properties fo:margin-left="0cm" fo:margin-right="0cm" fo:margin-top="0cm" fo:margin-bottom="0cm" style:contextual-spacing="false" fo:line-height="150%" fo:orphans="2" fo:widows="2" fo:text-indent="0cm" style:auto-text-indent="false" fo:padding="0.049cm" fo:border="0.06pt solid #ffffff"/>
    </style:style>
    <style:style style:name="P75" style:family="paragraph" style:parent-style-name="Text_20_body" style:list-style-name="L3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76" style:family="paragraph" style:parent-style-name="Text_20_body" style:list-style-name="L3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77" style:family="paragraph" style:parent-style-name="Text_20_body" style:list-style-name="L33">
      <style:paragraph-properties fo:margin-left="0cm" fo:margin-right="0cm" fo:margin-top="0cm" fo:margin-bottom="0cm" style:contextual-spacing="false" fo:line-height="120%" fo:text-align="left" style:justify-single-word="false"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78"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049cm" fo:border="0.06pt solid #ffffff"/>
    </style:style>
    <style:style style:name="P79" style:family="paragraph" style:parent-style-name="Text_20_body" style:list-style-name="L3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80" style:family="paragraph" style:parent-style-name="Text_20_body" style:list-style-name="L3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81" style:family="paragraph" style:parent-style-name="Text_20_body" style:list-style-name="L3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82" style:family="paragraph" style:parent-style-name="Text_20_body" style:list-style-name="L36">
      <style:paragraph-properties fo:margin-left="0cm" fo:margin-right="0cm" fo:margin-top="0cm" fo:margin-bottom="0cm" style:contextual-spacing="false" fo:line-height="150%" fo:orphans="2" fo:widows="2" fo:text-indent="0cm" style:auto-text-indent="false" fo:padding="0.049cm" fo:border="0.06pt solid #ffffff"/>
    </style:style>
    <style:style style:name="P83" style:family="paragraph" style:parent-style-name="Text_20_body" style:list-style-name="L37">
      <style:paragraph-properties fo:margin-left="0cm" fo:margin-right="0cm" fo:margin-top="0cm" fo:margin-bottom="0cm" style:contextual-spacing="false" fo:line-height="150%" fo:orphans="2" fo:widows="2" fo:text-indent="0cm" style:auto-text-indent="false" fo:padding="0.049cm" fo:border="0.06pt solid #ffffff"/>
    </style:style>
    <style:style style:name="P84" style:family="paragraph" style:parent-style-name="Text_20_body" style:list-style-name="L3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85" style:family="paragraph" style:parent-style-name="Text_20_body" style:list-style-name="L3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86" style:family="paragraph" style:parent-style-name="Text_20_body" style:list-style-name="L3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87" style:family="paragraph" style:parent-style-name="Text_20_body" style:list-style-name="L40">
      <style:paragraph-properties fo:margin-left="0cm" fo:margin-right="0cm" fo:margin-top="0cm" fo:margin-bottom="0cm" style:contextual-spacing="false" fo:line-height="150%" fo:orphans="2" fo:widows="2" fo:text-indent="0cm" style:auto-text-indent="false" fo:padding="0.049cm" fo:border="0.06pt solid #ffffff"/>
    </style:style>
    <style:style style:name="P88" style:family="paragraph" style:parent-style-name="Text_20_body" style:list-style-name="L4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89" style:family="paragraph" style:parent-style-name="Text_20_body" style:list-style-name="L4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90" style:family="paragraph" style:parent-style-name="Text_20_body" style:list-style-name="L43">
      <style:paragraph-properties fo:margin-left="0cm" fo:margin-right="0cm" fo:margin-top="0cm" fo:margin-bottom="0cm" style:contextual-spacing="false" fo:line-height="150%" fo:orphans="2" fo:widows="2" fo:text-indent="0cm" style:auto-text-indent="false" fo:padding="0.049cm" fo:border="0.06pt solid #ffffff"/>
    </style:style>
    <style:style style:name="P91" style:family="paragraph" style:parent-style-name="Text_20_body" style:list-style-name="L4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92" style:family="paragraph" style:parent-style-name="Text_20_body" style:list-style-name="L4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93" style:family="paragraph" style:parent-style-name="Text_20_body" style:list-style-name="L4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94" style:family="paragraph" style:parent-style-name="Text_20_body" style:list-style-name="L45">
      <style:paragraph-properties fo:margin-left="0cm" fo:margin-right="0cm" fo:margin-top="0cm" fo:margin-bottom="0cm" style:contextual-spacing="false" fo:line-height="150%" fo:orphans="2" fo:widows="2" fo:text-indent="0cm" style:auto-text-indent="false" fo:padding="0.049cm" fo:border="0.06pt solid #ffffff"/>
    </style:style>
    <style:style style:name="P95" style:family="paragraph" style:parent-style-name="Text_20_body" style:list-style-name="L46">
      <style:paragraph-properties fo:margin-left="0cm" fo:margin-right="0cm" fo:margin-top="0cm" fo:margin-bottom="0cm" style:contextual-spacing="false" fo:line-height="150%" fo:orphans="2" fo:widows="2" fo:text-indent="0cm" style:auto-text-indent="false" fo:padding="0.049cm" fo:border="0.06pt solid #ffffff"/>
    </style:style>
    <style:style style:name="P96" style:family="paragraph" style:parent-style-name="Text_20_body">
      <style:paragraph-properties fo:margin-left="0.106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9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afafaf" loext:opacity="100%" fo:letter-spacing="normal" fo:background-color="#212121" loext:padding="0.049cm" loext:border="0.06pt solid #ffffff"/>
    </style:style>
    <style:style style:name="P98" style:family="paragraph" style:parent-style-name="Text_20_body">
      <style:paragraph-properties fo:margin-left="0cm" fo:margin-right="0cm" fo:margin-top="0cm" fo:margin-bottom="0cm" style:contextual-spacing="false" fo:line-height="150%" fo:orphans="2" fo:widows="2" fo:text-indent="0cm" style:auto-text-indent="false"/>
      <style:text-properties loext:padding="0.049cm" loext:border="0.06pt solid #ffffff"/>
    </style:style>
    <style:style style:name="P9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apple-system-body" fo:font-size="10.5pt" fo:letter-spacing="normal" fo:font-style="normal" fo:font-weight="normal" style:font-name-asian="apple-system-body" style:font-size-asian="10.5pt" style:font-style-asian="normal" style:font-weight-asian="normal" style:font-name-complex="apple-system-body" style:font-size-complex="10.5pt" style:font-style-complex="normal" style:font-weight-complex="normal" loext:padding="0.049cm" loext:border="0.06pt solid #ffffff"/>
    </style:style>
    <style:style style:name="P100" style:family="paragraph" style:parent-style-name="Heading_20_2">
      <style:paragraph-properties fo:margin-left="0cm" fo:margin-right="0cm" fo:margin-top="0cm" fo:margin-bottom="0cm" style:contextual-spacing="false" fo:line-height="140%" fo:orphans="2" fo:widows="2" fo:text-indent="0cm" style:auto-text-indent="false" fo:padding="0.049cm" fo:border="0.06pt solid #ffffff"/>
    </style:style>
    <style:style style:name="P101" style:family="paragraph" style:parent-style-name="Text_20_body">
      <style:paragraph-properties fo:margin-left="0cm" fo:margin-right="0cm" fo:margin-top="0cm" fo:margin-bottom="0cm" style:contextual-spacing="false" fo:line-height="120%" fo:orphans="2" fo:widows="2" fo:text-indent="0cm" style:auto-text-indent="false" fo:padding="0.049cm" fo:border="0.06pt solid #ffffff"/>
    </style:style>
    <style:style style:name="P102" style:family="paragraph" style:parent-style-name="Text_20_body" style:list-style-name="L47">
      <style:paragraph-properties fo:margin-left="0cm" fo:margin-right="0cm" fo:margin-top="0cm" fo:margin-bottom="0cm" style:contextual-spacing="false" fo:line-height="120%" fo:orphans="2" fo:widows="2" fo:text-indent="0cm" style:auto-text-indent="false" fo:padding="0.049cm" fo:border="0.06pt solid #ffffff"/>
    </style:style>
    <style:style style:name="P103" style:family="paragraph" style:parent-style-name="Text_20_body" style:list-style-name="L4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04" style:family="paragraph" style:parent-style-name="Text_20_body" style:list-style-name="L4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05" style:family="paragraph" style:parent-style-name="Quotations">
      <style:paragraph-properties fo:margin-left="0cm" fo:margin-right="0cm" fo:margin-top="0cm" fo:margin-bottom="0cm" style:contextual-spacing="false" fo:line-height="150%" fo:orphans="2" fo:widows="2" fo:text-indent="0cm" style:auto-text-indent="false" fo:padding="0.049cm" fo:border="0.06pt solid #ffffff"/>
    </style:style>
    <style:style style:name="P106" style:family="paragraph" style:parent-style-name="Text_20_body" style:list-style-name="L50">
      <style:paragraph-properties fo:margin-left="0cm" fo:margin-right="0cm" fo:margin-top="0cm" fo:margin-bottom="0cm" style:contextual-spacing="false" fo:line-height="150%" fo:orphans="2" fo:widows="2" fo:text-indent="0cm" style:auto-text-indent="false" fo:padding="0.049cm" fo:border="0.06pt solid #ffffff"/>
    </style:style>
    <style:style style:name="P107" style:family="paragraph" style:parent-style-name="Text_20_body" style:list-style-name="L51">
      <style:paragraph-properties fo:margin-left="0cm" fo:margin-right="0cm" fo:margin-top="0cm" fo:margin-bottom="0cm" style:contextual-spacing="false" fo:line-height="150%" fo:orphans="2" fo:widows="2" fo:text-indent="0cm" style:auto-text-indent="false" fo:padding="0.049cm" fo:border="0.06pt solid #ffffff"/>
    </style:style>
    <style:style style:name="P108" style:family="paragraph" style:parent-style-name="Text_20_body" style:list-style-name="L52">
      <style:paragraph-properties fo:margin-left="0cm" fo:margin-right="0cm" fo:margin-top="0cm" fo:margin-bottom="0cm" style:contextual-spacing="false" fo:line-height="150%" fo:orphans="2" fo:widows="2" fo:text-indent="0cm" style:auto-text-indent="false" fo:padding="0.049cm" fo:border="0.06pt solid #ffffff"/>
    </style:style>
    <style:style style:name="P109" style:family="paragraph" style:parent-style-name="Text_20_body" style:list-style-name="L5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10" style:family="paragraph" style:parent-style-name="Text_20_body" style:list-style-name="L53">
      <style:paragraph-properties fo:margin-left="0cm" fo:margin-right="0cm" fo:margin-top="0cm" fo:margin-bottom="0cm" style:contextual-spacing="false" fo:line-height="150%" fo:orphans="2" fo:widows="2" fo:text-indent="0cm" style:auto-text-indent="false" fo:padding="0.049cm" fo:border="0.06pt solid #ffffff"/>
    </style:style>
    <style:style style:name="P111" style:family="paragraph" style:parent-style-name="Text_20_body" style:list-style-name="L54">
      <style:paragraph-properties fo:margin-left="0cm" fo:margin-right="0cm" fo:margin-top="0cm" fo:margin-bottom="0cm" style:contextual-spacing="false" fo:line-height="150%" fo:orphans="2" fo:widows="2" fo:text-indent="0cm" style:auto-text-indent="false" fo:padding="0.049cm" fo:border="0.06pt solid #ffffff"/>
    </style:style>
    <style:style style:name="P112" style:family="paragraph" style:parent-style-name="Quotations">
      <style:paragraph-properties fo:margin-left="0cm" fo:margin-right="0cm" fo:margin-top="0cm" fo:margin-bottom="0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13" style:family="paragraph" style:parent-style-name="Text_20_body" style:list-style-name="L55">
      <style:paragraph-properties fo:margin-left="0cm" fo:margin-right="0cm" fo:margin-top="0cm" fo:margin-bottom="0cm" style:contextual-spacing="false" fo:line-height="150%" fo:orphans="2" fo:widows="2" fo:text-indent="0cm" style:auto-text-indent="false" fo:padding="0.049cm" fo:border="0.06pt solid #ffffff"/>
    </style:style>
    <style:style style:name="P114" style:family="paragraph" style:parent-style-name="Text_20_body" style:list-style-name="L56">
      <style:paragraph-properties fo:margin-left="0cm" fo:margin-right="0cm" fo:margin-top="0cm" fo:margin-bottom="0cm" style:contextual-spacing="false" fo:line-height="150%" fo:orphans="2" fo:widows="2" fo:text-indent="0cm" style:auto-text-indent="false" fo:padding="0.049cm" fo:border="0.06pt solid #ffffff"/>
    </style:style>
    <style:style style:name="P115" style:family="paragraph" style:parent-style-name="Text_20_body" style:list-style-name="L5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16" style:family="paragraph" style:parent-style-name="Text_20_body" style:list-style-name="L57">
      <style:paragraph-properties fo:margin-left="0cm" fo:margin-right="0cm" fo:margin-top="0cm" fo:margin-bottom="0cm" style:contextual-spacing="false" fo:line-height="150%" fo:orphans="2" fo:widows="2" fo:text-indent="0cm" style:auto-text-indent="false" fo:padding="0.049cm" fo:border="0.06pt solid #ffffff"/>
    </style:style>
    <style:style style:name="P117" style:family="paragraph" style:parent-style-name="Text_20_body" style:list-style-name="L5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18" style:family="paragraph" style:parent-style-name="Text_20_body" style:list-style-name="L59">
      <style:paragraph-properties fo:margin-left="0cm" fo:margin-right="0cm" fo:margin-top="0cm" fo:margin-bottom="0cm" style:contextual-spacing="false" fo:line-height="150%" fo:orphans="2" fo:widows="2" fo:text-indent="0cm" style:auto-text-indent="false" fo:padding="0.049cm" fo:border="0.06pt solid #ffffff"/>
    </style:style>
    <style:style style:name="P119" style:family="paragraph" style:parent-style-name="Text_20_body" style:list-style-name="L5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0" style:family="paragraph" style:parent-style-name="Text_20_body" style:list-style-name="L6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1" style:family="paragraph" style:parent-style-name="Text_20_body" style:list-style-name="L6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2" style:family="paragraph" style:parent-style-name="Text_20_body" style:list-style-name="L62">
      <style:paragraph-properties fo:margin-left="0cm" fo:margin-right="0cm" fo:margin-top="0cm" fo:margin-bottom="0cm" style:contextual-spacing="false" fo:line-height="150%" fo:orphans="2" fo:widows="2" fo:text-indent="0cm" style:auto-text-indent="false" fo:padding="0.049cm" fo:border="0.06pt solid #ffffff"/>
    </style:style>
    <style:style style:name="P123" style:family="paragraph" style:parent-style-name="Text_20_body" style:list-style-name="L6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4" style:family="paragraph" style:parent-style-name="Text_20_body" style:list-style-name="L6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25" style:family="paragraph" style:parent-style-name="Text_20_body" style:list-style-name="L6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26" style:family="paragraph" style:parent-style-name="Text_20_body" style:list-style-name="L6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7" style:family="paragraph" style:parent-style-name="Text_20_body" style:list-style-name="L6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28" style:family="paragraph" style:parent-style-name="Text_20_body" style:list-style-name="L67">
      <style:paragraph-properties fo:margin-left="0cm" fo:margin-right="0cm" fo:margin-top="0cm" fo:margin-bottom="0cm" style:contextual-spacing="false" fo:line-height="150%" fo:orphans="2" fo:widows="2" fo:text-indent="0cm" style:auto-text-indent="false" fo:padding="0.049cm" fo:border="0.06pt solid #ffffff"/>
    </style:style>
    <style:style style:name="P129" style:family="paragraph" style:parent-style-name="Text_20_body" style:list-style-name="L6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30" style:family="paragraph" style:parent-style-name="Text_20_body" style:list-style-name="L69">
      <style:paragraph-properties fo:margin-left="0cm" fo:margin-right="0cm" fo:margin-top="0cm" fo:margin-bottom="0cm" style:contextual-spacing="false" fo:line-height="150%" fo:orphans="2" fo:widows="2" fo:text-indent="0cm" style:auto-text-indent="false" fo:padding="0.049cm" fo:border="0.06pt solid #ffffff"/>
    </style:style>
    <style:style style:name="P131" style:family="paragraph" style:parent-style-name="Text_20_body" style:list-style-name="L70">
      <style:paragraph-properties fo:margin-left="0cm" fo:margin-right="0cm" fo:margin-top="0cm" fo:margin-bottom="0cm" style:contextual-spacing="false" fo:line-height="150%" fo:orphans="2" fo:widows="2" fo:text-indent="0cm" style:auto-text-indent="false" fo:padding="0.049cm" fo:border="0.06pt solid #ffffff"/>
    </style:style>
    <style:style style:name="P132" style:family="paragraph" style:parent-style-name="Text_20_body" style:list-style-name="L71">
      <style:paragraph-properties fo:margin-left="0cm" fo:margin-right="0cm" fo:margin-top="0cm" fo:margin-bottom="0cm" style:contextual-spacing="false" fo:line-height="150%" fo:orphans="2" fo:widows="2" fo:text-indent="0cm" style:auto-text-indent="false" fo:padding="0.049cm" fo:border="0.06pt solid #ffffff"/>
    </style:style>
    <style:style style:name="P133" style:family="paragraph" style:parent-style-name="Text_20_body" style:list-style-name="L7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34" style:family="paragraph" style:parent-style-name="Text_20_body" style:list-style-name="L72">
      <style:paragraph-properties fo:margin-left="0cm" fo:margin-right="0cm" fo:margin-top="0cm" fo:margin-bottom="0cm" style:contextual-spacing="false" fo:line-height="150%" fo:orphans="2" fo:widows="2" fo:text-indent="0cm" style:auto-text-indent="false" fo:padding="0.049cm" fo:border="0.06pt solid #ffffff"/>
    </style:style>
    <style:style style:name="P135" style:family="paragraph" style:parent-style-name="Text_20_body" style:list-style-name="L7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36" style:family="paragraph" style:parent-style-name="Text_20_body" style:list-style-name="L74">
      <style:paragraph-properties fo:margin-left="0cm" fo:margin-right="0cm" fo:margin-top="0cm" fo:margin-bottom="0cm" style:contextual-spacing="false" fo:line-height="150%" fo:orphans="2" fo:widows="2" fo:text-indent="0cm" style:auto-text-indent="false" fo:padding="0.049cm" fo:border="0.06pt solid #ffffff"/>
    </style:style>
    <style:style style:name="P137" style:family="paragraph" style:parent-style-name="Text_20_body" style:list-style-name="L7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38" style:family="paragraph" style:parent-style-name="Text_20_body" style:list-style-name="L76">
      <style:paragraph-properties fo:margin-left="0cm" fo:margin-right="0cm" fo:margin-top="0cm" fo:margin-bottom="0cm" style:contextual-spacing="false" fo:line-height="150%" fo:orphans="2" fo:widows="2" fo:text-indent="0cm" style:auto-text-indent="false" fo:padding="0.049cm" fo:border="0.06pt solid #ffffff"/>
    </style:style>
    <style:style style:name="P139" style:family="paragraph" style:parent-style-name="Text_20_body" style:list-style-name="L7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40" style:family="paragraph" style:parent-style-name="Text_20_body" style:list-style-name="L78">
      <style:paragraph-properties fo:margin-left="0cm" fo:margin-right="0cm" fo:margin-top="0cm" fo:margin-bottom="0cm" style:contextual-spacing="false" fo:line-height="150%" fo:orphans="2" fo:widows="2" fo:text-indent="0cm" style:auto-text-indent="false" fo:padding="0.049cm" fo:border="0.06pt solid #ffffff"/>
    </style:style>
    <style:style style:name="P141" style:family="paragraph" style:parent-style-name="Text_20_body" style:list-style-name="L7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42" style:family="paragraph" style:parent-style-name="Text_20_body" style:list-style-name="L79">
      <style:paragraph-properties fo:margin-left="0cm" fo:margin-right="0cm" fo:margin-top="0cm" fo:margin-bottom="0cm" style:contextual-spacing="false" fo:line-height="150%" fo:orphans="2" fo:widows="2" fo:text-indent="0cm" style:auto-text-indent="false" fo:padding="0.049cm" fo:border="0.06pt solid #ffffff"/>
    </style:style>
    <style:style style:name="P143" style:family="paragraph" style:parent-style-name="Text_20_body" style:list-style-name="L80">
      <style:paragraph-properties fo:margin-left="0cm" fo:margin-right="0cm" fo:margin-top="0cm" fo:margin-bottom="0cm" style:contextual-spacing="false" fo:line-height="150%" fo:orphans="2" fo:widows="2" fo:text-indent="0cm" style:auto-text-indent="false" fo:padding="0.049cm" fo:border="0.06pt solid #ffffff"/>
    </style:style>
    <style:style style:name="P144" style:family="paragraph" style:parent-style-name="Text_20_body" style:list-style-name="L81">
      <style:paragraph-properties fo:margin-left="0cm" fo:margin-right="0cm" fo:margin-top="0cm" fo:margin-bottom="0cm" style:contextual-spacing="false" fo:line-height="150%" fo:orphans="2" fo:widows="2" fo:text-indent="0cm" style:auto-text-indent="false" fo:padding="0.049cm" fo:border="0.06pt solid #ffffff"/>
    </style:style>
    <style:style style:name="P145" style:family="paragraph" style:parent-style-name="Text_20_body" style:list-style-name="L82">
      <style:paragraph-properties fo:margin-left="0cm" fo:margin-right="0cm" fo:margin-top="0cm" fo:margin-bottom="0cm" style:contextual-spacing="false" fo:line-height="150%" fo:orphans="2" fo:widows="2" fo:text-indent="0cm" style:auto-text-indent="false" fo:padding="0.049cm" fo:border="0.06pt solid #ffffff"/>
    </style:style>
    <style:style style:name="P146" style:family="paragraph" style:parent-style-name="Text_20_body" style:list-style-name="L8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47" style:family="paragraph" style:parent-style-name="Text_20_body" style:list-style-name="L8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48" style:family="paragraph" style:parent-style-name="Text_20_body" style:list-style-name="L85">
      <style:paragraph-properties fo:margin-left="0cm" fo:margin-right="0cm" fo:margin-top="0cm" fo:margin-bottom="0cm" style:contextual-spacing="false" fo:line-height="150%" fo:orphans="2" fo:widows="2" fo:text-indent="0cm" style:auto-text-indent="false" fo:padding="0.049cm" fo:border="0.06pt solid #ffffff"/>
    </style:style>
    <style:style style:name="P149" style:family="paragraph" style:parent-style-name="Text_20_body" style:list-style-name="L86">
      <style:paragraph-properties fo:margin-left="0cm" fo:margin-right="0cm" fo:margin-top="0cm" fo:margin-bottom="0cm" style:contextual-spacing="false" fo:line-height="150%" fo:orphans="2" fo:widows="2" fo:text-indent="0cm" style:auto-text-indent="false" fo:padding="0.049cm" fo:border="0.06pt solid #ffffff"/>
    </style:style>
    <style:style style:name="P150" style:family="paragraph" style:parent-style-name="Text_20_body" style:list-style-name="L8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51" style:family="paragraph" style:parent-style-name="Text_20_body" style:list-style-name="L87">
      <style:paragraph-properties fo:margin-left="0cm" fo:margin-right="0cm" fo:margin-top="0cm" fo:margin-bottom="0cm" style:contextual-spacing="false" fo:line-height="150%" fo:orphans="2" fo:widows="2" fo:text-indent="0cm" style:auto-text-indent="false" fo:padding="0.049cm" fo:border="0.06pt solid #ffffff"/>
    </style:style>
    <style:style style:name="P152" style:family="paragraph" style:parent-style-name="Text_20_body" style:list-style-name="L88">
      <style:paragraph-properties fo:margin-left="0cm" fo:margin-right="0cm" fo:margin-top="0cm" fo:margin-bottom="0cm" style:contextual-spacing="false" fo:line-height="150%" fo:orphans="2" fo:widows="2" fo:text-indent="0cm" style:auto-text-indent="false" fo:padding="0.049cm" fo:border="0.06pt solid #ffffff"/>
    </style:style>
    <style:style style:name="P153" style:family="paragraph" style:parent-style-name="Text_20_body" style:list-style-name="L8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54" style:family="paragraph" style:parent-style-name="Text_20_body" style:list-style-name="L90">
      <style:paragraph-properties fo:margin-left="0cm" fo:margin-right="0cm" fo:margin-top="0cm" fo:margin-bottom="0cm" style:contextual-spacing="false" fo:line-height="150%" fo:orphans="2" fo:widows="2" fo:text-indent="0cm" style:auto-text-indent="false" fo:padding="0.049cm" fo:border="0.06pt solid #ffffff"/>
    </style:style>
    <style:style style:name="P155" style:family="paragraph" style:parent-style-name="Text_20_body" style:list-style-name="L91">
      <style:paragraph-properties fo:margin-left="0cm" fo:margin-right="0cm" fo:margin-top="0cm" fo:margin-bottom="0cm" style:contextual-spacing="false" fo:line-height="150%" fo:orphans="2" fo:widows="2" fo:text-indent="0cm" style:auto-text-indent="false" fo:padding="0.049cm" fo:border="0.06pt solid #ffffff"/>
    </style:style>
    <style:style style:name="P156" style:family="paragraph" style:parent-style-name="Text_20_body">
      <style:paragraph-properties fo:margin-left="0cm" fo:margin-right="0cm" fo:margin-top="0cm" fo:margin-bottom="0cm" style:contextual-spacing="false" fo:line-height="142%" fo:orphans="2" fo:widows="2" fo:text-indent="0cm" style:auto-text-indent="false"/>
      <style:text-properties loext:padding="0.049cm" loext:border="0.06pt solid #ffffff"/>
    </style:style>
    <style:style style:name="P157" style:family="paragraph" style:parent-style-name="Text_20_body" style:list-style-name="L92">
      <style:paragraph-properties fo:margin-left="0cm" fo:margin-right="0cm" fo:margin-top="0cm" fo:margin-bottom="0cm" style:contextual-spacing="false" fo:line-height="150%" fo:orphans="2" fo:widows="2" fo:text-indent="0cm" style:auto-text-indent="false" fo:padding="0.049cm" fo:border="0.06pt solid #ffffff"/>
    </style:style>
    <style:style style:name="P158" style:family="paragraph" style:parent-style-name="Text_20_body" style:list-style-name="L93">
      <style:paragraph-properties fo:margin-left="0cm" fo:margin-right="0cm" fo:margin-top="0cm" fo:margin-bottom="0cm" style:contextual-spacing="false" fo:line-height="150%" fo:orphans="2" fo:widows="2" fo:text-indent="0cm" style:auto-text-indent="false" fo:padding="0.049cm" fo:border="0.06pt solid #ffffff"/>
    </style:style>
    <style:style style:name="P159" style:family="paragraph" style:parent-style-name="Text_20_body" style:list-style-name="L94">
      <style:paragraph-properties fo:margin-left="0cm" fo:margin-right="0cm" fo:margin-top="0cm" fo:margin-bottom="0cm" style:contextual-spacing="false" fo:line-height="150%" fo:orphans="2" fo:widows="2" fo:text-indent="0cm" style:auto-text-indent="false" fo:padding="0.049cm" fo:border="0.06pt solid #ffffff"/>
    </style:style>
    <style:style style:name="P160" style:family="paragraph" style:parent-style-name="Text_20_body" style:list-style-name="L95">
      <style:paragraph-properties fo:margin-left="0cm" fo:margin-right="0cm" fo:margin-top="0cm" fo:margin-bottom="0cm" style:contextual-spacing="false" fo:line-height="150%" fo:orphans="2" fo:widows="2" fo:text-indent="0cm" style:auto-text-indent="false" fo:padding="0.049cm" fo:border="0.06pt solid #ffffff"/>
    </style:style>
    <style:style style:name="P161" style:family="paragraph" style:parent-style-name="Text_20_body" style:list-style-name="L96">
      <style:paragraph-properties fo:margin-left="0cm" fo:margin-right="0cm" fo:margin-top="0cm" fo:margin-bottom="0cm" style:contextual-spacing="false" fo:line-height="150%" fo:orphans="2" fo:widows="2" fo:text-indent="0cm" style:auto-text-indent="false" fo:padding="0.049cm" fo:border="0.06pt solid #ffffff"/>
    </style:style>
    <style:style style:name="P162" style:family="paragraph" style:parent-style-name="Text_20_body" style:list-style-name="L97">
      <style:paragraph-properties fo:margin-left="0cm" fo:margin-right="0cm" fo:margin-top="0cm" fo:margin-bottom="0cm" style:contextual-spacing="false" fo:line-height="150%" fo:orphans="2" fo:widows="2" fo:text-indent="0cm" style:auto-text-indent="false" fo:padding="0.049cm" fo:border="0.06pt solid #ffffff"/>
    </style:style>
    <style:style style:name="P163" style:family="paragraph" style:parent-style-name="Text_20_body">
      <style:paragraph-properties fo:margin-left="0cm" fo:margin-right="0cm" fo:margin-top="0cm" fo:margin-bottom="0cm" style:contextual-spacing="false" fo:line-height="150%" fo:orphans="25" fo:widows="2" fo:text-indent="0cm" style:auto-text-indent="false"/>
      <style:text-properties fo:font-variant="normal" fo:text-transform="none" fo:color="#afafaf" loext:opacity="100%" fo:letter-spacing="normal" fo:background-color="#212121" loext:padding="0.049cm" loext:border="0.06pt solid #ffffff"/>
    </style:style>
    <style:style style:name="P164" style:family="paragraph" style:parent-style-name="Text_20_body" style:list-style-name="L98">
      <style:paragraph-properties fo:margin-left="0cm" fo:margin-right="0cm" fo:margin-top="0cm" fo:margin-bottom="0cm" style:contextual-spacing="false" fo:line-height="150%" fo:orphans="2" fo:widows="2" fo:text-indent="0cm" style:auto-text-indent="false" fo:padding="0.049cm" fo:border="0.06pt solid #ffffff"/>
    </style:style>
    <style:style style:name="P165" style:family="paragraph" style:parent-style-name="Text_20_body" style:list-style-name="L9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fo:letter-spacing="normal" loext:padding="0.049cm" loext:border="0.06pt solid #ffffff"/>
    </style:style>
    <style:style style:name="P166" style:family="paragraph" style:parent-style-name="Text_20_body" style:list-style-name="L10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67" style:family="paragraph" style:parent-style-name="Text_20_body" style:list-style-name="L100">
      <style:paragraph-properties fo:margin-left="0cm" fo:margin-right="0cm" fo:margin-top="0cm" fo:margin-bottom="0cm" style:contextual-spacing="false" fo:line-height="150%" fo:orphans="2" fo:widows="2" fo:text-indent="0cm" style:auto-text-indent="false" fo:padding="0.049cm" fo:border="0.06pt solid #ffffff"/>
    </style:style>
    <style:style style:name="P168" style:family="paragraph" style:parent-style-name="Text_20_body" style:list-style-name="L101">
      <style:paragraph-properties fo:margin-left="0cm" fo:margin-right="0cm" fo:margin-top="0cm" fo:margin-bottom="0cm" style:contextual-spacing="false" fo:line-height="150%" fo:orphans="2" fo:widows="2" fo:text-indent="0cm" style:auto-text-indent="false" fo:padding="0.049cm" fo:border="0.06pt solid #ffffff"/>
    </style:style>
    <style:style style:name="P169" style:family="paragraph" style:parent-style-name="Text_20_body" style:list-style-name="L10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0" style:family="paragraph" style:parent-style-name="Text_20_body" style:list-style-name="L103">
      <style:paragraph-properties fo:margin-left="0cm" fo:margin-right="0cm" fo:margin-top="0cm" fo:margin-bottom="0cm" style:contextual-spacing="false" fo:line-height="150%" fo:orphans="2" fo:widows="2" fo:text-indent="0cm" style:auto-text-indent="false" fo:padding="0.049cm" fo:border="0.06pt solid #ffffff"/>
    </style:style>
    <style:style style:name="P171" style:family="paragraph" style:parent-style-name="Text_20_body" style:list-style-name="L10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2" style:family="paragraph" style:parent-style-name="Text_20_body" style:list-style-name="L10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3" style:family="paragraph" style:parent-style-name="Text_20_body" style:list-style-name="L10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4" style:family="paragraph" style:parent-style-name="Text_20_body" style:list-style-name="L10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5" style:family="paragraph" style:parent-style-name="Text_20_body" style:list-style-name="L108">
      <style:paragraph-properties fo:margin-left="0cm" fo:margin-right="0cm" fo:margin-top="0cm" fo:margin-bottom="0cm" style:contextual-spacing="false" fo:line-height="150%" fo:orphans="2" fo:widows="2" fo:text-indent="0cm" style:auto-text-indent="false" fo:padding="0.049cm" fo:border="0.06pt solid #ffffff"/>
    </style:style>
    <style:style style:name="P176" style:family="paragraph" style:parent-style-name="Text_20_body" style:list-style-name="L108">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7" style:family="paragraph" style:parent-style-name="Text_20_body" style:list-style-name="L10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8" style:family="paragraph" style:parent-style-name="Text_20_body" style:list-style-name="L11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79" style:family="paragraph" style:parent-style-name="Text_20_body" style:list-style-name="L110">
      <style:paragraph-properties fo:margin-left="0cm" fo:margin-right="0cm" fo:margin-top="0cm" fo:margin-bottom="0cm" style:contextual-spacing="false" fo:line-height="150%" fo:orphans="2" fo:widows="2" fo:text-indent="0cm" style:auto-text-indent="false" fo:padding="0.049cm" fo:border="0.06pt solid #ffffff"/>
    </style:style>
    <style:style style:name="P180" style:family="paragraph" style:parent-style-name="Text_20_body" style:list-style-name="L11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1" style:family="paragraph" style:parent-style-name="Text_20_body">
      <style:paragraph-properties fo:margin-left="0cm" fo:margin-right="0cm" fo:margin-top="0cm" fo:margin-bottom="0cm" style:contextual-spacing="false" fo:line-height="120%" fo:text-align="left" style:justify-single-word="false"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2" style:family="paragraph" style:parent-style-name="Text_20_body" style:list-style-name="L112">
      <style:paragraph-properties fo:margin-left="0cm" fo:margin-right="0cm" fo:margin-top="0cm" fo:margin-bottom="0cm" style:contextual-spacing="false" fo:line-height="120%" fo:orphans="2" fo:widows="2" fo:text-indent="0cm" style:auto-text-indent="false" fo:padding="0.049cm" fo:border="0.06pt solid #ffffff"/>
      <style:text-properties fo:font-variant="normal" fo:text-transform="none" fo:color="#ffffff" loext:opacity="100%" style:font-name="KaTeX Main" fo:font-size="12pt" fo:letter-spacing="normal" fo:font-style="normal" fo:font-weight="normal" loext:padding="0.049cm" loext:border="0.06pt solid #000000"/>
    </style:style>
    <style:style style:name="P183" style:family="paragraph" style:parent-style-name="Text_20_body" style:list-style-name="L11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4" style:family="paragraph" style:parent-style-name="Text_20_body" style:list-style-name="L113">
      <style:paragraph-properties fo:margin-left="0cm" fo:margin-right="0cm" fo:margin-top="0cm" fo:margin-bottom="0cm" style:contextual-spacing="false" fo:line-height="12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5" style:family="paragraph" style:parent-style-name="Text_20_body" style:list-style-name="L113">
      <style:paragraph-properties fo:margin-left="0cm" fo:margin-right="0cm" fo:margin-top="0cm" fo:margin-bottom="0cm" style:contextual-spacing="false" fo:line-height="120%" fo:text-align="left" style:justify-single-word="false"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6" style:family="paragraph" style:parent-style-name="Text_20_body" style:list-style-name="L11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7" style:family="paragraph" style:parent-style-name="Text_20_body" style:list-style-name="L115">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8" style:family="paragraph" style:parent-style-name="Text_20_body" style:list-style-name="L116">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89" style:family="paragraph" style:parent-style-name="Text_20_body" style:list-style-name="L117">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90" style:family="paragraph" style:parent-style-name="Text_20_body" style:list-style-name="L118">
      <style:paragraph-properties fo:margin-left="0cm" fo:margin-right="0cm" fo:margin-top="0cm" fo:margin-bottom="0cm" style:contextual-spacing="false" fo:line-height="150%" fo:orphans="2" fo:widows="2" fo:text-indent="0cm" style:auto-text-indent="false" fo:padding="0.049cm" fo:border="0.06pt solid #ffffff"/>
    </style:style>
    <style:style style:name="P191" style:family="paragraph" style:parent-style-name="Text_20_body">
      <style:paragraph-properties fo:margin-left="0cm" fo:margin-right="0cm" fo:margin-top="0cm" fo:margin-bottom="0cm" style:contextual-spacing="false" fo:line-height="120%" fo:text-align="left" style:justify-single-word="false" fo:orphans="2" fo:widows="2" fo:text-indent="0cm" style:auto-text-indent="false"/>
      <style:text-properties fo:font-variant="normal" fo:text-transform="none" fo:color="#ffffff" loext:opacity="100%" style:font-name="apple-system-body" fo:font-size="12pt" fo:letter-spacing="normal" fo:font-style="normal" fo:font-weight="normal" loext:padding="0.049cm" loext:border="0.06pt solid #ffffff"/>
    </style:style>
    <style:style style:name="P192" style:family="paragraph" style:parent-style-name="Text_20_body" style:list-style-name="L119">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93" style:family="paragraph" style:parent-style-name="Text_20_body" style:list-style-name="L119">
      <style:paragraph-properties fo:margin-left="0cm" fo:margin-right="0cm" fo:margin-top="0cm" fo:margin-bottom="0cm" style:contextual-spacing="false" fo:line-height="150%" fo:orphans="2" fo:widows="2" fo:text-indent="0cm" style:auto-text-indent="false" fo:padding="0.049cm" fo:border="0.06pt solid #ffffff"/>
    </style:style>
    <style:style style:name="P194" style:family="paragraph" style:parent-style-name="Text_20_body" style:list-style-name="L12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P195" style:family="paragraph" style:parent-style-name="Text_20_body" style:list-style-name="L120">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96" style:family="paragraph" style:parent-style-name="Text_20_body" style:list-style-name="L120">
      <style:paragraph-properties fo:margin-left="0cm" fo:margin-right="0cm" fo:margin-top="0cm" fo:margin-bottom="0cm" style:contextual-spacing="false" fo:line-height="150%" fo:orphans="2" fo:widows="2" fo:text-indent="0cm" style:auto-text-indent="false" fo:padding="0.049cm" fo:border="0.06pt solid #ffffff"/>
    </style:style>
    <style:style style:name="P197" style:family="paragraph" style:parent-style-name="Text_20_body" style:list-style-name="L121">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98" style:family="paragraph" style:parent-style-name="Text_20_body" style:list-style-name="L122">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199" style:family="paragraph" style:parent-style-name="Text_20_body" style:list-style-name="L123">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200" style:family="paragraph" style:parent-style-name="Text_20_body" style:list-style-name="L124">
      <style:paragraph-properties fo:margin-left="0cm" fo:margin-right="0cm" fo:margin-top="0cm" fo:margin-bottom="0.106cm" style:contextual-spacing="false" fo:line-height="150%" fo:orphans="2" fo:widows="2" fo:text-indent="0cm" style:auto-text-indent="false" fo:padding="0.049cm" fo:border="0.06pt solid #ffffff"/>
      <style:text-properties fo:font-variant="normal" fo:text-transform="none" fo:color="#ffffff" loext:opacity="100%" style:font-name="apple-system-body" fo:font-size="12pt" fo:letter-spacing="normal" fo:font-style="normal" fo:font-weight="normal" loext:padding="0.049cm" loext:border="0.06pt solid #ffffff"/>
    </style:style>
    <style:style style:name="P201"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02" style:family="paragraph" style:parent-style-name="Standard">
      <style:paragraph-properties fo:margin-left="0cm" fo:margin-right="0cm" fo:text-indent="0cm" style:auto-text-indent="false"/>
    </style:style>
    <style:style style:name="T1" style:family="text">
      <style:text-properties fo:color="#ffffff" loext:opacity="100%" style:text-underline-style="solid" style:text-underline-width="auto" style:text-underline-color="font-color" loext:padding="0.049cm" loext:border="0.06pt solid #ffffff"/>
    </style:style>
    <style:style style:name="T2" style:family="text">
      <style:text-properties fo:font-variant="normal" fo:text-transform="none" fo:color="#ffffff" loext:opacity="100%" style:font-name="apple-system-body" fo:font-size="12pt" fo:letter-spacing="normal" fo:font-style="normal" fo:font-weight="normal" loext:padding="0.049cm" loext:border="0.06pt solid #ffffff"/>
    </style:style>
    <style:style style:name="T3" style:family="text">
      <style:text-properties fo:font-variant="normal" fo:text-transform="none" fo:color="#ffffff" loext:opacity="100%" style:font-name="apple-system-body" fo:font-size="12pt" fo:letter-spacing="normal" fo:font-style="normal" fo:font-weight="bold" loext:padding="0.049cm" loext:border="0.06pt solid #ffffff"/>
    </style:style>
    <style:style style:name="T4" style:family="text">
      <style:text-properties fo:font-variant="normal" fo:text-transform="none" fo:color="#ffffff" loext:opacity="100%" fo:font-family="ui-monospace, SFMono-Regular, 'SF Mono', Menlo, Consolas, 'Liberation Mono', monospace" fo:font-size="12pt" fo:letter-spacing="normal" fo:font-style="normal" fo:font-weight="bold" fo:background-color="#181818" loext:char-shading-value="0" loext:padding-left="0.049cm" loext:padding-right="0cm" loext:padding-top="0.049cm" loext:padding-bottom="0.049cm" loext:border-left="0.06pt solid #ffffff" loext:border-right="none" loext:border-top="0.06pt solid #ffffff" loext:border-bottom="0.06pt solid #ffffff"/>
    </style:style>
    <style:style style:name="T5" style:family="text">
      <style:text-properties fo:color="#ffa3ce" loext:opacity="100%" fo:font-family="ui-monospace, SFMono-Regular, 'SF Mono', Menlo, Consolas, 'Liberation Mono', monospace" fo:font-weight="normal" fo:background-color="transparent" loext:char-shading-value="0" loext:padding="0.049cm" loext:border="0.06pt solid #ffffff"/>
    </style:style>
    <style:style style:name="T6" style:family="text">
      <style:text-properties fo:color="#f9f9f9" loext:opacity="100%" fo:font-family="ui-monospace, SFMono-Regular, 'SF Mono', Menlo, Consolas, 'Liberation Mono', monospace" fo:font-weight="normal" fo:background-color="transparent" loext:char-shading-value="0" loext:padding="0.049cm" loext:border="0.06pt solid #ffffff"/>
    </style:style>
    <style:style style:name="T7" style:family="text">
      <style:text-properties fo:color="#be95fa" loext:opacity="100%" fo:font-family="ui-monospace, SFMono-Regular, 'SF Mono', Menlo, Consolas, 'Liberation Mono', monospace" fo:font-weight="normal" fo:background-color="transparent" loext:char-shading-value="0" loext:padding="0.049cm" loext:border="0.06pt solid #ffffff"/>
    </style:style>
    <style:style style:name="T8" style:family="text">
      <style:text-properties fo:font-variant="normal" fo:text-transform="none" fo:color="#ffa3ce"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9" style:family="text">
      <style:text-properties fo:font-variant="normal" fo:text-transform="none" fo:color="#f9f9f9"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10" style:family="text">
      <style:text-properties fo:font-variant="normal" fo:text-transform="none" fo:color="#be95fa"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11" style:family="text">
      <style:text-properties fo:color="#66d492" loext:opacity="100%" fo:font-family="ui-monospace, SFMono-Regular, 'SF Mono', Menlo, Consolas, 'Liberation Mono', monospace" fo:font-weight="normal" fo:background-color="transparent" loext:char-shading-value="0" loext:padding="0.049cm" loext:border="0.06pt solid #ffffff"/>
    </style:style>
    <style:style style:name="T12" style:family="text">
      <style:text-properties fo:font-variant="normal" fo:text-transform="none" fo:color="#ffffff" loext:opacity="100%" fo:font-family="ui-monospace, SFMono-Regular, 'SF Mono', Menlo, Consolas, 'Liberation Mono', monospace" fo:font-size="12pt" fo:letter-spacing="normal" fo:font-style="normal" fo:font-weight="bold" fo:background-color="#181818" loext:char-shading-value="0" style:font-name-asian="apple-system-body" style:font-size-asian="12pt" style:font-style-asian="normal" style:font-weight-asian="normal" style:font-name-complex="apple-system-body" style:font-size-complex="12pt" style:font-style-complex="normal" style:font-weight-complex="normal" loext:padding-left="0.049cm" loext:padding-right="0cm" loext:padding-top="0.049cm" loext:padding-bottom="0.049cm" loext:border-left="0.06pt solid #ffffff" loext:border-right="none" loext:border-top="0.06pt solid #ffffff" loext:border-bottom="0.06pt solid #ffffff"/>
    </style:style>
    <style:style style:name="T13" style:family="text">
      <style:text-properties fo:font-variant="normal" fo:text-transform="none" fo:color="#ffffff" loext:opacity="100%" style:font-name="apple-system-body" fo:font-size="12pt" fo:letter-spacing="normal" fo:font-style="normal" fo:font-weight="normal"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T14" style:family="text">
      <style:text-properties fo:color="#ff9e6c" loext:opacity="100%" fo:font-family="ui-monospace, SFMono-Regular, 'SF Mono', Menlo, Consolas, 'Liberation Mono', monospace" fo:font-weight="normal" fo:background-color="transparent" loext:char-shading-value="0" loext:padding="0.049cm" loext:border="0.06pt solid #ffffff"/>
    </style:style>
    <style:style style:name="T15" style:family="text">
      <style:text-properties fo:font-family="'KaTeX Math'" fo:font-style="italic"/>
    </style:style>
    <style:style style:name="T16" style:family="text">
      <style:text-properties fo:font-family="'KaTeX Size3'"/>
    </style:style>
    <style:style style:name="T17" style:family="text">
      <style:text-properties fo:font-variant="normal" fo:text-transform="none" fo:color="#66d492"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18" style:family="text">
      <style:text-properties fo:font-variant="normal" fo:text-transform="none" fo:color="#ff9e6c"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19" style:family="text">
      <style:text-properties fo:font-variant="normal" fo:text-transform="none" fo:color="#ffffff" loext:opacity="100%" fo:font-family="ui-monospace, SFMono-Regular, 'SF Mono', Menlo, Consolas, 'Liberation Mono', monospace" fo:font-size="12pt" fo:letter-spacing="normal" fo:font-style="normal" fo:font-weight="normal" fo:background-color="#181818" loext:char-shading-value="0" style:font-name-asian="apple-system-body" style:font-size-asian="12pt" style:font-style-asian="normal" style:font-weight-asian="normal" style:font-name-complex="apple-system-body" style:font-size-complex="12pt" style:font-style-complex="normal" style:font-weight-complex="normal" loext:padding-left="0.049cm" loext:padding-right="0cm" loext:padding-top="0.049cm" loext:padding-bottom="0.049cm" loext:border-left="0.06pt solid #ffffff" loext:border-right="none" loext:border-top="0.06pt solid #ffffff" loext:border-bottom="0.06pt solid #ffffff"/>
    </style:style>
    <style:style style:name="T20" style:family="text">
      <style:text-properties fo:font-variant="normal" fo:text-transform="none" fo:color="#ffffff" loext:opacity="100%" fo:font-family="ui-monospace, SFMono-Regular, 'SF Mono', Menlo, Consolas, 'Liberation Mono', monospace" fo:font-size="13.5pt" fo:letter-spacing="normal" fo:font-style="normal" fo:font-weight="bold" fo:background-color="#181818" loext:char-shading-value="0" loext:padding-left="0.049cm" loext:padding-right="0cm" loext:padding-top="0.049cm" loext:padding-bottom="0.049cm" loext:border-left="0.06pt solid #ffffff" loext:border-right="none" loext:border-top="0.06pt solid #ffffff" loext:border-bottom="0.06pt solid #ffffff"/>
    </style:style>
    <style:style style:name="T21" style:family="text">
      <style:text-properties fo:font-variant="normal" fo:text-transform="none" fo:color="#ffffff" loext:opacity="100%" style:font-name="apple-system-body" fo:font-size="13.5pt" fo:letter-spacing="normal" fo:font-style="normal" fo:font-weight="bold" loext:padding="0.049cm" loext:border="0.06pt solid #ffffff"/>
    </style:style>
    <style:style style:name="T22" style:family="text">
      <style:text-properties fo:font-variant="normal" fo:text-transform="none" fo:color="#ffffff" loext:opacity="100%" fo:letter-spacing="normal" loext:padding="0.049cm" loext:border="0.06pt solid #ffffff"/>
    </style:style>
    <style:style style:name="T23" style:family="text">
      <style:text-properties fo:font-family="'KaTeX Math'" fo:font-style="italic" loext:padding="0.049cm" loext:border="0.06pt solid #000000"/>
    </style:style>
    <style:style style:name="T24" style:family="text">
      <style:text-properties style:font-name="KaTeX Main" loext:padding="0.049cm" loext:border="0.06pt solid #000000"/>
    </style:style>
    <style:style style:name="T25" style:family="text">
      <style:text-properties fo:font-variant="normal" fo:text-transform="none" fo:color="#ffffff" loext:opacity="100%" style:font-name="apple-system-body" fo:font-size="12pt" fo:letter-spacing="normal" fo:font-style="normal" fo:font-weight="bold" style:font-name-asian="apple-system-body" style:font-size-asian="12pt" style:font-style-asian="normal" style:font-weight-asian="normal" style:font-name-complex="apple-system-body" style:font-size-complex="12pt" style:font-style-complex="normal" style:font-weight-complex="normal" loext:padding="0.049cm" loext:border="0.06pt solid #ffffff"/>
    </style:style>
    <style:style style:name="T26" style:family="text">
      <style:text-properties style:font-name="apple-system-body" fo:font-size="12pt" fo:font-style="normal" fo:font-weight="normal"/>
    </style:style>
    <style:style style:name="T27" style:family="text">
      <style:text-properties fo:font-variant="normal" fo:text-transform="none" fo:color="#d8d8d8" loext:opacity="100%" fo:font-family="ui-monospace, SFMono-Regular, 'SF Mono', Menlo, Consolas, 'Liberation Mono', monospace" fo:font-size="12pt" fo:letter-spacing="normal" fo:font-style="normal" fo:font-weight="normal" fo:background-color="transparent" loext:char-shading-value="0" loext:padding="0.049cm" loext:border="0.06pt solid #ffffff"/>
    </style:style>
    <style:style style:name="T28" style:family="text">
      <style:text-properties fo:font-variant="normal" fo:text-transform="none" fo:color="#ffffff" loext:opacity="100%" style:font-name="apple-system-body" fo:font-size="15pt" fo:letter-spacing="normal" fo:font-style="normal" fo:font-weight="bold" loext:padding="0.049cm" loext:border="0.06pt solid #ffffff"/>
    </style:style>
    <style:style style:name="T29" style:family="text">
      <style:text-properties fo:font-variant="normal" fo:text-transform="none" fo:color="#ffffff" loext:opacity="100%" fo:font-family="'KaTeX Math'" fo:font-size="12pt" fo:letter-spacing="normal" fo:font-style="italic" fo:font-weight="normal" loext:padding="0.049cm" loext:border="0.06pt solid #000000"/>
    </style:style>
    <style:style style:name="T30" style:family="text">
      <style:text-properties style:font-name="apple-system-body" fo:font-size="12pt" fo:font-style="normal" fo:font-weight="bold"/>
    </style:style>
    <style:style style:name="T31" style:family="text">
      <style:text-properties fo:font-variant="normal" fo:text-transform="none" fo:color="#ffffff" loext:opacity="100%" fo:font-family="ui-monospace, SFMono-Regular, 'SF Mono', Menlo, Consolas, 'Liberation Mono', monospace" fo:font-size="15pt" fo:letter-spacing="normal" fo:font-style="normal" fo:font-weight="bold" fo:background-color="#181818" loext:char-shading-value="0" loext:padding-left="0.049cm" loext:padding-right="0cm" loext:padding-top="0.049cm" loext:padding-bottom="0.049cm" loext:border-left="0.06pt solid #ffffff" loext:border-right="none" loext:border-top="0.06pt solid #ffffff" loext:border-bottom="0.06pt solid #ffffff"/>
    </style:style>
    <style:style style:name="T32" style:family="text">
      <style:text-properties fo:font-variant="normal" fo:text-transform="none" fo:color="#f9f9f9" loext:opacity="100%" fo:letter-spacing="normal" fo:background-color="transparent" loext:char-shading-value="0" loext:padding="0.049cm" loext:border="0.06pt solid #ffffff"/>
    </style:style>
    <style:style style:name="T33" style:family="text">
      <style:text-properties loext:padding="0.049cm" loext:border="0.06pt solid #000000"/>
    </style:style>
    <style:style style:name="T34" style:family="text">
      <style:text-properties fo:font-family="'KaTeX Size3'" loext:padding="0.049cm" loext:border="0.06pt solid #000000"/>
    </style:style>
    <style:style style:name="T35" style:family="text">
      <style:text-properties fo:color="#ffffff" loext:opacity="100%" fo:font-size="12pt" style:text-underline-style="solid" style:text-underline-width="auto" style:text-underline-color="font-color" loext:padding="0.049cm" loext:border="0.06pt solid #ffffff"/>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0.06pt solid #ffffff"/>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fo:margin-left="0cm" fo:margin-right="0cm" fo:margin-top="0cm" fo:margin-bottom="0cm" style:vertical-pos="top" style:vertical-rel="baseline" fo:padding-left="0.049cm" fo:padding-right="0cm" fo:padding-top="0.049cm" fo:padding-bottom="0.049cm" fo:border-left="0.06pt solid #ffffff" fo:border-right="none" fo:border-top="0.06pt solid #ffffff" fo:border-bottom="0.06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49cm" fo:border="0.06pt solid #ffffff" style:mirror="none" fo:clip="rect(0cm, 0cm, 0cm, 0cm)" draw:luminance="0%" draw:contrast="0%" draw:red="0%" draw:green="0%" draw:blue="0%" draw:gamma="100%" draw:color-inversion="false" draw:image-opacity="100%" draw:color-mode="standard"/>
    </style:style>
    <style:style style:name="Sect1" style:family="section">
      <style:section-properties fo:background-color="#000000"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text:start-value="7">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text:start-value="8">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text:start-value="9">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text:start-value="10">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2" text:name="sidebar-header">
          <text:p text:style-name="P1"><text:a xlink:type="simple" xlink:href="https://chatgpt.com/" text:style-name="Internet_20_link" text:visited-style-name="Visited_20_Internet_20_Link"><text:span text:style-name="T1">ChatGPT</text:span></text:a></text:p>
        </text:section>
        <text:list text:style-name="L1">
          <text:list-item>
            <text:p text:style-name="P2"/>
          </text:list-item>
        </text:list>
        <text:list text:style-name="L2">
          <text:list-item>
            <text:list>
              <text:list-item>
                <text:p text:style-name="P3"/>
              </text:list-item>
            </text:list>
          </text:list-item>
          <text:list-item>
            <text:p text:style-name="P3"/>
          </text:list-item>
        </text:list>
        <text:section text:style-name="Sect2" text:name="history">
          <text:list text:style-name="L3">
            <text:list-item>
              <text:p text:style-name="P4"/>
            </text:list-item>
          </text:list>
        </text:section>
        <text:section text:style-name="Sect2" text:name="radix-_R_qlalj3b31hq9ikj5_">
          <text:p text:style-name="P5"/>
        </text:section>
      </text:section>
      <text:section text:style-name="Sect2" text:name="thread">
        <text:p text:style-name="P6">Voy a apoyarme en tus memorandos para responder con precisión y sin inventar.</text:p>
        <text:p text:style-name="P7">Thought for 1m 5s</text:p>
        <text:p text:style-name="P8">22/04/2026 11:20:04 CEST</text:p>
        <text:p text:style-name="P9">Sí.</text:p>
        <text:list text:style-name="L4">
          <text:list-item>
            <text:p text:style-name="P10"><text:span text:style-name="T2">El curso es </text:span><text:span text:style-name="Strong_20_Emphasis"><text:span text:style-name="T2">“</text:span></text:span><text:span text:style-name="Strong_20_Emphasis"><text:span text:style-name="T3">Python and Statistics for Financial Analysis”</text:span></text:span><text:span text:style-name="T2"> de Coursera, impartido por </text:span><text:span text:style-name="Strong_20_Emphasis"><text:span text:style-name="T3">Xuhu Wan</text:span></text:span><text:span text:style-name="T2">. Cubre Python con </text:span><text:span text:style-name="Source_20_Text"><text:span text:style-name="T4">pandas</text:span></text:span><text:span text:style-name="T2">, análisis estadístico, regresión, datos financieros e inferencia estadística, y está orientado a construir y evaluar modelos sencillos de trading sobre datos de mercado. <text:line-break/></text:span><text:span text:style-name="Strong_20_Emphasis"><text:span text:style-name="T3">English summary:</text:span></text:span><text:span text:style-name="T2"> The course is </text:span><text:span text:style-name="Emphasis"><text:span text:style-name="T2">Python and Statistics for Financial Analysis</text:span></text:span><text:span text:style-name="T2">, focused on Python, statistics, and financial data analysis.<text:line-break/>[retomar el curso = resume the course] [datos financieros = financial data] [modelo de trading = trading model]</text:span></text:p>
          </text:list-item>
          <text:list-item>
            <text:p text:style-name="P10"><text:span text:style-name="T2">No lo estás haciendo “por cultura general”. Lo estás usando para tu giro hacia </text:span><text:span text:style-name="Strong_20_Emphasis"><text:span text:style-name="T3">FinTech técnico / trading systems / automatización financiera</text:span></text:span><text:span text:style-name="T2">, porque encaja con tu perfil, te da salida profesional y te sirve para construir portfolio real. En tus notas aparece explícitamente como parte de ese reposicionamiento.<text:line-break/></text:span><text:span text:style-name="Strong_20_Emphasis"><text:span text:style-name="T3">English summary:</text:span></text:span><text:span text:style-name="T2"> You are taking it to move toward technical FinTech, trading systems, and financial automation.<text:line-break/></text:span><text:soft-page-break/><text:span text:style-name="T2">[giro profesional = career pivot] [automatización financiera = financial automation] [reposicionamiento = repositioning]</text:span></text:p>
          </text:list-item>
          <text:list-item>
            <text:p text:style-name="P10"><text:span text:style-name="T2">En lo técnico, el “para qué” concreto era este: aprender a </text:span><text:span text:style-name="Strong_20_Emphasis"><text:span text:style-name="T3">importar, manipular, visualizar y modelar datos bursátiles</text:span></text:span><text:span text:style-name="T2"> con Python; entender probabilidad y estadística aplicadas a retornos y riesgo; y terminar pudiendo montar estrategias simples y luego modelos con regresión para evaluarlos con métricas de inversión.<text:line-break/></text:span><text:span text:style-name="Strong_20_Emphasis"><text:span text:style-name="T3">English summary:</text:span></text:span><text:span text:style-name="T2"> The practical goal is to analyze stock data with Python and use statistics to model returns and risk.<text:line-break/>[retornos = returns] [riesgo = risk] [regresión lineal = linear regression] [evaluar estrategia = evaluate a strategy]</text:span></text:p>
          </text:list-item>
          <text:list-item>
            <text:p text:style-name="P10"><text:span text:style-name="T2">Además, según tus memorandos, </text:span><text:span text:style-name="Strong_20_Emphasis"><text:span text:style-name="T3">ya habías cerrado el módulo 1</text:span></text:span><text:span text:style-name="T2"> y aprobado el quiz, y estabas metido en el </text:span><text:span text:style-name="Strong_20_Emphasis"><text:span text:style-name="T3">módulo 2</text:span></text:span><text:span text:style-name="T2">, centrado en distribuciones, esperanza, varianza, </text:span><text:span text:style-name="Source_20_Text"><text:span text:style-name="T4">log return</text:span></text:span><text:span text:style-name="T2">, PDF y CDF. O sea: no vuelves desde cero; vuelves a la parte estadística aplicada a finanzas.<text:line-break/></text:span><text:span text:style-name="Strong_20_Emphasis"><text:span text:style-name="T3">English summary:</text:span></text:span><text:span text:style-name="T2"> You had already finished module 1 and were working on module 2, focused on probability distributions and returns.<text:line-break/>[esperanza = expected value] [varianza = variance] [desviación típica = standard deviation] [log return = logarithmic return]</text:span></text:p>
          </text:list-item>
          <text:list-item>
            <text:p text:style-name="P10"><text:span text:style-name="T2">Resumen directo: </text:span><text:span text:style-name="Strong_20_Emphasis"><text:span text:style-name="T3">sí sé cuál es y para qué</text:span></text:span><text:span text:style-name="T2">.<text:line-break/>Curso: </text:span><text:span text:style-name="Strong_20_Emphasis"><text:span text:style-name="T3">Python and Statistics for Financial Analysis</text:span></text:span><text:span text:style-name="T2">.<text:line-break/>Objetivo: </text:span><text:span text:style-name="Strong_20_Emphasis"><text:span text:style-name="T3">usar Python + estadística para análisis financiero y como base para tu transición a FinTech/trading systems</text:span></text:span><text:span text:style-name="T2">.<text:line-break/></text:span><text:span text:style-name="Strong_20_Emphasis"><text:span text:style-name="T3">English summary:</text:span></text:span><text:span text:style-name="T2"> Yes: the course is clear, and its purpose is to build practical financial-analysis skills for your FinTech transition.<text:line-break/></text:span><text:soft-page-break/><text:span text:style-name="T2">[análisis financiero = financial analysis] [base técnica = technical foundation] [transición a FinTech = transition into FinTech]</text:span></text:p>
          </text:list-item>
        </text:list>
        <text:p text:style-name="P11"><text:span text:style-name="T2">Dónde lo retomaría yo: </text:span><text:span text:style-name="Strong_20_Emphasis"><text:span text:style-name="T3">Módulo 2, bloque PDF vs CDF y modelado de </text:span></text:span><text:span text:style-name="Strong_20_Emphasis"><text:span text:style-name="Source_20_Text"><text:span text:style-name="T4">log returns</text:span></text:span></text:span><text:span text:style-name="T2">, porque es justo donde lo dejaste registrado. </text:span></text:p>
        <text:p text:style-name="P11"><text:span text:style-name="T2">Si quieres, te hago ahora un </text:span><text:span text:style-name="Strong_20_Emphasis"><text:span text:style-name="T3">recordatorio de 10 minutos</text:span></text:span><text:span text:style-name="T2"> del punto exacto en el que lo dejaste.</text:span></text:p>
        <text:section text:style-name="Sect2" text:name="_r_10s_">
          <text:p text:style-name="P12">Estaba con el video más importante. Me gustaría entenderlo sin volverme loco. Aydame, empecemos con el código practico. Expicame línea por linea, texto por texto, casi como si fuera tonto y refrescandome todo, lo siguiente, y traduciendo y con palabras inglés/español: Models of Stock Return import pandas as pd import numpy as np import matplotlib.pyplot as plt % matplotlib inline ms = pd.DataFrame.from_csv('../data/microsoft.csv') ms.head() Open High Low Close Adj Close Volume Date 2014-12-31 46.730000 47.439999 46.450001 46.450001 42.848763 21552500 2015-01-02 46.660000 47.419998 46.540001 46.759998 43.134731 27913900 2015-01-05 46.369999 46.730000 46.250000 46.330002 42.738068 39673900 2015-01-06 46.380001 46.750000 45.540001 45.650002 42.110783 36447900 2015-01-07 45.980000 46.459999 45.490002 46.230000 42.645817 29114100 Distribution of Log return # let play around with ms data by calculating the log daily return ms['LogReturn'] = np.log(ms['Close']).shift(-1) - np.log(ms['Close']) # Plot a histogram to show the distribution of log return of Microsoft's stock. # You can see it is very close to a normal distribution from scipy.stats import norm mu = ms['LogReturn'].mean() sigma = ms['LogReturn'].std(ddof=1) ​ density = pd.DataFrame() density['x'] = np.arange(ms['LogReturn'].min()-0.01, ms['LogReturn'].max()+0.01, 0.001) density['pdf'] = norm.pdf(density['x'], mu, sigma) ​ ms['LogReturn'].hist(bins=50, figsize=(15, 8)) plt.plot(density['x'], density['pdf'], color='red') plt.show() Calculate the probability of the stock price will drop over a certain percentage in a day # probability that the stock price of microsoft will drop over 5% in a day prob_return1 = norm.cdf(-0.05, mu, sigma) print('The Probability is ', prob_return1) The Probability is 0.000171184826087 # Now is your turn, calculate the probability that the stock price of microsoft will drop over 10% in a day prob_return1 = None print('The Probability is ', prob_return1) The Probability is 6.05677563486e-13 Expected Output: The Probability is 6.05677563486e-13 Calculate the probability of the stock price will drop over a <text:soft-page-break/>certain percentage in a year # drop over 40% in 220 days mu220 = 220*mu sigma220 = (220**0.5) * sigma print('The probability of dropping over 40% in 220 days is ', norm.cdf(-0.4, mu220, sigma220)) The probability of dropping over 40% in 220 days is 0.00291236331333 # drop over 20% in 220 days mu220 = 220*mu sigma220 = (220**0.5) * sigma drop20 = None print('The probability of dropping over 20% in 220 days is ', drop20) The probability of dropping over 20% in 220 days is 0.0353523772749 Expected Output: The probability of dropping over 20% in 220 days is 0.0353523772749 Calculate Value at risk (VaR) # Value at risk(VaR) VaR = norm.ppf(0.05, mu, sigma) print('Single day value at risk ', VaR) Single day value at risk -0.0225233624071 # Quatile # 5% quantile print('5% quantile ', norm.ppf(0.05, mu, sigma)) # 95% quantile print('95% quantile ', norm.ppf(0.95, mu, sigma)) 5% quantile -0.0225233624071 95% quantile 0.0241638253793 # This is your turn to calcuate the 25% and 75% Quantile of the return # 25% quantile q25 = None print('25% quantile ', q25) # 75% quantile q75 = None print('75% quantile ', q75) 25% quantile -0.00875205783841 75% quantile 0.0103925208107 Expected Output: 25% quantile -0.00875205783841 75% quantile 0.0103925208107 </text:p>
        </text:section>
        <text:p text:style-name="P13"><draw:frame draw:style-name="fr1" draw:name="Frame1" text:anchor-type="char" svg:width="0.041cm" draw:z-index="0"><draw:text-box fo:min-height="0.041cm"><text:p text:style-name="P14"><text:line-break/></text:p></draw:text-box></draw:frame><draw:frame draw:style-name="fr1" draw:name="Frame2" text:anchor-type="char" svg:width="0.041cm" draw:z-index="1"><draw:text-box fo:min-height="0.041cm"><text:p text:style-name="P14"><text:line-break/></text:p></draw:text-box></draw:frame>Voy a desmenuzarlo por bloques y te marcaré también los puntos donde el código del curso ya está viejo o puede confundirte hoy.</text:p>
        <text:p text:style-name="P7">Thought for 2m 6s</text:p>
        <text:p text:style-name="P8">22/04/2026 11:24:25 CEST</text:p>
        <text:p text:style-name="P11"><text:span text:style-name="T2">Sí. Vamos a hacerlo </text:span><text:span text:style-name="Strong_20_Emphasis"><text:span text:style-name="T3">muy básico, muy práctico y sin saltos</text:span></text:span><text:span text:style-name="T2">.</text:span></text:p>
        <text:p text:style-name="P9">Primero, 4 correcciones importantes para que no te líes:</text:p>
        <text:list text:style-name="L5">
          <text:list-item>
            <text:p text:style-name="P15"><text:span text:style-name="Source_20_Text"><text:span text:style-name="T4">"% matplotlib inline"</text:span></text:span><text:span text:style-name="T2"> en realidad debe ser </text:span><text:span text:style-name="Strong_20_Emphasis"><text:span text:style-name="Source_20_Text"><text:span text:style-name="T4">%matplotlib inline</text:span></text:span></text:span><text:span text:style-name="T2"> y solo funciona en </text:span><text:span text:style-name="Strong_20_Emphasis"><text:span text:style-name="T3">Jupyter Notebook</text:span></text:span><text:span text:style-name="T2">, no en un </text:span><text:span text:style-name="Source_20_Text"><text:span text:style-name="T4">.py</text:span></text:span><text:span text:style-name="T2">.<text:line-break/></text:span><text:span text:style-name="Strong_20_Emphasis"><text:span text:style-name="T3">English summary:</text:span></text:span><text:span text:style-name="T2"> </text:span><text:span text:style-name="Source_20_Text"><text:span text:style-name="T4">%matplotlib inline</text:span></text:span><text:span text:style-name="T2"> is a Jupyter-only command.<text:line-break/>[Jupyter Notebook = cuaderno Jupyter] [command = comando]</text:span></text:p>
          </text:list-item>
          <text:list-item>
            <text:p text:style-name="P15"><text:span text:style-name="Source_20_Text"><text:span text:style-name="T4">pd.DataFrame.from_csv(...)</text:span></text:span><text:span text:style-name="T2"> es </text:span><text:span text:style-name="Strong_20_Emphasis"><text:span text:style-name="T3">código antiguo</text:span></text:span><text:span text:style-name="T2">. Hoy lo normal es usar </text:span><text:span text:style-name="Source_20_Text"><text:span text:style-name="T4">pd.read_csv(...)</text:span></text:span><text:span text:style-name="T2">.<text:line-break/></text:span><text:soft-page-break/><text:span text:style-name="Strong_20_Emphasis"><text:span text:style-name="T3">English summary:</text:span></text:span><text:span text:style-name="T2"> </text:span><text:span text:style-name="Source_20_Text"><text:span text:style-name="T4">from_csv</text:span></text:span><text:span text:style-name="T2"> is old; </text:span><text:span text:style-name="Source_20_Text"><text:span text:style-name="T4">read_csv</text:span></text:span><text:span text:style-name="T2"> is the modern way.<text:line-break/>[old code = código antiguo] [modern way = forma moderna]</text:span></text:p>
          </text:list-item>
          <text:list-item>
            <text:p text:style-name="P15"><text:span text:style-name="T2">Estás calculando retornos con </text:span><text:span text:style-name="Strong_20_Emphasis"><text:span text:style-name="Source_20_Text"><text:span text:style-name="T4">Close</text:span></text:span></text:span><text:span text:style-name="T2">, pero en análisis real muchas veces se usa </text:span><text:span text:style-name="Strong_20_Emphasis"><text:span text:style-name="Source_20_Text"><text:span text:style-name="T4">Adj Close</text:span></text:span></text:span><text:span text:style-name="T2"> porque ajusta dividendos y splits. Para aprender, </text:span><text:span text:style-name="Source_20_Text"><text:span text:style-name="T4">Close</text:span></text:span><text:span text:style-name="T2"> vale.<text:line-break/></text:span><text:span text:style-name="Strong_20_Emphasis"><text:span text:style-name="T3">English summary:</text:span></text:span><text:span text:style-name="T2"> Real analysis often uses </text:span><text:span text:style-name="Source_20_Text"><text:span text:style-name="T4">Adj Close</text:span></text:span><text:span text:style-name="T2">, but </text:span><text:span text:style-name="Source_20_Text"><text:span text:style-name="T4">Close</text:span></text:span><text:span text:style-name="T2"> is fine for learning.<text:line-break/>[adjusted close = cierre ajustado] [split = desdoblamiento]</text:span></text:p>
          </text:list-item>
          <text:list-item>
            <text:p text:style-name="P15"><text:span text:style-name="T2">El curso mezcla a veces </text:span><text:span text:style-name="Strong_20_Emphasis"><text:span text:style-name="T3">log return</text:span></text:span><text:span text:style-name="T2"> con “caída del 5%” como si fuera exactamente lo mismo. </text:span><text:span text:style-name="Strong_20_Emphasis"><text:span text:style-name="T3">No es exacto</text:span></text:span><text:span text:style-name="T2">, aunque para movimientos diarios pequeños se parece bastante.<text:line-break/></text:span><text:span text:style-name="Strong_20_Emphasis"><text:span text:style-name="T3">English summary:</text:span></text:span><text:span text:style-name="T2"> The course uses an approximation: log return is close to percentage return for small daily moves.<text:line-break/>[approximation = aproximación] [percentage return = retorno porcentual]</text:span></text:p>
          </text:list-item>
        </text:list>
        <text:p text:style-name="P16"/>
        <text:h text:style-name="P17" text:outline-level="2">1) Título y carga de librerías</text:h>
        <text:section text:style-name="Sect3" text:name="code-block-viewer">
          <text:p text:style-name="P18"><text:span text:style-name="Source_20_Text"><text:span text:style-name="T5">import</text:span></text:span><text:span text:style-name="Source_20_Text"><text:span text:style-name="T6"> </text:span></text:span><text:span text:style-name="Source_20_Text"><text:span text:style-name="T7">pandas</text:span></text:span><text:span text:style-name="Source_20_Text"><text:span text:style-name="T6"> </text:span></text:span><text:span text:style-name="Source_20_Text"><text:span text:style-name="T5">as</text:span></text:span><text:span text:style-name="Source_20_Text"><text:span text:style-name="T6"> </text:span></text:span><text:span text:style-name="Source_20_Text"><text:span text:style-name="T7">pd</text:span></text:span></text:p>
          <text:p text:style-name="P18"><text:span text:style-name="Source_20_Text"><text:span text:style-name="T8">import</text:span></text:span><text:span text:style-name="Source_20_Text"><text:span text:style-name="T9"> </text:span></text:span><text:span text:style-name="Source_20_Text"><text:span text:style-name="T10">numpy</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0">np</text:span></text:span></text:p>
          <text:p text:style-name="P18"><text:span text:style-name="Source_20_Text"><text:span text:style-name="T8">import</text:span></text:span><text:span text:style-name="Source_20_Text"><text:span text:style-name="T9"> </text:span></text:span><text:span text:style-name="Source_20_Text"><text:span text:style-name="T10">matplotlib</text:span></text:span><text:span text:style-name="Source_20_Text"><text:span text:style-name="T8">.</text:span></text:span><text:span text:style-name="Source_20_Text"><text:span text:style-name="T10">pyplot</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0">plt</text:span></text:span></text:p>
          <text:p text:style-name="P18"><text:span text:style-name="Source_20_Text"><text:span text:style-name="T9">%</text:span></text:span><text:span text:style-name="Source_20_Text"><text:span text:style-name="T10">matplotlib</text:span></text:span><text:span text:style-name="Source_20_Text"><text:span text:style-name="T9"> </text:span></text:span><text:span text:style-name="Source_20_Text"><text:span text:style-name="T10">inline</text:span></text:span></text:p>
        </text:section>
        <text:h text:style-name="P19" text:outline-level="3">Línea por línea</text:h>
        <text:p text:style-name="P11"><text:span text:style-name="Source_20_Text"><text:span text:style-name="T4">import pandas as pd</text:span></text:span></text:p>
        <text:list text:style-name="L6">
          <text:list-item>
            <text:p text:style-name="P20"><text:span text:style-name="Strong_20_Emphasis"><text:span text:style-name="Source_20_Text"><text:span text:style-name="T4">pandas</text:span></text:span></text:span><text:span text:style-name="T2"> es la librería para tablas de datos.</text:span></text:p>
          </text:list-item>
          <text:list-item>
            <text:p text:style-name="P20"><text:span text:style-name="Source_20_Text"><text:span text:style-name="T4">pd</text:span></text:span><text:span text:style-name="T2"> es solo un </text:span><text:span text:style-name="Strong_20_Emphasis"><text:span text:style-name="T3">alias</text:span></text:span><text:span text:style-name="T2"> corto.</text:span></text:p>
          </text:list-item>
          <text:list-item>
            <text:p text:style-name="P20"><text:span text:style-name="T2">Piensa en </text:span><text:span text:style-name="Source_20_Text"><text:span text:style-name="T4">pandas</text:span></text:span><text:span text:style-name="T2"> como “Excel pero programable”.</text:span></text:p>
          </text:list-item>
          <text:list-item>
            <text:p text:style-name="P21">Lo usarás para cargar CSVs, filtrar columnas, calcular medias, etc.</text:p>
          </text:list-item>
        </text:list>
        <text:p text:style-name="P8">[table = tabla] [dataframe = tabla de datos] [alias = alias]</text:p>
        <text:p text:style-name="P11"><text:span text:style-name="Source_20_Text"><text:span text:style-name="T4">import numpy as np</text:span></text:span></text:p>
        <text:list text:style-name="L7">
          <text:list-item>
            <text:p text:style-name="P22"><text:span text:style-name="Strong_20_Emphasis"><text:span text:style-name="Source_20_Text"><text:span text:style-name="T4">numpy</text:span></text:span></text:span><text:span text:style-name="T2"> es la librería matemática base.</text:span></text:p>
          </text:list-item>
          <text:list-item>
            <text:p text:style-name="P22"><text:soft-page-break/><text:span text:style-name="Source_20_Text"><text:span text:style-name="T4">np</text:span></text:span><text:span text:style-name="T2"> también es un alias corto.</text:span></text:p>
          </text:list-item>
          <text:list-item>
            <text:p text:style-name="P22"><text:span text:style-name="T2">Aquí la usamos sobre todo para </text:span><text:span text:style-name="Source_20_Text"><text:span text:style-name="T4">np.log(...)</text:span></text:span><text:span text:style-name="T2"> y para generar rangos numéricos.</text:span></text:p>
          </text:list-item>
        </text:list>
        <text:p text:style-name="P8">[array = array] [natural log = logaritmo natural]</text:p>
        <text:p text:style-name="P11"><text:span text:style-name="Source_20_Text"><text:span text:style-name="T4">import matplotlib.pyplot as plt</text:span></text:span></text:p>
        <text:list text:style-name="L8">
          <text:list-item>
            <text:p text:style-name="P23"><text:span text:style-name="Source_20_Text"><text:span text:style-name="T4">matplotlib</text:span></text:span><text:span text:style-name="T2"> dibuja gráficos.</text:span></text:p>
          </text:list-item>
          <text:list-item>
            <text:p text:style-name="P23"><text:span text:style-name="Source_20_Text"><text:span text:style-name="T4">pyplot</text:span></text:span><text:span text:style-name="T2"> es el módulo típico para hacer plots.</text:span></text:p>
          </text:list-item>
          <text:list-item>
            <text:p text:style-name="P23"><text:span text:style-name="Source_20_Text"><text:span text:style-name="T4">plt</text:span></text:span><text:span text:style-name="T2"> es el alias habitual.</text:span></text:p>
          </text:list-item>
        </text:list>
        <text:p text:style-name="P8">[plot = gráfico] [chart = gráfico] [figure = figura]</text:p>
        <text:p text:style-name="P11"><text:span text:style-name="Source_20_Text"><text:span text:style-name="T4">%matplotlib inline</text:span></text:span></text:p>
        <text:list text:style-name="L9">
          <text:list-item>
            <text:p text:style-name="P24">Esto le dice a Jupyter: “muestra los gráficos dentro del notebook”.</text:p>
          </text:list-item>
          <text:list-item>
            <text:p text:style-name="P25"><text:span text:style-name="T2">Si estás en script </text:span><text:span text:style-name="Source_20_Text"><text:span text:style-name="T4">.py</text:span></text:span><text:span text:style-name="T2">, esto no va. Ahí usarías </text:span><text:span text:style-name="Source_20_Text"><text:span text:style-name="T4">plt.show()</text:span></text:span><text:span text:style-name="T2">.</text:span></text:p>
          </text:list-item>
        </text:list>
        <text:p text:style-name="P8">[inline = incrustado] [show = mostrar]</text:p>
        <text:p text:style-name="P11"><text:span text:style-name="Strong_20_Emphasis"><text:span text:style-name="T3">English summary:</text:span></text:span><text:span text:style-name="T2"> These lines load the data, math, and plotting libraries.<text:line-break/>[load libraries = cargar librerías]</text:span></text:p>
        <text:p text:style-name="P16"/>
        <text:h text:style-name="P17" text:outline-level="2">2) Cargar el CSV y ver las primeras filas</text:h>
        <text:section text:style-name="Sect3" text:name="Section1">
          <text:p text:style-name="P18"><text:bookmark text:name="code-block-viewer"/><text:span text:style-name="Source_20_Text"><text:span text:style-name="T7">ms</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pd</text:span></text:span><text:span text:style-name="Source_20_Text"><text:span text:style-name="T5">.</text:span></text:span><text:span text:style-name="Source_20_Text"><text:span text:style-name="T6">DataFrame</text:span></text:span><text:span text:style-name="Source_20_Text"><text:span text:style-name="T5">.</text:span></text:span><text:span text:style-name="Source_20_Text"><text:span text:style-name="T6">from_csv(</text:span></text:span><text:span text:style-name="Source_20_Text"><text:span text:style-name="T11">'../data/microsoft.csv'</text:span></text:span><text:span text:style-name="Source_20_Text"><text:span text:style-name="T6">)</text:span></text:span></text:p>
          <text:p text:style-name="P18"><text:span text:style-name="Source_20_Text"><text:span text:style-name="T10">ms</text:span></text:span><text:span text:style-name="Source_20_Text"><text:span text:style-name="T8">.</text:span></text:span><text:span text:style-name="Source_20_Text"><text:span text:style-name="T9">head()</text:span></text:span></text:p>
        </text:section>
        <text:h text:style-name="P19" text:outline-level="3">Línea por línea</text:h>
        <text:p text:style-name="P11"><text:span text:style-name="Source_20_Text"><text:span text:style-name="T4">ms = ...</text:span></text:span></text:p>
        <text:list text:style-name="L10">
          <text:list-item>
            <text:p text:style-name="P26"><text:span text:style-name="Source_20_Text"><text:span text:style-name="T4">ms</text:span></text:span><text:span text:style-name="T2"> será tu variable con los datos de Microsoft.</text:span></text:p>
          </text:list-item>
          <text:list-item>
            <text:p text:style-name="P26"><text:span text:style-name="T2">Podrías llamarla </text:span><text:span text:style-name="Source_20_Text"><text:span text:style-name="T4">microsoft</text:span></text:span><text:span text:style-name="T2">, pero el curso usa </text:span><text:span text:style-name="Source_20_Text"><text:span text:style-name="T4">ms</text:span></text:span><text:span text:style-name="T2">.</text:span></text:p>
          </text:list-item>
        </text:list>
        <text:p text:style-name="P8">[variable = variable] [dataset = conjunto de datos]</text:p>
        <text:p text:style-name="P11"><text:span text:style-name="Source_20_Text"><text:span text:style-name="T4">pd.DataFrame.from_csv('../data/microsoft.csv')</text:span></text:span></text:p>
        <text:list text:style-name="L11">
          <text:list-item>
            <text:p text:style-name="P27">Lee el archivo CSV.</text:p>
          </text:list-item>
          <text:list-item>
            <text:p text:style-name="P28"><text:soft-page-break/><text:span text:style-name="Source_20_Text"><text:span text:style-name="T4">../data/microsoft.csv</text:span></text:span><text:span text:style-name="T2"> significa:</text:span></text:p>
            <text:list>
              <text:list-item>
                <text:p text:style-name="P28"><text:span text:style-name="Source_20_Text"><text:span text:style-name="T4">..</text:span></text:span><text:span text:style-name="T2"> = sube una carpeta</text:span></text:p>
              </text:list-item>
              <text:list-item>
                <text:p text:style-name="P28"><text:span text:style-name="T2">luego entra en </text:span><text:span text:style-name="Source_20_Text"><text:span text:style-name="T4">data</text:span></text:span></text:p>
              </text:list-item>
              <text:list-item>
                <text:p text:style-name="P28"><text:span text:style-name="T2">y abre </text:span><text:span text:style-name="Source_20_Text"><text:span text:style-name="T4">microsoft.csv</text:span></text:span></text:p>
              </text:list-item>
            </text:list>
          </text:list-item>
        </text:list>
        <text:p text:style-name="P8">[path = ruta] [relative path = ruta relativa]</text:p>
        <text:p text:style-name="P11"><text:span text:style-name="Source_20_Text"><text:span text:style-name="T4">ms.head()</text:span></text:span></text:p>
        <text:list text:style-name="L12">
          <text:list-item>
            <text:p text:style-name="P29"><text:span text:style-name="Source_20_Text"><text:span text:style-name="T4">head()</text:span></text:span><text:span text:style-name="T2"> enseña las primeras 5 filas.</text:span></text:p>
          </text:list-item>
          <text:list-item>
            <text:p text:style-name="P30">Sirve para comprobar que el archivo cargó bien.</text:p>
          </text:list-item>
        </text:list>
        <text:p text:style-name="P8">[first rows = primeras filas] [preview = vista previa]</text:p>
        <text:h text:style-name="P31" text:outline-level="3">Qué significa cada columna</text:h>
        <text:list text:style-name="L13">
          <text:list-item>
            <text:p text:style-name="P32"><text:span text:style-name="Source_20_Text"><text:span text:style-name="T4">Open</text:span></text:span><text:span text:style-name="T2">: precio de apertura</text:span></text:p>
          </text:list-item>
          <text:list-item>
            <text:p text:style-name="P32"><text:span text:style-name="Source_20_Text"><text:span text:style-name="T4">High</text:span></text:span><text:span text:style-name="T2">: precio máximo del día</text:span></text:p>
          </text:list-item>
          <text:list-item>
            <text:p text:style-name="P32"><text:span text:style-name="Source_20_Text"><text:span text:style-name="T4">Low</text:span></text:span><text:span text:style-name="T2">: precio mínimo del día</text:span></text:p>
          </text:list-item>
          <text:list-item>
            <text:p text:style-name="P32"><text:span text:style-name="Source_20_Text"><text:span text:style-name="T4">Close</text:span></text:span><text:span text:style-name="T2">: precio de cierre</text:span></text:p>
          </text:list-item>
          <text:list-item>
            <text:p text:style-name="P32"><text:span text:style-name="Source_20_Text"><text:span text:style-name="T4">Adj Close</text:span></text:span><text:span text:style-name="T2">: cierre ajustado</text:span></text:p>
          </text:list-item>
          <text:list-item>
            <text:p text:style-name="P32"><text:span text:style-name="Source_20_Text"><text:span text:style-name="T4">Volume</text:span></text:span><text:span text:style-name="T2">: volumen negociado, número de acciones movidas</text:span></text:p>
          </text:list-item>
        </text:list>
        <text:p text:style-name="P8">[open = apertura] [high = máximo] [low = mínimo] [close = cierre] [volume = volumen]</text:p>
        <text:p text:style-name="P11"><text:span text:style-name="Strong_20_Emphasis"><text:span text:style-name="T3">English summary:</text:span></text:span><text:span text:style-name="T2"> This block loads Microsoft stock data and shows the first 5 rows.<text:line-break/>[stock data = datos bursátiles] [first 5 rows = primeras 5 filas]</text:span></text:p>
        <text:h text:style-name="P31" text:outline-level="3">Forma moderna de cargarlo hoy</text:h>
        <text:section text:style-name="Sect3" text:name="Section2">
          <text:p text:style-name="P18"><text:bookmark text:name="code-block-viewer Copy 10"/><text:span text:style-name="Source_20_Text"><text:span text:style-name="T7">ms</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pd</text:span></text:span><text:span text:style-name="Source_20_Text"><text:span text:style-name="T5">.</text:span></text:span><text:span text:style-name="Source_20_Text"><text:span text:style-name="T6">read_csv(</text:span></text:span><text:span text:style-name="Source_20_Text"><text:span text:style-name="T11">'../data/microsoft.csv'</text:span></text:span><text:span text:style-name="Source_20_Text"><text:span text:style-name="T6">, </text:span></text:span><text:span text:style-name="Source_20_Text"><text:span text:style-name="T7">index_col</text:span></text:span><text:span text:style-name="Source_20_Text"><text:span text:style-name="T5">=</text:span></text:span><text:span text:style-name="Source_20_Text"><text:span text:style-name="T11">'Date'</text:span></text:span><text:span text:style-name="Source_20_Text"><text:span text:style-name="T6">, </text:span></text:span><text:span text:style-name="Source_20_Text"><text:span text:style-name="T7">parse_dates</text:span></text:span><text:span text:style-name="Source_20_Text"><text:span text:style-name="T5">=</text:span></text:span><text:span text:style-name="Source_20_Text"><text:span text:style-name="T6">[</text:span></text:span><text:span text:style-name="Source_20_Text"><text:span text:style-name="T11">'Date'</text:span></text:span><text:span text:style-name="Source_20_Text"><text:span text:style-name="T6">])</text:span></text:span></text:p>
        </text:section>
        <text:list text:style-name="L14">
          <text:list-item>
            <text:p text:style-name="P33"><text:span text:style-name="Source_20_Text"><text:span text:style-name="T12">index_col='Date'</text:span></text:span><text:span text:style-name="T13"> pone la fecha como índice.</text:span></text:p>
          </text:list-item>
          <text:list-item>
            <text:p text:style-name="P33"><text:span text:style-name="Source_20_Text"><text:span text:style-name="T4">parse_dates=['Date']</text:span></text:span><text:span text:style-name="T2"> convierte el texto en fecha real.</text:span></text:p>
          </text:list-item>
        </text:list>
        <text:p text:style-name="P8">[index = índice] [parse dates = convertir fechas]</text:p>
        <text:p text:style-name="P16"><text:soft-page-break/></text:p>
        <text:h text:style-name="P17" text:outline-level="2">3) “Distribution of Log Return”</text:h>
        <text:p text:style-name="P8">Ese texto significa:</text:p>
        <text:list text:style-name="L15">
          <text:list-item>
            <text:p text:style-name="P34"><text:span text:style-name="Strong_20_Emphasis"><text:span text:style-name="T3">Distribution</text:span></text:span><text:span text:style-name="T2"> = distribución</text:span></text:p>
          </text:list-item>
          <text:list-item>
            <text:p text:style-name="P34"><text:span text:style-name="Strong_20_Emphasis"><text:span text:style-name="T3">Log return</text:span></text:span><text:span text:style-name="T2"> = retorno logarítmico</text:span></text:p>
          </text:list-item>
          <text:list-item>
            <text:p text:style-name="P34"><text:span text:style-name="Strong_20_Emphasis"><text:span text:style-name="T3">Stock return</text:span></text:span><text:span text:style-name="T2"> = retorno de la acción</text:span></text:p>
          </text:list-item>
        </text:list>
        <text:p text:style-name="P8">La idea es:<text:line-break/>“No quiero mirar solo precios; quiero mirar cómo cambian los precios de un día a otro”.</text:p>
        <text:p text:style-name="P11"><text:span text:style-name="Strong_20_Emphasis"><text:span text:style-name="T3">English summary:</text:span></text:span><text:span text:style-name="T2"> Now we stop looking at prices and start looking at returns.<text:line-break/>[return = retorno] [price change = cambio de precio]</text:span></text:p>
        <text:p text:style-name="P16"/>
        <text:h text:style-name="P17" text:outline-level="2">4) Calcular el log return diario</text:h>
        <text:section text:style-name="Sect3" text:name="Section3">
          <text:p text:style-name="P18"><text:bookmark text:name="code-block-viewer Copy 11"/><text:span text:style-name="Source_20_Text"><text:span text:style-name="T7">ms</text:span></text:span><text:span text:style-name="Source_20_Text"><text:span text:style-name="T6">[</text:span></text:span><text:span text:style-name="Source_20_Text"><text:span text:style-name="T11">'LogReturn'</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7">ms</text:span></text:span><text:span text:style-name="Source_20_Text"><text:span text:style-name="T6">[</text:span></text:span><text:span text:style-name="Source_20_Text"><text:span text:style-name="T11">'Close'</text:span></text:span><text:span text:style-name="Source_20_Text"><text:span text:style-name="T6">])</text:span></text:span><text:span text:style-name="Source_20_Text"><text:span text:style-name="T5">.</text:span></text:span><text:span text:style-name="Source_20_Text"><text:span text:style-name="T6">shift(</text:span></text:span><text:span text:style-name="Source_20_Text"><text:span text:style-name="T5">-</text:span></text:span><text:span text:style-name="Source_20_Text"><text:span text:style-name="T14">1</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7">ms</text:span></text:span><text:span text:style-name="Source_20_Text"><text:span text:style-name="T6">[</text:span></text:span><text:span text:style-name="Source_20_Text"><text:span text:style-name="T11">'Close'</text:span></text:span><text:span text:style-name="Source_20_Text"><text:span text:style-name="T6">])</text:span></text:span></text:p>
        </text:section>
        <text:p text:style-name="P35">Esta es la línea más importante del bloque. La parto en trozos.</text:p>
        <text:h text:style-name="P31" text:outline-level="3">Parte 1</text:h>
        <text:p text:style-name="P11"><text:span text:style-name="Source_20_Text"><text:span text:style-name="T4">ms['Close']</text:span></text:span></text:p>
        <text:list text:style-name="L16">
          <text:list-item>
            <text:p text:style-name="P36"><text:span text:style-name="T2">Coge la columna </text:span><text:span text:style-name="Source_20_Text"><text:span text:style-name="T4">Close</text:span></text:span><text:span text:style-name="T2">.</text:span></text:p>
          </text:list-item>
        </text:list>
        <text:p text:style-name="P8">[select a column = seleccionar una columna]</text:p>
        <text:h text:style-name="P31" text:outline-level="3">Parte 2</text:h>
        <text:p text:style-name="P11"><text:span text:style-name="Source_20_Text"><text:span text:style-name="T4">np.log(ms['Close'])</text:span></text:span></text:p>
        <text:list text:style-name="L17">
          <text:list-item>
            <text:p text:style-name="P37">Hace el logaritmo natural de cada precio de cierre.</text:p>
          </text:list-item>
        </text:list>
        <text:p text:style-name="P8">Por ejemplo, si el cierre es 100:</text:p>
        <text:list text:style-name="L18">
          <text:list-item>
            <text:p text:style-name="P38"><text:span text:style-name="Source_20_Text"><text:span text:style-name="T4">np.log(100)</text:span></text:span><text:span text:style-name="T2"> ≈ 4.6052</text:span></text:p>
          </text:list-item>
        </text:list>
        <text:p text:style-name="P11"><text:soft-page-break/><text:span text:style-name="T2">No te importa ese número por sí solo.<text:line-break/>Lo importante es la </text:span><text:span text:style-name="Strong_20_Emphasis"><text:span text:style-name="T3">diferencia entre logs</text:span></text:span><text:span text:style-name="T2">.</text:span></text:p>
        <text:p text:style-name="P9">[natural logarithm = logaritmo natural] [difference = diferencia]</text:p>
        <text:h text:style-name="P31" text:outline-level="3">Parte 3</text:h>
        <text:p text:style-name="P11"><text:span text:style-name="Source_20_Text"><text:span text:style-name="T4">np.log(ms['Close']).shift(-1)</text:span></text:span></text:p>
        <text:list text:style-name="L19">
          <text:list-item>
            <text:p text:style-name="P39"><text:span text:style-name="Source_20_Text"><text:span text:style-name="T4">shift(-1)</text:span></text:span><text:span text:style-name="T2"> mueve la serie </text:span><text:span text:style-name="Strong_20_Emphasis"><text:span text:style-name="T3">una fila hacia arriba</text:span></text:span><text:span text:style-name="T2">.</text:span></text:p>
          </text:list-item>
          <text:list-item>
            <text:p text:style-name="P40">O sea: en la fila de hoy, colocas el valor de mañana.</text:p>
          </text:list-item>
        </text:list>
        <text:p text:style-name="P8">Ejemplo mental:</text:p>
        <table:table table:name="Table1" table:style-name="Table1">
          <table:table-column table:style-name="Table1.A"/>
          <table:table-column table:style-name="Table1.B"/>
          <table:table-header-rows>
            <table:table-row>
              <table:table-cell table:style-name="Table1.A1" office:value-type="string">
                <text:p text:style-name="P41">Día</text:p>
              </table:table-cell>
              <table:table-cell table:style-name="Table1.A1" office:value-type="string">
                <text:p text:style-name="P42">Close</text:p>
              </table:table-cell>
            </table:table-row>
          </table:table-header-rows>
          <table:table-row>
            <table:table-cell table:style-name="Table1.A2" office:value-type="string">
              <text:p text:style-name="P43">Lunes</text:p>
            </table:table-cell>
            <table:table-cell table:style-name="Table1.A2" office:value-type="string">
              <text:p text:style-name="P44">100</text:p>
            </table:table-cell>
          </table:table-row>
          <table:table-row>
            <table:table-cell table:style-name="Table1.A2" office:value-type="string">
              <text:p text:style-name="P43">Martes</text:p>
            </table:table-cell>
            <table:table-cell table:style-name="Table1.A2" office:value-type="string">
              <text:p text:style-name="P44">102</text:p>
            </table:table-cell>
          </table:table-row>
          <table:table-row>
            <table:table-cell table:style-name="Table1.A4" office:value-type="string">
              <text:p text:style-name="P43">Miércoles</text:p>
            </table:table-cell>
            <table:table-cell table:style-name="Table1.A4" office:value-type="string">
              <text:p text:style-name="P45">101</text:p>
            </table:table-cell>
          </table:table-row>
        </table:table>
        <text:p text:style-name="P46"><text:span text:style-name="T2">Después de </text:span><text:span text:style-name="Source_20_Text"><text:span text:style-name="T4">shift(-1)</text:span></text:span><text:span text:style-name="T2">:</text:span></text:p>
        <table:table table:name="Table2" table:style-name="Table2">
          <table:table-column table:style-name="Table2.A"/>
          <table:table-column table:style-name="Table2.B"/>
          <table:table-header-rows>
            <table:table-row>
              <table:table-cell table:style-name="Table2.A1" office:value-type="string">
                <text:p text:style-name="P41">Día</text:p>
              </table:table-cell>
              <table:table-cell table:style-name="Table2.A1" office:value-type="string">
                <text:p text:style-name="P42">Close shifted(-1)</text:p>
              </table:table-cell>
            </table:table-row>
          </table:table-header-rows>
          <table:table-row>
            <table:table-cell table:style-name="Table2.A2" office:value-type="string">
              <text:p text:style-name="P43">Lunes</text:p>
            </table:table-cell>
            <table:table-cell table:style-name="Table2.A2" office:value-type="string">
              <text:p text:style-name="P44">102</text:p>
            </table:table-cell>
          </table:table-row>
          <table:table-row>
            <table:table-cell table:style-name="Table2.A2" office:value-type="string">
              <text:p text:style-name="P43">Martes</text:p>
            </table:table-cell>
            <table:table-cell table:style-name="Table2.A2" office:value-type="string">
              <text:p text:style-name="P44">101</text:p>
            </table:table-cell>
          </table:table-row>
          <table:table-row>
            <table:table-cell table:style-name="Table2.A4" office:value-type="string">
              <text:p text:style-name="P43">Miércoles</text:p>
            </table:table-cell>
            <table:table-cell table:style-name="Table2.A4" office:value-type="string">
              <text:p text:style-name="P45">NaN</text:p>
            </table:table-cell>
          </table:table-row>
        </table:table>
        <text:p text:style-name="P47">[shift = desplazar] [next day = día siguiente] [NaN = valor vacío]</text:p>
        <text:h text:style-name="P48" text:outline-level="3">Parte 4</text:h>
        <text:p text:style-name="P46"><text:span text:style-name="Source_20_Text"><text:span text:style-name="T4">np.log(ms['Close']).shift(-1) - np.log(ms['Close'])</text:span></text:span></text:p>
        <text:p text:style-name="P49">Esto hace:</text:p>
        <text:p text:style-name="P46"><text:span text:style-name="Strong_20_Emphasis"><text:span text:style-name="T3">log(cierre de mañana) - log(cierre de hoy)</text:span></text:span></text:p>
        <text:p text:style-name="P49">Y por propiedad matemática eso es igual a:</text:p>
        <text:p text:style-name="P46"><text:span text:style-name="Strong_20_Emphasis"><text:span text:style-name="T3">log(cierre de mañana / cierre de hoy)</text:span></text:span></text:p>
        <text:p text:style-name="P46"><text:soft-page-break/><text:span text:style-name="T2">Eso es el </text:span><text:span text:style-name="Strong_20_Emphasis"><text:span text:style-name="T3">log return diario</text:span></text:span><text:span text:style-name="T2">.</text:span></text:p>
        <text:h text:style-name="P48" text:outline-level="3">Fórmula mental</text:h>
        <text:p text:style-name="P50"><draw:frame draw:style-name="fr2" draw:name="Frame3" text:anchor-type="char" svg:width="0.041cm" draw:z-index="2"><draw:text-box fo:min-height="0.041cm"><text:p text:style-name="P14">LogReturnt=ln⁡(Pt+1Pt)</text:p></draw:text-box></draw:frame>LogReturn<text:span text:style-name="T15">t</text:span>​=ln<text:span text:style-name="T16">(</text:span><text:span text:style-name="T15">Pt</text:span>​<text:span text:style-name="T15">Pt</text:span>+1​​<text:span text:style-name="T16">)</text:span></text:p>
        <text:p text:style-name="P47">Interpretación:</text:p>
        <text:list text:style-name="L20">
          <text:list-item>
            <text:p text:style-name="P51">si sale positivo, el precio subió</text:p>
          </text:list-item>
          <text:list-item>
            <text:p text:style-name="P51">si sale negativo, el precio bajó</text:p>
          </text:list-item>
          <text:list-item>
            <text:p text:style-name="P51">si sale cerca de 0, apenas cambió</text:p>
          </text:list-item>
        </text:list>
        <text:h text:style-name="P48" text:outline-level="3">Ejemplo simple</text:h>
        <text:p text:style-name="P47">Si hoy vale 100 y mañana 101:</text:p>
        <text:p text:style-name="P52"><draw:frame draw:style-name="fr2" draw:name="Frame4" text:anchor-type="char" svg:width="0.041cm" draw:z-index="3"><draw:text-box fo:min-height="0.041cm"><text:p text:style-name="P14">ln⁡(101/100)=ln⁡(1.01)≈0.00995</text:p></draw:text-box></draw:frame>ln(101/100)=ln(1.01)≈0.00995</text:p>
        <text:p text:style-name="P47">Eso es casi un 1%, pero en formato logarítmico.</text:p>
        <text:h text:style-name="P48" text:outline-level="3">Muy importante</text:h>
        <text:p text:style-name="P46"><text:span text:style-name="T2">La última fila queda </text:span><text:span text:style-name="Source_20_Text"><text:span text:style-name="T4">NaN</text:span></text:span><text:span text:style-name="T2">, porque no hay “mañana” para el último dato.</text:span></text:p>
        <text:p text:style-name="P46"><text:span text:style-name="Strong_20_Emphasis"><text:span text:style-name="T3">English summary:</text:span></text:span><text:span text:style-name="T2"> This line computes the daily log return: tomorrow’s log price minus today’s log price.<text:line-break/>[log return = retorno logarítmico] [positive = positivo] [negative = negativo]</text:span></text:p>
        <text:p text:style-name="P53"/>
        <text:h text:style-name="P54" text:outline-level="2">5) Ajustar una normal y dibujar histograma</text:h>
        <text:section text:style-name="Sect3" text:name="Section4">
          <text:p text:style-name="P55"><text:bookmark text:name="code-block-viewer Copy 12"/><text:span text:style-name="Source_20_Text"><text:span text:style-name="T5">from</text:span></text:span><text:span text:style-name="Source_20_Text"><text:span text:style-name="T6"> </text:span></text:span><text:span text:style-name="Source_20_Text"><text:span text:style-name="T7">scipy</text:span></text:span><text:span text:style-name="Source_20_Text"><text:span text:style-name="T5">.</text:span></text:span><text:span text:style-name="Source_20_Text"><text:span text:style-name="T7">stats</text:span></text:span><text:span text:style-name="Source_20_Text"><text:span text:style-name="T6"> </text:span></text:span><text:span text:style-name="Source_20_Text"><text:span text:style-name="T5">import</text:span></text:span><text:span text:style-name="Source_20_Text"><text:span text:style-name="T6"> </text:span></text:span><text:span text:style-name="Source_20_Text"><text:span text:style-name="T7">norm</text:span></text:span></text:p>
          <text:p text:style-name="P55"><text:span text:style-name="Source_20_Text"><text:span text:style-name="T10">mu</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ean()</text:span></text:span></text:p>
          <text:p text:style-name="P55"><text:span text:style-name="Source_20_Text"><text:span text:style-name="T10">sigma</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std(</text:span></text:span><text:span text:style-name="Source_20_Text"><text:span text:style-name="T10">ddof</text:span></text:span><text:span text:style-name="Source_20_Text"><text:span text:style-name="T8">=</text:span></text:span><text:span text:style-name="Source_20_Text"><text:span text:style-name="T18">1</text:span></text:span><text:span text:style-name="Source_20_Text"><text:span text:style-name="T9">)</text:span></text:span></text:p>
          <text:p text:style-name="P55"><text:span text:style-name="Source_20_Text"><text:span text:style-name="T10">density</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pd</text:span></text:span><text:span text:style-name="Source_20_Text"><text:span text:style-name="T8">.</text:span></text:span><text:span text:style-name="Source_20_Text"><text:span text:style-name="T9">DataFrame()</text:span></text:span></text:p>
          <text:p text:style-name="P55"><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p</text:span></text:span><text:span text:style-name="Source_20_Text"><text:span text:style-name="T8">.</text:span></text:span><text:span text:style-name="Source_20_Text"><text:span text:style-name="T9">arange(</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in()</text:span></text:span><text:span text:style-name="Source_20_Text"><text:span text:style-name="T8">-</text:span></text:span><text:span text:style-name="Source_20_Text"><text:span text:style-name="T18">0.01</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ax()</text:span></text:span><text:span text:style-name="Source_20_Text"><text:span text:style-name="T8">+</text:span></text:span><text:span text:style-name="Source_20_Text"><text:span text:style-name="T18">0.01</text:span></text:span><text:span text:style-name="Source_20_Text"><text:span text:style-name="T9">, </text:span></text:span><text:span text:style-name="Source_20_Text"><text:span text:style-name="T18">0.001</text:span></text:span><text:span text:style-name="Source_20_Text"><text:span text:style-name="T9">)</text:span></text:span></text:p>
          <text:p text:style-name="P55"><text:span text:style-name="Source_20_Text"><text:span text:style-name="T10">density</text:span></text:span><text:span text:style-name="Source_20_Text"><text:span text:style-name="T9">[</text:span></text:span><text:span text:style-name="Source_20_Text"><text:span text:style-name="T17">'pdf'</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df(</text:span></text:span><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hist(</text:span></text:span><text:span text:style-name="Source_20_Text"><text:span text:style-name="T10">bins</text:span></text:span><text:span text:style-name="Source_20_Text"><text:span text:style-name="T8">=</text:span></text:span><text:span text:style-name="Source_20_Text"><text:span text:style-name="T18">50</text:span></text:span><text:span text:style-name="Source_20_Text"><text:span text:style-name="T9">, </text:span></text:span><text:span text:style-name="Source_20_Text"><text:span text:style-name="T10">figsize</text:span></text:span><text:span text:style-name="Source_20_Text"><text:span text:style-name="T8">=</text:span></text:span><text:span text:style-name="Source_20_Text"><text:span text:style-name="T9">(</text:span></text:span><text:span text:style-name="Source_20_Text"><text:span text:style-name="T18">15</text:span></text:span><text:span text:style-name="Source_20_Text"><text:span text:style-name="T9">, </text:span></text:span><text:span text:style-name="Source_20_Text"><text:span text:style-name="T18">8</text:span></text:span><text:span text:style-name="Source_20_Text"><text:span text:style-name="T9">))</text:span></text:span></text:p>
          <text:p text:style-name="P55"><text:soft-page-break/><text:span text:style-name="Source_20_Text"><text:span text:style-name="T10">plt</text:span></text:span><text:span text:style-name="Source_20_Text"><text:span text:style-name="T8">.</text:span></text:span><text:span text:style-name="Source_20_Text"><text:span text:style-name="T9">plot(</text:span></text:span><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10">density</text:span></text:span><text:span text:style-name="Source_20_Text"><text:span text:style-name="T9">[</text:span></text:span><text:span text:style-name="Source_20_Text"><text:span text:style-name="T17">'pdf'</text:span></text:span><text:span text:style-name="Source_20_Text"><text:span text:style-name="T9">], </text:span></text:span><text:span text:style-name="Source_20_Text"><text:span text:style-name="T10">color</text:span></text:span><text:span text:style-name="Source_20_Text"><text:span text:style-name="T8">=</text:span></text:span><text:span text:style-name="Source_20_Text"><text:span text:style-name="T17">'red'</text:span></text:span><text:span text:style-name="Source_20_Text"><text:span text:style-name="T9">)</text:span></text:span></text:p>
          <text:p text:style-name="P55"><text:span text:style-name="Source_20_Text"><text:span text:style-name="T10">plt</text:span></text:span><text:span text:style-name="Source_20_Text"><text:span text:style-name="T8">.</text:span></text:span><text:span text:style-name="Source_20_Text"><text:span text:style-name="T9">show()</text:span></text:span></text:p>
        </text:section>
        <text:h text:style-name="P56" text:outline-level="3"><text:span text:style-name="Source_20_Text"><text:span text:style-name="T19">from scipy.stats import norm</text:span></text:span></text:h>
        <text:list text:style-name="L21">
          <text:list-item>
            <text:p text:style-name="P57">Importa la distribución normal.</text:p>
          </text:list-item>
          <text:list-item>
            <text:p text:style-name="P58"><text:span text:style-name="Source_20_Text"><text:span text:style-name="T4">norm</text:span></text:span><text:span text:style-name="T2"> representa la </text:span><text:span text:style-name="Strong_20_Emphasis"><text:span text:style-name="T3">Normal distribution</text:span></text:span><text:span text:style-name="T2"> o </text:span><text:span text:style-name="Strong_20_Emphasis"><text:span text:style-name="T3">Gaussian distribution</text:span></text:span><text:span text:style-name="T2">.</text:span></text:p>
          </text:list-item>
        </text:list>
        <text:p text:style-name="P47">[normal distribution = distribución normal] [Gaussian = gaussiana]</text:p>
        <text:h text:style-name="P56" text:outline-level="3"><text:span text:style-name="Source_20_Text"><text:span text:style-name="T20">mu = ms['LogReturn'].mean()</text:span></text:span></text:h>
        <text:list text:style-name="L22">
          <text:list-item>
            <text:p text:style-name="P59"><text:span text:style-name="Source_20_Text"><text:span text:style-name="T4">mean()</text:span></text:span><text:span text:style-name="T2"> = media.</text:span></text:p>
          </text:list-item>
          <text:list-item>
            <text:p text:style-name="P59"><text:span text:style-name="Source_20_Text"><text:span text:style-name="T4">mu</text:span></text:span><text:span text:style-name="T2"> es la letra griega μ.</text:span></text:p>
          </text:list-item>
          <text:list-item>
            <text:p text:style-name="P59"><text:span text:style-name="T2">Aquí representa la </text:span><text:span text:style-name="Strong_20_Emphasis"><text:span text:style-name="T3">media de los log returns diarios</text:span></text:span><text:span text:style-name="T2">.</text:span></text:p>
          </text:list-item>
        </text:list>
        <text:p text:style-name="P47">[mean = media] [average = media]</text:p>
        <text:h text:style-name="P56" text:outline-level="3"><text:span text:style-name="Source_20_Text"><text:span text:style-name="T20">sigma = ms['LogReturn'].std(ddof=1)</text:span></text:span></text:h>
        <text:list text:style-name="L23">
          <text:list-item>
            <text:p text:style-name="P60"><text:span text:style-name="Source_20_Text"><text:span text:style-name="T4">std()</text:span></text:span><text:span text:style-name="T2"> = desviación típica o desviación estándar.</text:span></text:p>
          </text:list-item>
          <text:list-item>
            <text:p text:style-name="P60"><text:span text:style-name="Source_20_Text"><text:span text:style-name="T4">sigma</text:span></text:span><text:span text:style-name="T2"> es la letra griega σ.</text:span></text:p>
          </text:list-item>
          <text:list-item>
            <text:p text:style-name="P61">Mide cuánto se dispersan los retornos alrededor de la media.</text:p>
          </text:list-item>
        </text:list>
        <text:p text:style-name="P47">[standard deviation = desviación típica] [dispersion = dispersión]</text:p>
        <text:h text:style-name="P56" text:outline-level="3"><text:span text:style-name="T21">¿Qué es </text:span><text:span text:style-name="Source_20_Text"><text:span text:style-name="T20">ddof=1</text:span></text:span><text:span text:style-name="T21">?</text:span></text:h>
        <text:list text:style-name="L24">
          <text:list-item>
            <text:p text:style-name="P62">Es el ajuste muestral.</text:p>
          </text:list-item>
          <text:list-item>
            <text:p text:style-name="P63"><text:span text:style-name="T2">Hace que la desviación se calcule con </text:span><text:span text:style-name="Source_20_Text"><text:span text:style-name="T4">n-1</text:span></text:span><text:span text:style-name="T2">, no con </text:span><text:span text:style-name="Source_20_Text"><text:span text:style-name="T4">n</text:span></text:span><text:span text:style-name="T2">.</text:span></text:p>
          </text:list-item>
          <text:list-item>
            <text:p text:style-name="P62">En datos reales históricos, esto suele ser lo correcto como estimación.</text:p>
          </text:list-item>
        </text:list>
        <text:p text:style-name="P47">[sample = muestra] [population = población]</text:p>
        <text:h text:style-name="P56" text:outline-level="3"><text:span text:style-name="Source_20_Text"><text:span text:style-name="T20">density = pd.DataFrame()</text:span></text:span></text:h>
        <text:list text:style-name="L25">
          <text:list-item>
            <text:p text:style-name="P64"><text:span text:style-name="T2">Crea una tabla vacía llamada </text:span><text:span text:style-name="Source_20_Text"><text:span text:style-name="T4">density</text:span></text:span><text:span text:style-name="T2">.</text:span></text:p>
          </text:list-item>
        </text:list>
        <text:h text:style-name="P56" text:outline-level="3"><text:span text:style-name="Source_20_Text"><text:span text:style-name="T20">density['x'] = np.arange(...)</text:span></text:span></text:h>
        <text:list text:style-name="L26">
          <text:list-item>
            <text:p text:style-name="P65">Genera muchos puntos en el eje X.</text:p>
          </text:list-item>
          <text:list-item>
            <text:p text:style-name="P65"><text:soft-page-break/>Desde un poco menos que el mínimo retorno observado</text:p>
          </text:list-item>
          <text:list-item>
            <text:p text:style-name="P65">hasta un poco más que el máximo</text:p>
          </text:list-item>
          <text:list-item>
            <text:p text:style-name="P65">saltando de 0.001 en 0.001</text:p>
          </text:list-item>
        </text:list>
        <text:p text:style-name="P47">[range = rango] [step = paso]</text:p>
        <text:h text:style-name="P56" text:outline-level="3"><text:span text:style-name="Source_20_Text"><text:span text:style-name="T20">density['pdf'] = norm.pdf(density['x'], mu, sigma)</text:span></text:span></text:h>
        <text:list text:style-name="L27">
          <text:list-item>
            <text:p text:style-name="P66"><text:span text:style-name="Source_20_Text"><text:span text:style-name="T4">pdf</text:span></text:span><text:span text:style-name="T2"> = </text:span><text:span text:style-name="Strong_20_Emphasis"><text:span text:style-name="T3">Probability Density Function</text:span></text:span><text:span text:style-name="T2"> = función de densidad.</text:span></text:p>
          </text:list-item>
          <text:list-item>
            <text:p text:style-name="P67">No es probabilidad directa.</text:p>
          </text:list-item>
          <text:list-item>
            <text:p text:style-name="P66"><text:span text:style-name="T2">Es la altura de la curva normal en cada punto </text:span><text:span text:style-name="Source_20_Text"><text:span text:style-name="T4">x</text:span></text:span><text:span text:style-name="T2">.</text:span></text:p>
          </text:list-item>
        </text:list>
        <text:p text:style-name="P47">[density = densidad] [pdf = función de densidad]</text:p>
        <text:h text:style-name="P56" text:outline-level="3"><text:span text:style-name="Source_20_Text"><text:span text:style-name="T20">ms['LogReturn'].hist(bins=50, figsize=(15, 8))</text:span></text:span></text:h>
        <text:list text:style-name="L28">
          <text:list-item>
            <text:p text:style-name="P68">Dibuja un histograma de los log returns.</text:p>
          </text:list-item>
          <text:list-item>
            <text:p text:style-name="P69"><text:span text:style-name="Source_20_Text"><text:span text:style-name="T4">bins=50</text:span></text:span><text:span text:style-name="T2"> divide el rango en 50 cajitas.</text:span></text:p>
          </text:list-item>
          <text:list-item>
            <text:p text:style-name="P69"><text:span text:style-name="Source_20_Text"><text:span text:style-name="T4">figsize=(15,8)</text:span></text:span><text:span text:style-name="T2"> pone tamaño grande al gráfico.</text:span></text:p>
          </text:list-item>
        </text:list>
        <text:p text:style-name="P47">[histogram = histograma] [bins = intervalos]</text:p>
        <text:h text:style-name="P56" text:outline-level="3"><text:span text:style-name="Source_20_Text"><text:span text:style-name="T20">plt.plot(density['x'], density['pdf'], color='red')</text:span></text:span></text:h>
        <text:list text:style-name="L29">
          <text:list-item>
            <text:p text:style-name="P70">Dibuja la curva normal teórica en rojo encima.</text:p>
          </text:list-item>
        </text:list>
        <text:h text:style-name="P56" text:outline-level="3"><text:span text:style-name="Source_20_Text"><text:span text:style-name="T20">plt.show()</text:span></text:span></text:h>
        <text:list text:style-name="L30">
          <text:list-item>
            <text:p text:style-name="P71">Muestra el gráfico.</text:p>
          </text:list-item>
        </text:list>
        <text:p text:style-name="P53"/>
        <text:h text:style-name="P72" text:outline-level="3">Crítica importante aquí</text:h>
        <text:p text:style-name="P46"><text:span text:style-name="T2">Tal como está, </text:span><text:span text:style-name="Strong_20_Emphasis"><text:span text:style-name="T3">esto es técnicamente mejorable</text:span></text:span><text:span text:style-name="T2">.</text:span></text:p>
        <text:p text:style-name="P46"><text:span text:style-name="T2">¿Por qué?<text:line-break/>Porque el histograma suele mostrarse en </text:span><text:span text:style-name="Strong_20_Emphasis"><text:span text:style-name="T3">conteos</text:span></text:span><text:span text:style-name="T2"> y la </text:span><text:span text:style-name="Source_20_Text"><text:span text:style-name="T4">pdf</text:span></text:span><text:span text:style-name="T2"> está en </text:span><text:span text:style-name="Strong_20_Emphasis"><text:span text:style-name="T3">densidad</text:span></text:span><text:span text:style-name="T2">. Para compararlos bien, deberías normalizar el histograma:</text:span></text:p>
        <text:section text:style-name="Sect3" text:name="Section5">
          <text:p text:style-name="P55"><text:bookmark text:name="code-block-viewer Copy 13"/><text:soft-page-break/><text:span text:style-name="Source_20_Text"><text:span text:style-name="T7">ms</text:span></text:span><text:span text:style-name="Source_20_Text"><text:span text:style-name="T6">[</text:span></text:span><text:span text:style-name="Source_20_Text"><text:span text:style-name="T11">'LogReturn'</text:span></text:span><text:span text:style-name="Source_20_Text"><text:span text:style-name="T6">]</text:span></text:span><text:span text:style-name="Source_20_Text"><text:span text:style-name="T5">.</text:span></text:span><text:span text:style-name="Source_20_Text"><text:span text:style-name="T6">hist(</text:span></text:span><text:span text:style-name="Source_20_Text"><text:span text:style-name="T7">bins</text:span></text:span><text:span text:style-name="Source_20_Text"><text:span text:style-name="T5">=</text:span></text:span><text:span text:style-name="Source_20_Text"><text:span text:style-name="T14">50</text:span></text:span><text:span text:style-name="Source_20_Text"><text:span text:style-name="T6">, </text:span></text:span><text:span text:style-name="Source_20_Text"><text:span text:style-name="T7">density</text:span></text:span><text:span text:style-name="Source_20_Text"><text:span text:style-name="T5">=</text:span></text:span><text:span text:style-name="Source_20_Text"><text:span text:style-name="T14">True</text:span></text:span><text:span text:style-name="Source_20_Text"><text:span text:style-name="T6">, </text:span></text:span><text:span text:style-name="Source_20_Text"><text:span text:style-name="T7">figsize</text:span></text:span><text:span text:style-name="Source_20_Text"><text:span text:style-name="T5">=</text:span></text:span><text:span text:style-name="Source_20_Text"><text:span text:style-name="T6">(</text:span></text:span><text:span text:style-name="Source_20_Text"><text:span text:style-name="T14">15</text:span></text:span><text:span text:style-name="Source_20_Text"><text:span text:style-name="T6">, </text:span></text:span><text:span text:style-name="Source_20_Text"><text:span text:style-name="T14">8</text:span></text:span><text:span text:style-name="Source_20_Text"><text:span text:style-name="T6">))</text:span></text:span></text:p>
        </text:section>
        <text:p text:style-name="P73">Eso sí sería una comparación limpia.</text:p>
        <text:p text:style-name="P46"><text:span text:style-name="Strong_20_Emphasis"><text:span text:style-name="T3">English summary:</text:span></text:span><text:span text:style-name="T2"> This block estimates a normal distribution from the data and compares it with the histogram of returns.<text:line-break/>[pdf = probability density function] [histogram = histograma] [fit a distribution = ajustar una distribución]</text:span></text:p>
        <text:p text:style-name="P53"/>
        <text:h text:style-name="P54" text:outline-level="2">6) Probabilidad de caer más de un porcentaje en un día</text:h>
        <text:section text:style-name="Sect3" text:name="Section6">
          <text:p text:style-name="P55"><text:bookmark text:name="code-block-viewer Copy 14"/><text:span text:style-name="Source_20_Text"><text:span text:style-name="T7">prob_return1</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cdf(</text:span></text:span><text:span text:style-name="Source_20_Text"><text:span text:style-name="T5">-</text:span></text:span><text:span text:style-name="Source_20_Text"><text:span text:style-name="T14">0.0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The Probability is '</text:span></text:span><text:span text:style-name="Source_20_Text"><text:span text:style-name="T9">, </text:span></text:span><text:span text:style-name="Source_20_Text"><text:span text:style-name="T10">prob_return1</text:span></text:span><text:span text:style-name="Source_20_Text"><text:span text:style-name="T9">)</text:span></text:span></text:p>
        </text:section>
        <text:h text:style-name="P56" text:outline-level="3"><text:span text:style-name="Source_20_Text"><text:span text:style-name="T19">norm.cdf(...)</text:span></text:span></text:h>
        <text:list text:style-name="L31">
          <text:list-item>
            <text:p text:style-name="P74"><text:span text:style-name="Source_20_Text"><text:span text:style-name="T4">cdf</text:span></text:span><text:span text:style-name="T2"> = </text:span><text:span text:style-name="Strong_20_Emphasis"><text:span text:style-name="T3">Cumulative Distribution Function</text:span></text:span></text:p>
          </text:list-item>
          <text:list-item>
            <text:p text:style-name="P75">significa probabilidad acumulada</text:p>
          </text:list-item>
          <text:list-item>
            <text:p text:style-name="P74"><text:span text:style-name="T2">te da: </text:span><text:span text:style-name="Strong_20_Emphasis"><text:span text:style-name="T3">P(X &lt;= valor)</text:span></text:span></text:p>
          </text:list-item>
        </text:list>
        <text:p text:style-name="P47">[cdf = función de distribución acumulada] [cumulative = acumulada]</text:p>
        <text:h text:style-name="P56" text:outline-level="3"><text:span text:style-name="Source_20_Text"><text:span text:style-name="T20">norm.cdf(-0.05, mu, sigma)</text:span></text:span></text:h>
        <text:p text:style-name="P47">Esto pregunta:</text:p>
        <text:p text:style-name="P46"><text:span text:style-name="Strong_20_Emphasis"><text:span text:style-name="T22">“</text:span></text:span><text:span text:style-name="Strong_20_Emphasis"><text:span text:style-name="T3">Si los log returns siguen una normal con media </text:span></text:span><text:span text:style-name="Strong_20_Emphasis"><text:span text:style-name="Source_20_Text"><text:span text:style-name="T4">mu</text:span></text:span></text:span><text:span text:style-name="Strong_20_Emphasis"><text:span text:style-name="T3"> y desviación </text:span></text:span><text:span text:style-name="Strong_20_Emphasis"><text:span text:style-name="Source_20_Text"><text:span text:style-name="T4">sigma</text:span></text:span></text:span><text:span text:style-name="Strong_20_Emphasis"><text:span text:style-name="T3">, cuál es la probabilidad de que el retorno sea menor o igual que -0.05?”</text:span></text:span></text:p>
        <text:p text:style-name="P49">Eso significa aproximadamente:</text:p>
        <text:list text:style-name="L32">
          <text:list-item>
            <text:p text:style-name="P76">caída del 5% o peor en un día</text:p>
          </text:list-item>
        </text:list>
        <text:h text:style-name="P48" text:outline-level="3">Ojo: aproximación</text:h>
        <text:p text:style-name="P46"><text:span text:style-name="T2">Como estás usando </text:span><text:span text:style-name="Strong_20_Emphasis"><text:span text:style-name="T3">log return</text:span></text:span><text:span text:style-name="T2">, la versión exacta para “caída del 5% en precio” sería:</text:span></text:p>
        <text:section text:style-name="Sect3" text:name="Section7">
          <text:p text:style-name="P55"><text:bookmark text:name="code-block-viewer Copy 15"/><text:span text:style-name="Source_20_Text"><text:span text:style-name="T7">norm</text:span></text:span><text:span text:style-name="Source_20_Text"><text:span text:style-name="T5">.</text:span></text:span><text:span text:style-name="Source_20_Text"><text:span text:style-name="T6">cdf(</text:span></text:span><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14">0.9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section>
        <text:p text:style-name="P73"><text:soft-page-break/>Porque:</text:p>
        <text:list text:style-name="L33">
          <text:list-item>
            <text:p text:style-name="P77"><draw:frame draw:style-name="fr2" draw:name="Frame5" text:anchor-type="char" svg:width="0.041cm" draw:z-index="4"><draw:text-box fo:min-height="0.041cm"><text:p text:style-name="P14">Pt+1/Pt=0.95</text:p></draw:text-box></draw:frame>si el precio cae 5%, entonces <text:span text:style-name="T23">Pt</text:span><text:span text:style-name="T24">+1​/</text:span><text:span text:style-name="T23">Pt</text:span><text:span text:style-name="T24">​=0.95</text:span></text:p>
          </text:list-item>
          <text:list-item>
            <text:p text:style-name="P78"><text:span text:style-name="T2">y el log return exacto es </text:span><text:span text:style-name="Source_20_Text"><text:span text:style-name="T4">log(0.95)</text:span></text:span></text:p>
          </text:list-item>
        </text:list>
        <text:p text:style-name="P46"><text:span text:style-name="T2">Pero para seguir el curso y obtener el mismo número, usan </text:span><text:span text:style-name="Source_20_Text"><text:span text:style-name="T4">-0.05</text:span></text:span><text:span text:style-name="T2">.</text:span></text:p>
        <text:p text:style-name="P46"><text:span text:style-name="Strong_20_Emphasis"><text:span text:style-name="T3">English summary:</text:span></text:span><text:span text:style-name="T2"> </text:span><text:span text:style-name="Source_20_Text"><text:span text:style-name="T4">cdf</text:span></text:span><text:span text:style-name="T2"> gives the probability that the return is below a threshold.<text:line-break/>[threshold = umbral] [drop = caída]</text:span></text:p>
        <text:h text:style-name="P48" text:outline-level="3">Tu ejercicio del 10%</text:h>
        <text:section text:style-name="Sect3" text:name="Section8">
          <text:p text:style-name="P55"><text:bookmark text:name="code-block-viewer Copy 16"/><text:span text:style-name="Source_20_Text"><text:span text:style-name="T7">prob_return1</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cdf(</text:span></text:span><text:span text:style-name="Source_20_Text"><text:span text:style-name="T5">-</text:span></text:span><text:span text:style-name="Source_20_Text"><text:span text:style-name="T14">0.10</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The Probability is '</text:span></text:span><text:span text:style-name="Source_20_Text"><text:span text:style-name="T9">, </text:span></text:span><text:span text:style-name="Source_20_Text"><text:span text:style-name="T10">prob_return1</text:span></text:span><text:span text:style-name="Source_20_Text"><text:span text:style-name="T9">)</text:span></text:span></text:p>
        </text:section>
        <text:list text:style-name="L34">
          <text:list-item>
            <text:p text:style-name="P79">Eso es lo que hay que poner para sacar el output esperado del curso.</text:p>
          </text:list-item>
        </text:list>
        <text:p text:style-name="P46"><text:span text:style-name="Strong_20_Emphasis"><text:span text:style-name="T3">English summary:</text:span></text:span><text:span text:style-name="T2"> For the course answer, use </text:span><text:span text:style-name="Source_20_Text"><text:span text:style-name="T4">-0.10</text:span></text:span><text:span text:style-name="T2"> as the threshold.<text:line-break/>[expected output = salida esperada]</text:span></text:p>
        <text:p text:style-name="P53"/>
        <text:h text:style-name="P54" text:outline-level="2">7) Probabilidad de caer más de un porcentaje en un año</text:h>
        <text:section text:style-name="Sect3" text:name="Section9">
          <text:p text:style-name="P55"><text:bookmark text:name="code-block-viewer Copy 17"/><text:span text:style-name="Source_20_Text"><text:span text:style-name="T7">mu220</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14">220</text:span></text:span><text:span text:style-name="Source_20_Text"><text:span text:style-name="T5">*</text:span></text:span><text:span text:style-name="Source_20_Text"><text:span text:style-name="T7">mu</text:span></text:span></text:p>
          <text:p text:style-name="P55"><text:span text:style-name="Source_20_Text"><text:span text:style-name="T10">sigma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8">220</text:span></text:span><text:span text:style-name="Source_20_Text"><text:span text:style-name="T8">**</text:span></text:span><text:span text:style-name="Source_20_Text"><text:span text:style-name="T18">0.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sigma</text:span></text:span></text:p>
          <text:p text:style-name="P55"><text:span text:style-name="Source_20_Text"><text:span text:style-name="T10">print</text:span></text:span><text:span text:style-name="Source_20_Text"><text:span text:style-name="T9">(</text:span></text:span><text:span text:style-name="Source_20_Text"><text:span text:style-name="T17">'The probability of dropping over 40% in 220 days is '</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cdf(</text:span></text:span><text:span text:style-name="Source_20_Text"><text:span text:style-name="T8">-</text:span></text:span><text:span text:style-name="Source_20_Text"><text:span text:style-name="T18">0.4</text:span></text:span><text:span text:style-name="Source_20_Text"><text:span text:style-name="T9">, </text:span></text:span><text:span text:style-name="Source_20_Text"><text:span text:style-name="T10">mu220</text:span></text:span><text:span text:style-name="Source_20_Text"><text:span text:style-name="T9">, </text:span></text:span><text:span text:style-name="Source_20_Text"><text:span text:style-name="T10">sigma220</text:span></text:span><text:span text:style-name="Source_20_Text"><text:span text:style-name="T9">))</text:span></text:span></text:p>
        </text:section>
        <text:p text:style-name="P46"><text:span text:style-name="T13">Aquí el curso asume aproximadamente </text:span><text:span text:style-name="Strong_20_Emphasis"><text:span text:style-name="T25">220 días de trading</text:span></text:span><text:span text:style-name="T13"> en un año.</text:span></text:p>
        <text:p text:style-name="P49">[trading days = días de mercado]</text:p>
        <text:h text:style-name="P56" text:outline-level="3"><text:span text:style-name="Source_20_Text"><text:span text:style-name="T20">mu220 = 220*mu</text:span></text:span></text:h>
        <text:list text:style-name="L35">
          <text:list-item>
            <text:p text:style-name="P80">Si sumas 220 retornos diarios, la media total esperada es 220 veces la media diaria.</text:p>
          </text:list-item>
        </text:list>
        <text:h text:style-name="P56" text:outline-level="3"><text:span text:style-name="Source_20_Text"><text:span text:style-name="T20">sigma220 = (220**0.5) * sigma</text:span></text:span></text:h>
        <text:list text:style-name="L36">
          <text:list-item>
            <text:p text:style-name="P81">La desviación típica de la suma no crece linealmente.</text:p>
          </text:list-item>
          <text:list-item>
            <text:p text:style-name="P81">Crece con la raíz cuadrada del tiempo:</text:p>
            <text:list>
              <text:list-item>
                <text:p text:style-name="P82"><text:span text:style-name="Source_20_Text"><text:span text:style-name="T4">sqrt(220) * sigma</text:span></text:span></text:p>
              </text:list-item>
            </text:list>
          </text:list-item>
        </text:list>
        <text:p text:style-name="P47"><text:soft-page-break/>Esto sale de una idea clave:</text:p>
        <text:list text:style-name="L37">
          <text:list-item>
            <text:p text:style-name="P83"><text:span text:style-name="T2">las </text:span><text:span text:style-name="Strong_20_Emphasis"><text:span text:style-name="T3">varianzas</text:span></text:span><text:span text:style-name="T2"> suman</text:span></text:p>
          </text:list-item>
          <text:list-item>
            <text:p text:style-name="P84">la desviación típica es la raíz de la varianza</text:p>
          </text:list-item>
        </text:list>
        <text:p text:style-name="P47">[variance = varianza] [square root = raíz cuadrada]</text:p>
        <text:h text:style-name="P48" text:outline-level="3">Luego:</text:h>
        <text:p text:style-name="P46"><text:span text:style-name="Source_20_Text"><text:span text:style-name="T4">norm.cdf(-0.4, mu220, sigma220)</text:span></text:span></text:p>
        <text:p text:style-name="P49">Eso pregunta:</text:p>
        <text:list text:style-name="L38">
          <text:list-item>
            <text:p text:style-name="P85">probabilidad de que el retorno acumulado anual sea menor o igual que -0.4</text:p>
          </text:list-item>
        </text:list>
        <text:p text:style-name="P47">O sea:</text:p>
        <text:list text:style-name="L39">
          <text:list-item>
            <text:p text:style-name="P86">aproximadamente perder 40% o más</text:p>
          </text:list-item>
        </text:list>
        <text:h text:style-name="P48" text:outline-level="3">Otra vez: crítica importante</text:h>
        <text:p text:style-name="P46"><text:span text:style-name="T2">Si trabajas con </text:span><text:span text:style-name="Strong_20_Emphasis"><text:span text:style-name="T3">log returns</text:span></text:span><text:span text:style-name="T2">, el umbral exacto para perder 40% de precio sería:</text:span></text:p>
        <text:section text:style-name="Sect3" text:name="Section10">
          <text:p text:style-name="P55"><text:bookmark text:name="code-block-viewer Copy 18"/><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14">0.60</text:span></text:span><text:span text:style-name="Source_20_Text"><text:span text:style-name="T6">)</text:span></text:span></text:p>
        </text:section>
        <text:p text:style-name="P46"><text:span text:style-name="T13">no </text:span><text:span text:style-name="Source_20_Text"><text:span text:style-name="T12">-0.4</text:span></text:span><text:span text:style-name="T13">.</text:span></text:p>
        <text:p text:style-name="P49">Pero el curso sigue usando la aproximación simple.</text:p>
        <text:h text:style-name="P48" text:outline-level="3">Tu ejercicio del 20%</text:h>
        <text:section text:style-name="Sect3" text:name="Section11">
          <text:p text:style-name="P55"><text:bookmark text:name="code-block-viewer Copy 19"/><text:span text:style-name="Source_20_Text"><text:span text:style-name="T7">drop20</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cdf(</text:span></text:span><text:span text:style-name="Source_20_Text"><text:span text:style-name="T5">-</text:span></text:span><text:span text:style-name="Source_20_Text"><text:span text:style-name="T14">0.2</text:span></text:span><text:span text:style-name="Source_20_Text"><text:span text:style-name="T6">, </text:span></text:span><text:span text:style-name="Source_20_Text"><text:span text:style-name="T7">mu220</text:span></text:span><text:span text:style-name="Source_20_Text"><text:span text:style-name="T6">, </text:span></text:span><text:span text:style-name="Source_20_Text"><text:span text:style-name="T7">sigma220</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The probability of dropping over 20% in 220 days is '</text:span></text:span><text:span text:style-name="Source_20_Text"><text:span text:style-name="T9">, </text:span></text:span><text:span text:style-name="Source_20_Text"><text:span text:style-name="T10">drop20</text:span></text:span><text:span text:style-name="Source_20_Text"><text:span text:style-name="T9">)</text:span></text:span></text:p>
        </text:section>
        <text:p text:style-name="P46"><text:span text:style-name="Strong_20_Emphasis"><text:span text:style-name="T25">English summary:</text:span></text:span><text:span text:style-name="T13"> For 220 days, the mean scales by 220 and the standard deviation scales by </text:span><text:span text:style-name="Source_20_Text"><text:span text:style-name="T12">sqrt(220)</text:span></text:span><text:span text:style-name="T13">.<text:line-break/>[scale with time = escalar con el tiempo] [annual return = retorno anual]</text:span></text:p>
        <text:p text:style-name="P53"/>
        <text:h text:style-name="P54" text:outline-level="2">8) Value at Risk (VaR)</text:h>
        <text:section text:style-name="Sect3" text:name="Section12">
          <text:p text:style-name="P55"><text:bookmark text:name="code-block-viewer Copy 20"/><text:soft-page-break/><text:span text:style-name="Source_20_Text"><text:span text:style-name="T7">VaR</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ppf(</text:span></text:span><text:span text:style-name="Source_20_Text"><text:span text:style-name="T14">0.0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Single day value at risk '</text:span></text:span><text:span text:style-name="Source_20_Text"><text:span text:style-name="T9">, </text:span></text:span><text:span text:style-name="Source_20_Text"><text:span text:style-name="T10">VaR</text:span></text:span><text:span text:style-name="Source_20_Text"><text:span text:style-name="T9">)</text:span></text:span></text:p>
        </text:section>
        <text:h text:style-name="P56" text:outline-level="3"><text:span text:style-name="Source_20_Text"><text:span text:style-name="T19">ppf</text:span></text:span></text:h>
        <text:list text:style-name="L40">
          <text:list-item>
            <text:p text:style-name="P87"><text:span text:style-name="Source_20_Text"><text:span text:style-name="T4">ppf</text:span></text:span><text:span text:style-name="T2"> = </text:span><text:span text:style-name="Strong_20_Emphasis"><text:span text:style-name="T3">Percent Point Function</text:span></text:span></text:p>
          </text:list-item>
          <text:list-item>
            <text:p text:style-name="P87"><text:span text:style-name="T2">es la inversa de la </text:span><text:span text:style-name="Source_20_Text"><text:span text:style-name="T4">cdf</text:span></text:span></text:p>
          </text:list-item>
          <text:list-item>
            <text:p text:style-name="P87"><text:span text:style-name="T2">en lenguaje normal: </text:span><text:span text:style-name="Strong_20_Emphasis"><text:span text:style-name="T3">cuantil</text:span></text:span></text:p>
          </text:list-item>
        </text:list>
        <text:p text:style-name="P47">[ppf = inverse cdf] [quantile = cuantil]</text:p>
        <text:h text:style-name="P56" text:outline-level="3"><text:span text:style-name="Source_20_Text"><text:span text:style-name="T20">norm.ppf(0.05, mu, sigma)</text:span></text:span></text:h>
        <text:p text:style-name="P47">Pregunta:</text:p>
        <text:list text:style-name="L41">
          <text:list-item>
            <text:p text:style-name="P88">“<text:span text:style-name="T26">¿Qué valor deja por debajo al 5% peor de los casos?”</text:span></text:p>
          </text:list-item>
        </text:list>
        <text:p text:style-name="P46"><text:span text:style-name="T2">Eso es el </text:span><text:span text:style-name="Strong_20_Emphasis"><text:span text:style-name="T3">cuantil del 5%</text:span></text:span><text:span text:style-name="T2">.</text:span></text:p>
        <text:p text:style-name="P46"><text:span text:style-name="T2">Si te sale </text:span><text:span text:style-name="Source_20_Text"><text:span text:style-name="T4">-0.0225...</text:span></text:span><text:span text:style-name="T2">, significa:</text:span></text:p>
        <text:list text:style-name="L42">
          <text:list-item>
            <text:p text:style-name="P89">aproximadamente, en el peor 5% de días, el retorno diario está por debajo de -2.25%</text:p>
          </text:list-item>
        </text:list>
        <text:h text:style-name="P48" text:outline-level="3">Ojo técnico</text:h>
        <text:p text:style-name="P46"><text:span text:style-name="T2">Eso es un </text:span><text:span text:style-name="Strong_20_Emphasis"><text:span text:style-name="T3">VaR en retorno</text:span></text:span><text:span text:style-name="T2">, no todavía en euros.</text:span></text:p>
        <text:p text:style-name="P49">Si tu cartera valiera 10.000 €:</text:p>
        <text:list text:style-name="L43">
          <text:list-item>
            <text:p text:style-name="P90"><text:span text:style-name="T2">VaR aproximado diario al 5% ≈ </text:span><text:span text:style-name="Source_20_Text"><text:span text:style-name="T4">10000 * 0.0225 = 225 €</text:span></text:span></text:p>
          </text:list-item>
        </text:list>
        <text:p text:style-name="P47">[portfolio = cartera] [loss = pérdida]</text:p>
        <text:p text:style-name="P46"><text:span text:style-name="Strong_20_Emphasis"><text:span text:style-name="T3">English summary:</text:span></text:span><text:span text:style-name="T2"> VaR here is the 5th percentile of daily returns.<text:line-break/>[5th percentile = percentil 5] [worst cases = peores casos]</text:span></text:p>
        <text:p text:style-name="P53"/>
        <text:h text:style-name="P54" text:outline-level="2">9) Quantiles: 5%, 95%, 25%, 75%</text:h>
        <text:section text:style-name="Sect3" text:name="Section13">
          <text:p text:style-name="P55"><text:bookmark text:name="code-block-viewer Copy 21"/><text:span text:style-name="Source_20_Text"><text:span text:style-name="T7">print</text:span></text:span><text:span text:style-name="Source_20_Text"><text:span text:style-name="T6">(</text:span></text:span><text:span text:style-name="Source_20_Text"><text:span text:style-name="T11">'5% quantile '</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ppf(</text:span></text:span><text:span text:style-name="Source_20_Text"><text:span text:style-name="T14">0.0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95% quantile '</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pf(</text:span></text:span><text:span text:style-name="Source_20_Text"><text:span text:style-name="T18">0.9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section>
        <text:list text:style-name="L44">
          <text:list-item>
            <text:p text:style-name="P91">5% quantile = punto por debajo del cual cae el 5% de los datos</text:p>
          </text:list-item>
          <text:list-item>
            <text:p text:style-name="P92"><text:soft-page-break/>95% quantile = punto por debajo del cual cae el 95% de los datos</text:p>
          </text:list-item>
        </text:list>
        <text:p text:style-name="P47">[quantile = cuantil] [percentile = percentil]</text:p>
        <text:h text:style-name="P48" text:outline-level="3">Tus ejercicios</text:h>
        <text:section text:style-name="Sect3" text:name="Section14">
          <text:p text:style-name="P55"><text:bookmark text:name="code-block-viewer Copy 22"/><text:span text:style-name="Source_20_Text"><text:span text:style-name="T7">q25</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orm</text:span></text:span><text:span text:style-name="Source_20_Text"><text:span text:style-name="T5">.</text:span></text:span><text:span text:style-name="Source_20_Text"><text:span text:style-name="T6">ppf(</text:span></text:span><text:span text:style-name="Source_20_Text"><text:span text:style-name="T14">0.2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p text:style-name="P55"><text:span text:style-name="Source_20_Text"><text:span text:style-name="T10">print</text:span></text:span><text:span text:style-name="Source_20_Text"><text:span text:style-name="T9">(</text:span></text:span><text:span text:style-name="Source_20_Text"><text:span text:style-name="T17">'25% quantile '</text:span></text:span><text:span text:style-name="Source_20_Text"><text:span text:style-name="T9">, </text:span></text:span><text:span text:style-name="Source_20_Text"><text:span text:style-name="T10">q25</text:span></text:span><text:span text:style-name="Source_20_Text"><text:span text:style-name="T9">)</text:span></text:span></text:p>
          <text:p text:style-name="P55"><text:span text:style-name="Source_20_Text"><text:span text:style-name="T10">q7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pf(</text:span></text:span><text:span text:style-name="Source_20_Text"><text:span text:style-name="T18">0.7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10">print</text:span></text:span><text:span text:style-name="Source_20_Text"><text:span text:style-name="T9">(</text:span></text:span><text:span text:style-name="Source_20_Text"><text:span text:style-name="T17">'75% quantile '</text:span></text:span><text:span text:style-name="Source_20_Text"><text:span text:style-name="T9">, </text:span></text:span><text:span text:style-name="Source_20_Text"><text:span text:style-name="T10">q75</text:span></text:span><text:span text:style-name="Source_20_Text"><text:span text:style-name="T9">)</text:span></text:span></text:p>
        </text:section>
        <text:p text:style-name="P46"><text:span text:style-name="T13">Eso rellena los </text:span><text:span text:style-name="Source_20_Text"><text:span text:style-name="T12">None</text:span></text:span><text:span text:style-name="T13">.</text:span></text:p>
        <text:p text:style-name="P46"><text:span text:style-name="Strong_20_Emphasis"><text:span text:style-name="T3">English summary:</text:span></text:span><text:span text:style-name="T2"> </text:span><text:span text:style-name="Source_20_Text"><text:span text:style-name="T4">ppf</text:span></text:span><text:span text:style-name="T2"> gives quantiles such as the 25th, 50th, 75th, or 95th percentile.<text:line-break/>[25th percentile = percentil 25] [75th percentile = percentil 75]</text:span></text:p>
        <text:p text:style-name="P53"/>
        <text:h text:style-name="P54" text:outline-level="2">10) Qué está haciendo todo este bloque, en una sola frase</text:h>
        <text:p text:style-name="P47">Está haciendo esto:</text:p>
        <text:list text:style-name="L45">
          <text:list-item>
            <text:p text:style-name="P93">carga precios de Microsoft</text:p>
          </text:list-item>
          <text:list-item>
            <text:p text:style-name="P93">calcula retornos logarítmicos diarios</text:p>
          </text:list-item>
          <text:list-item>
            <text:p text:style-name="P94"><text:span text:style-name="T2">estima una normal con media </text:span><text:span text:style-name="Source_20_Text"><text:span text:style-name="T4">mu</text:span></text:span><text:span text:style-name="T2"> y desviación </text:span><text:span text:style-name="Source_20_Text"><text:span text:style-name="T4">sigma</text:span></text:span></text:p>
          </text:list-item>
          <text:list-item>
            <text:p text:style-name="P93">usa esa normal para calcular probabilidades de caídas y cuantiles de riesgo</text:p>
          </text:list-item>
        </text:list>
        <text:p text:style-name="P46"><text:span text:style-name="Strong_20_Emphasis"><text:span text:style-name="T3">English summary:</text:span></text:span><text:span text:style-name="T2"> The whole block models Microsoft daily log returns with a normal distribution and uses it to estimate risk.<text:line-break/>[risk estimate = estimación de riesgo] [model returns = modelar retornos]</text:span></text:p>
        <text:p text:style-name="P53"/>
        <text:h text:style-name="P54" text:outline-level="2">11) Código del curso, pero corregido hoy</text:h>
        <text:section text:style-name="Sect3" text:name="Section15">
          <text:p text:style-name="P55"><text:bookmark text:name="code-block-viewer Copy 23"/><text:span text:style-name="Source_20_Text"><text:span text:style-name="T5">import</text:span></text:span><text:span text:style-name="Source_20_Text"><text:span text:style-name="T6"> </text:span></text:span><text:span text:style-name="Source_20_Text"><text:span text:style-name="T7">pandas</text:span></text:span><text:span text:style-name="Source_20_Text"><text:span text:style-name="T6"> </text:span></text:span><text:span text:style-name="Source_20_Text"><text:span text:style-name="T5">as</text:span></text:span><text:span text:style-name="Source_20_Text"><text:span text:style-name="T6"> </text:span></text:span><text:span text:style-name="Source_20_Text"><text:span text:style-name="T7">pd</text:span></text:span></text:p>
          <text:p text:style-name="P55"><text:span text:style-name="Source_20_Text"><text:span text:style-name="T8">import</text:span></text:span><text:span text:style-name="Source_20_Text"><text:span text:style-name="T9"> </text:span></text:span><text:span text:style-name="Source_20_Text"><text:span text:style-name="T10">numpy</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0">np</text:span></text:span></text:p>
          <text:p text:style-name="P55"><text:span text:style-name="Source_20_Text"><text:span text:style-name="T8">import</text:span></text:span><text:span text:style-name="Source_20_Text"><text:span text:style-name="T9"> </text:span></text:span><text:span text:style-name="Source_20_Text"><text:span text:style-name="T10">matplotlib</text:span></text:span><text:span text:style-name="Source_20_Text"><text:span text:style-name="T8">.</text:span></text:span><text:span text:style-name="Source_20_Text"><text:span text:style-name="T10">pyplot</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0">plt</text:span></text:span></text:p>
          <text:p text:style-name="P55"><text:span text:style-name="Source_20_Text"><text:span text:style-name="T8">from</text:span></text:span><text:span text:style-name="Source_20_Text"><text:span text:style-name="T9"> </text:span></text:span><text:span text:style-name="Source_20_Text"><text:span text:style-name="T10">scipy</text:span></text:span><text:span text:style-name="Source_20_Text"><text:span text:style-name="T8">.</text:span></text:span><text:span text:style-name="Source_20_Text"><text:span text:style-name="T10">stats</text:span></text:span><text:span text:style-name="Source_20_Text"><text:span text:style-name="T9"> </text:span></text:span><text:span text:style-name="Source_20_Text"><text:span text:style-name="T8">import</text:span></text:span><text:span text:style-name="Source_20_Text"><text:span text:style-name="T9"> </text:span></text:span><text:span text:style-name="Source_20_Text"><text:span text:style-name="T10">norm</text:span></text:span></text:p>
          <text:p text:style-name="P55"><text:span text:style-name="Source_20_Text"><text:span text:style-name="T27"># Read CSV and use Date as index</text:span></text:span></text:p>
          <text:p text:style-name="P55"><text:soft-page-break/><text:span text:style-name="Source_20_Text"><text:span text:style-name="T10">ms</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pd</text:span></text:span><text:span text:style-name="Source_20_Text"><text:span text:style-name="T8">.</text:span></text:span><text:span text:style-name="Source_20_Text"><text:span text:style-name="T9">read_csv(</text:span></text:span><text:span text:style-name="Source_20_Text"><text:span text:style-name="T17">'../data/microsoft.csv'</text:span></text:span><text:span text:style-name="Source_20_Text"><text:span text:style-name="T9">, </text:span></text:span><text:span text:style-name="Source_20_Text"><text:span text:style-name="T10">index_col</text:span></text:span><text:span text:style-name="Source_20_Text"><text:span text:style-name="T8">=</text:span></text:span><text:span text:style-name="Source_20_Text"><text:span text:style-name="T17">'Date'</text:span></text:span><text:span text:style-name="Source_20_Text"><text:span text:style-name="T9">, </text:span></text:span><text:span text:style-name="Source_20_Text"><text:span text:style-name="T10">parse_dates</text:span></text:span><text:span text:style-name="Source_20_Text"><text:span text:style-name="T8">=</text:span></text:span><text:span text:style-name="Source_20_Text"><text:span text:style-name="T9">[</text:span></text:span><text:span text:style-name="Source_20_Text"><text:span text:style-name="T17">'Date'</text:span></text:span><text:span text:style-name="Source_20_Text"><text:span text:style-name="T9">])</text:span></text:span></text:p>
          <text:p text:style-name="P55"><text:span text:style-name="Source_20_Text"><text:span text:style-name="T27"># Compute daily log returns</text:span></text:span></text:p>
          <text:p text:style-name="P55"><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p</text:span></text:span><text:span text:style-name="Source_20_Text"><text:span text:style-name="T8">.</text:span></text:span><text:span text:style-name="Source_20_Text"><text:span text:style-name="T9">log(</text:span></text:span><text:span text:style-name="Source_20_Text"><text:span text:style-name="T10">ms</text:span></text:span><text:span text:style-name="Source_20_Text"><text:span text:style-name="T9">[</text:span></text:span><text:span text:style-name="Source_20_Text"><text:span text:style-name="T17">'Close'</text:span></text:span><text:span text:style-name="Source_20_Text"><text:span text:style-name="T9">])</text:span></text:span><text:span text:style-name="Source_20_Text"><text:span text:style-name="T8">.</text:span></text:span><text:span text:style-name="Source_20_Text"><text:span text:style-name="T9">shift(</text:span></text:span><text:span text:style-name="Source_20_Text"><text:span text:style-name="T8">-</text:span></text:span><text:span text:style-name="Source_20_Text"><text:span text:style-name="T18">1</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p</text:span></text:span><text:span text:style-name="Source_20_Text"><text:span text:style-name="T8">.</text:span></text:span><text:span text:style-name="Source_20_Text"><text:span text:style-name="T9">log(</text:span></text:span><text:span text:style-name="Source_20_Text"><text:span text:style-name="T10">ms</text:span></text:span><text:span text:style-name="Source_20_Text"><text:span text:style-name="T9">[</text:span></text:span><text:span text:style-name="Source_20_Text"><text:span text:style-name="T17">'Close'</text:span></text:span><text:span text:style-name="Source_20_Text"><text:span text:style-name="T9">])</text:span></text:span></text:p>
          <text:p text:style-name="P55"><text:span text:style-name="Source_20_Text"><text:span text:style-name="T10">ms</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s</text:span></text:span><text:span text:style-name="Source_20_Text"><text:span text:style-name="T8">.</text:span></text:span><text:span text:style-name="Source_20_Text"><text:span text:style-name="T9">dropna(</text:span></text:span><text:span text:style-name="Source_20_Text"><text:span text:style-name="T10">subset</text:span></text:span><text:span text:style-name="Source_20_Text"><text:span text:style-name="T8">=</text:span></text:span><text:span text:style-name="Source_20_Text"><text:span text:style-name="T9">[</text:span></text:span><text:span text:style-name="Source_20_Text"><text:span text:style-name="T17">'LogReturn'</text:span></text:span><text:span text:style-name="Source_20_Text"><text:span text:style-name="T9">])</text:span></text:span></text:p>
          <text:p text:style-name="P55"><text:span text:style-name="Source_20_Text"><text:span text:style-name="T27"># Estimate mean and standard deviation</text:span></text:span></text:p>
          <text:p text:style-name="P55"><text:span text:style-name="Source_20_Text"><text:span text:style-name="T10">mu</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ean()</text:span></text:span></text:p>
          <text:p text:style-name="P55"><text:span text:style-name="Source_20_Text"><text:span text:style-name="T10">sigma</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std(</text:span></text:span><text:span text:style-name="Source_20_Text"><text:span text:style-name="T10">ddof</text:span></text:span><text:span text:style-name="Source_20_Text"><text:span text:style-name="T8">=</text:span></text:span><text:span text:style-name="Source_20_Text"><text:span text:style-name="T18">1</text:span></text:span><text:span text:style-name="Source_20_Text"><text:span text:style-name="T9">)</text:span></text:span></text:p>
          <text:p text:style-name="P55"><text:span text:style-name="Source_20_Text"><text:span text:style-name="T27"># Build x-grid and normal PDF</text:span></text:span></text:p>
          <text:p text:style-name="P55"><text:span text:style-name="Source_20_Text"><text:span text:style-name="T10">density</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pd</text:span></text:span><text:span text:style-name="Source_20_Text"><text:span text:style-name="T8">.</text:span></text:span><text:span text:style-name="Source_20_Text"><text:span text:style-name="T9">DataFrame()</text:span></text:span></text:p>
          <text:p text:style-name="P55"><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p</text:span></text:span><text:span text:style-name="Source_20_Text"><text:span text:style-name="T8">.</text:span></text:span><text:span text:style-name="Source_20_Text"><text:span text:style-name="T9">arange(</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in() </text:span></text:span><text:span text:style-name="Source_20_Text"><text:span text:style-name="T8">-</text:span></text:span><text:span text:style-name="Source_20_Text"><text:span text:style-name="T9"> </text:span></text:span><text:span text:style-name="Source_20_Text"><text:span text:style-name="T18">0.01</text:span></text:span><text:span text:style-name="Source_20_Text"><text:span text:style-name="T9">, </text:span></text:span><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max() </text:span></text:span><text:span text:style-name="Source_20_Text"><text:span text:style-name="T8">+</text:span></text:span><text:span text:style-name="Source_20_Text"><text:span text:style-name="T9"> </text:span></text:span><text:span text:style-name="Source_20_Text"><text:span text:style-name="T18">0.01</text:span></text:span><text:span text:style-name="Source_20_Text"><text:span text:style-name="T9">, </text:span></text:span><text:span text:style-name="Source_20_Text"><text:span text:style-name="T18">0.001</text:span></text:span><text:span text:style-name="Source_20_Text"><text:span text:style-name="T9">)</text:span></text:span></text:p>
          <text:p text:style-name="P55"><text:span text:style-name="Source_20_Text"><text:span text:style-name="T10">density</text:span></text:span><text:span text:style-name="Source_20_Text"><text:span text:style-name="T9">[</text:span></text:span><text:span text:style-name="Source_20_Text"><text:span text:style-name="T17">'pdf'</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df(</text:span></text:span><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27"># Plot histogram and fitted normal density</text:span></text:span></text:p>
          <text:p text:style-name="P55"><text:span text:style-name="Source_20_Text"><text:span text:style-name="T10">ms</text:span></text:span><text:span text:style-name="Source_20_Text"><text:span text:style-name="T9">[</text:span></text:span><text:span text:style-name="Source_20_Text"><text:span text:style-name="T17">'LogReturn'</text:span></text:span><text:span text:style-name="Source_20_Text"><text:span text:style-name="T9">]</text:span></text:span><text:span text:style-name="Source_20_Text"><text:span text:style-name="T8">.</text:span></text:span><text:span text:style-name="Source_20_Text"><text:span text:style-name="T9">hist(</text:span></text:span><text:span text:style-name="Source_20_Text"><text:span text:style-name="T10">bins</text:span></text:span><text:span text:style-name="Source_20_Text"><text:span text:style-name="T8">=</text:span></text:span><text:span text:style-name="Source_20_Text"><text:span text:style-name="T18">50</text:span></text:span><text:span text:style-name="Source_20_Text"><text:span text:style-name="T9">, </text:span></text:span><text:span text:style-name="Source_20_Text"><text:span text:style-name="T10">density</text:span></text:span><text:span text:style-name="Source_20_Text"><text:span text:style-name="T8">=</text:span></text:span><text:span text:style-name="Source_20_Text"><text:span text:style-name="T18">True</text:span></text:span><text:span text:style-name="Source_20_Text"><text:span text:style-name="T9">, </text:span></text:span><text:span text:style-name="Source_20_Text"><text:span text:style-name="T10">figsize</text:span></text:span><text:span text:style-name="Source_20_Text"><text:span text:style-name="T8">=</text:span></text:span><text:span text:style-name="Source_20_Text"><text:span text:style-name="T9">(</text:span></text:span><text:span text:style-name="Source_20_Text"><text:span text:style-name="T18">15</text:span></text:span><text:span text:style-name="Source_20_Text"><text:span text:style-name="T9">, </text:span></text:span><text:span text:style-name="Source_20_Text"><text:span text:style-name="T18">8</text:span></text:span><text:span text:style-name="Source_20_Text"><text:span text:style-name="T9">))</text:span></text:span></text:p>
          <text:p text:style-name="P55"><text:span text:style-name="Source_20_Text"><text:span text:style-name="T10">plt</text:span></text:span><text:span text:style-name="Source_20_Text"><text:span text:style-name="T8">.</text:span></text:span><text:span text:style-name="Source_20_Text"><text:span text:style-name="T9">plot(</text:span></text:span><text:span text:style-name="Source_20_Text"><text:span text:style-name="T10">density</text:span></text:span><text:span text:style-name="Source_20_Text"><text:span text:style-name="T9">[</text:span></text:span><text:span text:style-name="Source_20_Text"><text:span text:style-name="T17">'x'</text:span></text:span><text:span text:style-name="Source_20_Text"><text:span text:style-name="T9">], </text:span></text:span><text:span text:style-name="Source_20_Text"><text:span text:style-name="T10">density</text:span></text:span><text:span text:style-name="Source_20_Text"><text:span text:style-name="T9">[</text:span></text:span><text:span text:style-name="Source_20_Text"><text:span text:style-name="T17">'pdf'</text:span></text:span><text:span text:style-name="Source_20_Text"><text:span text:style-name="T9">])</text:span></text:span></text:p>
          <text:p text:style-name="P55"><text:span text:style-name="Source_20_Text"><text:span text:style-name="T10">plt</text:span></text:span><text:span text:style-name="Source_20_Text"><text:span text:style-name="T8">.</text:span></text:span><text:span text:style-name="Source_20_Text"><text:span text:style-name="T9">show()</text:span></text:span></text:p>
          <text:p text:style-name="P55"><text:span text:style-name="Source_20_Text"><text:span text:style-name="T27"># Daily drop probabilities (course approximation)</text:span></text:span></text:p>
          <text:p text:style-name="P55"><text:span text:style-name="Source_20_Text"><text:span text:style-name="T10">prob_drop_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cdf(</text:span></text:span><text:span text:style-name="Source_20_Text"><text:span text:style-name="T8">-</text:span></text:span><text:span text:style-name="Source_20_Text"><text:span text:style-name="T18">0.0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10">prob_drop_1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cdf(</text:span></text:span><text:span text:style-name="Source_20_Text"><text:span text:style-name="T8">-</text:span></text:span><text:span text:style-name="Source_20_Text"><text:span text:style-name="T18">0.10</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27"># 220-day scaling</text:span></text:span></text:p>
          <text:p text:style-name="P55"><text:span text:style-name="Source_20_Text"><text:span text:style-name="T10">mu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8">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u</text:span></text:span></text:p>
          <text:p text:style-name="P55"><text:span text:style-name="Source_20_Text"><text:span text:style-name="T10">sigma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p</text:span></text:span><text:span text:style-name="Source_20_Text"><text:span text:style-name="T8">.</text:span></text:span><text:span text:style-name="Source_20_Text"><text:span text:style-name="T9">sqrt(</text:span></text:span><text:span text:style-name="Source_20_Text"><text:span text:style-name="T18">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sigma</text:span></text:span></text:p>
          <text:p text:style-name="P55"><text:span text:style-name="Source_20_Text"><text:span text:style-name="T10">prob_drop_40_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cdf(</text:span></text:span><text:span text:style-name="Source_20_Text"><text:span text:style-name="T8">-</text:span></text:span><text:span text:style-name="Source_20_Text"><text:span text:style-name="T18">0.40</text:span></text:span><text:span text:style-name="Source_20_Text"><text:span text:style-name="T9">, </text:span></text:span><text:span text:style-name="Source_20_Text"><text:span text:style-name="T10">mu220</text:span></text:span><text:span text:style-name="Source_20_Text"><text:span text:style-name="T9">, </text:span></text:span><text:span text:style-name="Source_20_Text"><text:span text:style-name="T10">sigma220</text:span></text:span><text:span text:style-name="Source_20_Text"><text:span text:style-name="T9">)</text:span></text:span></text:p>
          <text:p text:style-name="P55"><text:span text:style-name="Source_20_Text"><text:span text:style-name="T10">prob_drop_20_220</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cdf(</text:span></text:span><text:span text:style-name="Source_20_Text"><text:span text:style-name="T8">-</text:span></text:span><text:span text:style-name="Source_20_Text"><text:span text:style-name="T18">0.20</text:span></text:span><text:span text:style-name="Source_20_Text"><text:span text:style-name="T9">, </text:span></text:span><text:span text:style-name="Source_20_Text"><text:span text:style-name="T10">mu220</text:span></text:span><text:span text:style-name="Source_20_Text"><text:span text:style-name="T9">, </text:span></text:span><text:span text:style-name="Source_20_Text"><text:span text:style-name="T10">sigma220</text:span></text:span><text:span text:style-name="Source_20_Text"><text:span text:style-name="T9">)</text:span></text:span></text:p>
          <text:p text:style-name="P55"><text:span text:style-name="Source_20_Text"><text:span text:style-name="T27"># Quantiles / VaR</text:span></text:span></text:p>
          <text:p text:style-name="P55"><text:span text:style-name="Source_20_Text"><text:span text:style-name="T10">var_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pf(</text:span></text:span><text:span text:style-name="Source_20_Text"><text:span text:style-name="T18">0.0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10">q2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pf(</text:span></text:span><text:span text:style-name="Source_20_Text"><text:span text:style-name="T18">0.2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p text:style-name="P55"><text:span text:style-name="Source_20_Text"><text:span text:style-name="T10">q75</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norm</text:span></text:span><text:span text:style-name="Source_20_Text"><text:span text:style-name="T8">.</text:span></text:span><text:span text:style-name="Source_20_Text"><text:span text:style-name="T9">ppf(</text:span></text:span><text:span text:style-name="Source_20_Text"><text:span text:style-name="T18">0.75</text:span></text:span><text:span text:style-name="Source_20_Text"><text:span text:style-name="T9">, </text:span></text:span><text:span text:style-name="Source_20_Text"><text:span text:style-name="T10">mu</text:span></text:span><text:span text:style-name="Source_20_Text"><text:span text:style-name="T9">, </text:span></text:span><text:span text:style-name="Source_20_Text"><text:span text:style-name="T10">sigma</text:span></text:span><text:span text:style-name="Source_20_Text"><text:span text:style-name="T9">)</text:span></text:span></text:p>
        </text:section>
        <text:p text:style-name="P46"><text:span text:style-name="Strong_20_Emphasis"><text:span text:style-name="T25">English summary:</text:span></text:span><text:span text:style-name="T13"> This is the same idea as the course, but updated to modern pandas and a properly scaled histogram.<text:line-break/>[updated code = código actualizado] [properly scaled = correctamente escalado]</text:span></text:p>
        <text:p text:style-name="P53"/>
        <text:h text:style-name="P54" text:outline-level="2">12) Lo mínimo que tienes que recordar hoy</text:h>
        <text:list text:style-name="L46">
          <text:list-item>
            <text:p text:style-name="P95"><text:span text:style-name="Source_20_Text"><text:span text:style-name="T4">Close</text:span></text:span><text:span text:style-name="T2"> = precio de cierre</text:span></text:p>
          </text:list-item>
          <text:list-item>
            <text:p text:style-name="P95"><text:span text:style-name="Source_20_Text"><text:span text:style-name="T4">LogReturn</text:span></text:span><text:span text:style-name="T2"> = </text:span><text:span text:style-name="Source_20_Text"><text:span text:style-name="T4">log(mañana) - log(hoy)</text:span></text:span></text:p>
          </text:list-item>
          <text:list-item>
            <text:p text:style-name="P95"><text:span text:style-name="Source_20_Text"><text:span text:style-name="T4">mu</text:span></text:span><text:span text:style-name="T2"> = media de retornos</text:span></text:p>
          </text:list-item>
          <text:list-item>
            <text:p text:style-name="P95"><text:soft-page-break/><text:span text:style-name="Source_20_Text"><text:span text:style-name="T4">sigma</text:span></text:span><text:span text:style-name="T2"> = volatilidad aproximada</text:span></text:p>
          </text:list-item>
          <text:list-item>
            <text:p text:style-name="P95"><text:span text:style-name="Source_20_Text"><text:span text:style-name="T4">pdf</text:span></text:span><text:span text:style-name="T2"> = densidad</text:span></text:p>
          </text:list-item>
          <text:list-item>
            <text:p text:style-name="P95"><text:span text:style-name="Source_20_Text"><text:span text:style-name="T4">cdf</text:span></text:span><text:span text:style-name="T2"> = probabilidad acumulada</text:span></text:p>
          </text:list-item>
          <text:list-item>
            <text:p text:style-name="P95"><text:span text:style-name="Source_20_Text"><text:span text:style-name="T4">ppf</text:span></text:span><text:span text:style-name="T2"> = cuantil / inversa de la cdf</text:span></text:p>
          </text:list-item>
          <text:list-item>
            <text:p text:style-name="P95"><text:span text:style-name="Source_20_Text"><text:span text:style-name="T4">220*mu</text:span></text:span><text:span text:style-name="T2"> y </text:span><text:span text:style-name="Source_20_Text"><text:span text:style-name="T4">sqrt(220)*sigma</text:span></text:span><text:span text:style-name="T2"> = escalado temporal aproximado</text:span></text:p>
          </text:list-item>
        </text:list>
        <text:p text:style-name="P46"><text:span text:style-name="Strong_20_Emphasis"><text:span text:style-name="T3">English summary:</text:span></text:span><text:span text:style-name="T2"> Remember the meanings of </text:span><text:span text:style-name="Source_20_Text"><text:span text:style-name="T4">LogReturn</text:span></text:span><text:span text:style-name="T2">, </text:span><text:span text:style-name="Source_20_Text"><text:span text:style-name="T4">mu</text:span></text:span><text:span text:style-name="T2">, </text:span><text:span text:style-name="Source_20_Text"><text:span text:style-name="T4">sigma</text:span></text:span><text:span text:style-name="T2">, </text:span><text:span text:style-name="Source_20_Text"><text:span text:style-name="T4">pdf</text:span></text:span><text:span text:style-name="T2">, </text:span><text:span text:style-name="Source_20_Text"><text:span text:style-name="T4">cdf</text:span></text:span><text:span text:style-name="T2">, and </text:span><text:span text:style-name="Source_20_Text"><text:span text:style-name="T4">ppf</text:span></text:span><text:span text:style-name="T2">.<text:line-break/>[volatility = volatilidad] [cumulative probability = probabilidad acumulada]</text:span></text:p>
        <text:p text:style-name="P46"><text:span text:style-name="T2">En el siguiente paso, te desmenuzo </text:span><text:span text:style-name="Strong_20_Emphasis"><text:span text:style-name="T3">solo este bloque</text:span></text:span><text:span text:style-name="T2">:</text:span></text:p>
        <text:section text:style-name="Sect3" text:name="Section16">
          <text:p text:style-name="P55"><text:bookmark text:name="code-block-viewer Copy 24"/><text:span text:style-name="Source_20_Text"><text:span text:style-name="T7">ms</text:span></text:span><text:span text:style-name="Source_20_Text"><text:span text:style-name="T6">[</text:span></text:span><text:span text:style-name="Source_20_Text"><text:span text:style-name="T11">'LogReturn'</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7">ms</text:span></text:span><text:span text:style-name="Source_20_Text"><text:span text:style-name="T6">[</text:span></text:span><text:span text:style-name="Source_20_Text"><text:span text:style-name="T11">'Close'</text:span></text:span><text:span text:style-name="Source_20_Text"><text:span text:style-name="T6">])</text:span></text:span><text:span text:style-name="Source_20_Text"><text:span text:style-name="T5">.</text:span></text:span><text:span text:style-name="Source_20_Text"><text:span text:style-name="T6">shift(</text:span></text:span><text:span text:style-name="Source_20_Text"><text:span text:style-name="T5">-</text:span></text:span><text:span text:style-name="Source_20_Text"><text:span text:style-name="T14">1</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np</text:span></text:span><text:span text:style-name="Source_20_Text"><text:span text:style-name="T5">.</text:span></text:span><text:span text:style-name="Source_20_Text"><text:span text:style-name="T6">log(</text:span></text:span><text:span text:style-name="Source_20_Text"><text:span text:style-name="T7">ms</text:span></text:span><text:span text:style-name="Source_20_Text"><text:span text:style-name="T6">[</text:span></text:span><text:span text:style-name="Source_20_Text"><text:span text:style-name="T11">'Close'</text:span></text:span><text:span text:style-name="Source_20_Text"><text:span text:style-name="T6">])</text:span></text:span></text:p>
        </text:section>
        <text:p text:style-name="P96">con una tabla de 3 filas y números reales para que lo veas sin abstracción.</text:p>
        <text:p text:style-name="P97"><draw:frame draw:style-name="fr1" draw:name="Frame6" text:anchor-type="char" svg:width="0.041cm" draw:z-index="5"><draw:text-box fo:min-height="0.041cm"><text:p text:style-name="P14"><text:line-break/></text:p></draw:text-box></draw:frame><draw:frame draw:style-name="fr3" draw:name="Image1" text:anchor-type="as-char" svg:width="0.041cm" svg:height="0.041cm" draw:z-index="6"><draw:image xlink:href="https://chatgpt.com/backend-api/estuary/content?id=file_00000000c54c71f596f2b66a1a60664d&amp;ts=494097&amp;p=fs&amp;cid=1&amp;sig=3fce889aa5fd7f346457af631fa299a861b34a9e91ba464a3d6f24150cb7dc92&amp;v=0" xlink:type="simple" xlink:show="embed" xlink:actuate="onLoad"/><svg:title>image.png</svg:title></draw:frame></text:p>
        <text:section text:style-name="Sect2" text:name="_r_s6_">
          <text:p text:style-name="P98">​[MUSIC] ​In this video, we will model stock return using normal random variable and ​demonstrate the importance of distribution in identifying financial risk. ​Why it is important to know the distribution or model for stock return. ​It is really crucial in risk management. ​For example, the stock price of Apple drop over 40% ​from August 2012 to May 2013, roughly one year. ​We need to compute what's the chance that the yearly return can ​be less than negative 40%. ​Is that possible, or just an extreme case like black swan. ​We compute log daily return for stock price of Apple. ​The histogram of a return is symmetric and bell shaped, ​which is very similar to normal distribution. ​Using scipy which is a scientific computation package of python, ​we can get density function and a cumulative distribution function. ​norm.pdf where a given density for ​each possible value of a normal random variable. ​In fact normal random variable can take values from ​positive infinity to negative infinity. ​In Python code here, we get the density between -4 and 4 for simplicity. ​Two parameters 0, 1 in norm.pdf gives the mean and ​the standard deviation of a normal random variable. ​This normal random variable is also called a standard normal random variable, ​and its distribution is also called z-distribution. ​You can change these two values in order to get a different normal variables. ​Because, the density functions of a normal variables are only related ​to their mean and their variance. ​We also can get a cumulative distribution function, or ​in short a CDF <text:soft-page-break/>which outputs the probability for the area, and ​lower side of each possible value. ​On the left side of this slide is the graph for normal density, ​symmetric with a mean and symmetric center. ​It is also bell shaped. ​On the right side that is cumulative distribution function, ​where x takes large values. ​The cumulative probability will approach 1. ​We can model daily stock return using normal distribution. ​We do not know the real mean and standard deviation of this normal random variable. ​We have a large collection of data return from historic data. ​We can compute the mean and the standard deviation in this collection. ​They are not the same as those of normal variable, but ​close enough, as this shown on the right. ​Then, what is the chance data loss can be more than 5%? ​First, we will plot the normal density curve for this daily return. ​This pink area is the probability of losing more than 5% in one day. ​We can use CDF to get this probability, which is 0.5%. ​Hence we have 0.5% chance to have a daily loss more than 5%. ​Our goal is to find out how likely that the stock price of Apple ​were dropped over 40%, 1 year which has 220 trading days. ​We will use another normal distribution to model yearly return. ​We need to figure out the mean and the standard deviation of a yearly return. ​We make assumption that the daily returns are independent, ​which is quite wrong. ​But it can simplify our discussion here, ​to get the mean and variance of a year return. ​We have formulas for sum of variables. ​We need the independence when we compute the variance. ​If the data returns independent the variance of a unit return ​is equal to the sum of a variance of 220 daily return. ​Again, with no CDF we compute a probability, and it is less than 2%. ​That implies, there's only less than 2% chance to have ​yearly loss to be more than 40%. ​What happened to Apple in 2012 and 2013? ​Is not consistent with its overall performance. &lt;&lt;SI NO ME EQUIVOCO HASTA AQUÍ LO HE ENTENDIDO TODO, PERO CREO QUE A PARTIR DE AQUÍ NO, EXPLICAMELO, Y EL PANTALLAZO: &gt;&gt; ​In many circumstances, ​we need to solve a different type of problem with distribution. ​For example, finding quantiles of a normal distribution is a common task ​when performing statistical test in the financial risk management. ​Normal distribution quantiles can obtain using norm.ppf. ​Ppf stands for percent point function. ​In finance related to the quantile there is ​an important risk measure value of risk or VaR. ​It estimates how much a set of investments might lose with a given probability. ​VaR is typically used by firms and the regulators in the financial ​industry to gauge the amount of assess needed to cover possible loss. ​For example, 5% of quantile of daily return is ​called a 95% VaR or VaR at the level of 95%. ​<text:soft-page-break/>We can use a ppf to get a 5% of quantile which is negative 0.03. ​hence, 95% of VaR is negative 0.03, ​it means with the 5% chance that daily return is worse than -3%. ​Is it safe to use normal description to model stock return? ​Two famous professors in the field asset pricing, Fama and ​French responds in this way. ​Distribution of a daily and monthly stock return, ​are rather symmetric about their means, but the tails are fatter. ​Which means there are more outliers that would be ​expected with normal distributions. ​It means that, if tail returns negative, ​as well as positive, may occur more often than we expect. ​If we use normal distribution, this is debatable, ​at least for the returns of some assets with different time window size. ​To modal a fat tail, people proposed modal return using ​t-distributions with low degree of freedom. ​We will discuss and use t-distribution in the next several topics. </text:p>
        </text:section>
        <text:p text:style-name="P99"><draw:frame draw:style-name="fr1" draw:name="Frame7" text:anchor-type="char" svg:width="0.041cm" draw:z-index="7"><draw:text-box fo:min-height="0.041cm"><text:p text:style-name="P14"><text:line-break/></text:p></draw:text-box></draw:frame>Thought for 51s</text:p>
        <text:p text:style-name="P47">13/05/2026 13:39:54 CEST</text:p>
        <text:p text:style-name="P46"><text:span text:style-name="T2">Sí. Hasta donde dices, en general lo llevas bien. Lo que viene después se resume en </text:span><text:span text:style-name="Strong_20_Emphasis"><text:span text:style-name="T3">3 ideas</text:span></text:span><text:span text:style-name="T2">: </text:span><text:span text:style-name="Strong_20_Emphasis"><text:span text:style-name="T3">quantile</text:span></text:span><text:span text:style-name="T2">, </text:span><text:span text:style-name="Strong_20_Emphasis"><text:span text:style-name="T3">VaR</text:span></text:span><text:span text:style-name="T2"> y </text:span><text:span text:style-name="Strong_20_Emphasis"><text:span text:style-name="T3">fat tails</text:span></text:span><text:span text:style-name="T2">.</text:span></text:p>
        <text:h text:style-name="P100" text:outline-level="2"><text:span text:style-name="T28">1) Qué es un </text:span><text:span text:style-name="Strong_20_Emphasis"><text:span text:style-name="T28">quantile</text:span></text:span><text:span text:style-name="T28"> y por qué el curso lo suelta tan mal</text:span></text:h>
        <text:p text:style-name="P46"><text:span text:style-name="T2">Un </text:span><text:span text:style-name="Strong_20_Emphasis"><text:span text:style-name="T3">quantile</text:span></text:span><text:span text:style-name="T2"> (</text:span><text:span text:style-name="Source_20_Text"><text:span text:style-name="T4">cuantil</text:span></text:span><text:span text:style-name="T2">) es un </text:span><text:span text:style-name="Strong_20_Emphasis"><text:span text:style-name="T3">punto de corte</text:span></text:span><text:span text:style-name="T2"> en la distribución.</text:span></text:p>
        <text:p text:style-name="P101"><draw:frame draw:style-name="fr2" draw:name="Frame8" text:anchor-type="char" svg:width="0.041cm" draw:z-index="8"><draw:text-box fo:min-height="0.041cm"><text:p text:style-name="P14">x</text:p></draw:text-box></draw:frame><text:span text:style-name="T2">No es un “trozo” de la curva.<text:line-break/>Es el </text:span><text:span text:style-name="Strong_20_Emphasis"><text:span text:style-name="T3">valor </text:span></text:span><text:span text:style-name="Strong_20_Emphasis"><text:span text:style-name="T29">x</text:span></text:span><text:span text:style-name="T2"> que deja una cierta probabilidad acumulada a la izquierda.</text:span></text:p>
        <text:p text:style-name="P49">Ejemplo:</text:p>
        <text:list text:style-name="L47">
          <text:list-item>
            <text:p text:style-name="P102"><draw:frame draw:style-name="fr2" draw:name="Frame9" text:anchor-type="char" svg:width="0.041cm" draw:z-index="9"><draw:text-box fo:min-height="0.041cm"><text:p text:style-name="P14">x</text:p></draw:text-box></draw:frame><draw:frame draw:style-name="fr2" draw:name="Frame10" text:anchor-type="char" svg:width="0.041cm" draw:z-index="10"><draw:text-box fo:min-height="0.041cm"><text:p text:style-name="P14">x</text:p></draw:text-box></draw:frame><text:span text:style-name="Strong_20_Emphasis"><text:span text:style-name="T3">5% quantile</text:span></text:span><text:span text:style-name="T2"> = el valor </text:span><text:span text:style-name="T29">x</text:span><text:span text:style-name="T2"> tal que el 5% de los retornos queda por debajo de </text:span><text:span text:style-name="T29">x</text:span></text:p>
          </text:list-item>
          <text:list-item>
            <text:p text:style-name="P102"><draw:frame draw:style-name="fr2" draw:name="Frame11" text:anchor-type="char" svg:width="0.041cm" draw:z-index="11"><draw:text-box fo:min-height="0.041cm"><text:p text:style-name="P14">x</text:p></draw:text-box></draw:frame><text:span text:style-name="Strong_20_Emphasis"><text:span text:style-name="T3">25% quantile</text:span></text:span><text:span text:style-name="T2"> = el valor </text:span><text:span text:style-name="T29">x</text:span><text:span text:style-name="T2"> tal que el 25% queda por debajo</text:span></text:p>
          </text:list-item>
          <text:list-item>
            <text:p text:style-name="P102"><draw:frame draw:style-name="fr2" draw:name="Frame12" text:anchor-type="char" svg:width="0.041cm" draw:z-index="12"><draw:text-box fo:min-height="0.041cm"><text:p text:style-name="P14">x</text:p></draw:text-box></draw:frame><text:span text:style-name="Strong_20_Emphasis"><text:span text:style-name="T3">95% quantile</text:span></text:span><text:span text:style-name="T2"> = el valor </text:span><text:span text:style-name="T29">x</text:span><text:span text:style-name="T2"> tal que el 95% queda por debajo</text:span></text:p>
          </text:list-item>
        </text:list>
        <text:p text:style-name="P47">En una normal:</text:p>
        <text:list text:style-name="L48">
          <text:list-item>
            <text:p text:style-name="P103">el 5% quantile suele ser negativo</text:p>
          </text:list-item>
          <text:list-item>
            <text:p text:style-name="P103">el 95% quantile suele ser positivo</text:p>
          </text:list-item>
        </text:list>
        <text:p text:style-name="P46"><text:span text:style-name="T2">Eso encaja con lo que ya entendiste de la </text:span><text:span text:style-name="Strong_20_Emphasis"><text:span text:style-name="T3">CDF</text:span></text:span><text:span text:style-name="T2">:</text:span></text:p>
        <text:list text:style-name="L49">
          <text:list-item>
            <text:p text:style-name="P104">CDF: “dado un valor, dime cuánta probabilidad queda a la izquierda”</text:p>
          </text:list-item>
          <text:list-item>
            <text:p text:style-name="P104"><text:soft-page-break/>quantile/PPF: “dada una probabilidad, dime cuál es el valor”</text:p>
          </text:list-item>
        </text:list>
        <text:p text:style-name="P46"><text:span text:style-name="Strong_20_Emphasis"><text:span text:style-name="T3">English summary:</text:span></text:span><text:span text:style-name="T2"> A quantile [cuantil] is a cutoff [punto de corte]: the value that leaves a chosen cumulative probability [probabilidad acumulada] to the left.</text:span></text:p>
        <text:p text:style-name="P53"/>
        <text:h text:style-name="P100" text:outline-level="2"><text:span text:style-name="T28">2) Qué hace la </text:span><text:span text:style-name="Strong_20_Emphasis"><text:span text:style-name="T28">PPF</text:span></text:span></text:h>
        <text:p text:style-name="P46"><text:span text:style-name="T2">La </text:span><text:span text:style-name="Strong_20_Emphasis"><text:span text:style-name="T3">PPF</text:span></text:span><text:span text:style-name="T2"> (</text:span><text:span text:style-name="Source_20_Text"><text:span text:style-name="T4">Percent Point Function</text:span></text:span><text:span text:style-name="T2">) es la </text:span><text:span text:style-name="Strong_20_Emphasis"><text:span text:style-name="T3">inversa de la CDF</text:span></text:span><text:span text:style-name="T2">.</text:span></text:p>
        <text:p text:style-name="P49">Si la CDF hace esto:</text:p>
        <text:p text:style-name="P52"><draw:frame draw:style-name="fr2" draw:name="Frame13" text:anchor-type="char" svg:width="0.041cm" draw:z-index="14"><draw:text-box fo:min-height="0.041cm"><text:p text:style-name="P14">F(x)=P(X≤x)</text:p></draw:text-box></draw:frame><text:span text:style-name="T15">F</text:span>(<text:span text:style-name="T15">x</text:span>)=<text:span text:style-name="T15">P</text:span>(<text:span text:style-name="T15">X</text:span>≤<text:span text:style-name="T15">x</text:span>)</text:p>
        <text:p text:style-name="P47">la PPF hace lo contrario:</text:p>
        <text:p text:style-name="P52"><draw:frame draw:style-name="fr2" draw:name="Frame14" text:anchor-type="char" svg:width="0.041cm" draw:z-index="13"><draw:text-box fo:min-height="0.041cm"><text:p text:style-name="P14">PPF(p)=x tal que P(X≤x)=p</text:p></draw:text-box></draw:frame>PPF(<text:span text:style-name="T15">p</text:span>)=<text:span text:style-name="T15">x</text:span> tal que <text:span text:style-name="T15">P</text:span>(<text:span text:style-name="T15">X</text:span>≤<text:span text:style-name="T15">x</text:span>)=<text:span text:style-name="T15">p</text:span></text:p>
        <text:p text:style-name="P47">En Python:</text:p>
        <text:section text:style-name="Sect3" text:name="Section17">
          <text:p text:style-name="P55"><text:bookmark text:name="code-block-viewer Copy 25"/><text:span text:style-name="Source_20_Text"><text:span text:style-name="T7">norm</text:span></text:span><text:span text:style-name="Source_20_Text"><text:span text:style-name="T5">.</text:span></text:span><text:span text:style-name="Source_20_Text"><text:span text:style-name="T6">ppf(</text:span></text:span><text:span text:style-name="Source_20_Text"><text:span text:style-name="T14">0.0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section>
        <text:p text:style-name="P73">significa:</text:p>
        <text:p text:style-name="P105"><text:span text:style-name="T22">“</text:span><text:span text:style-name="T3">bajo esta normal con media </text:span><text:span text:style-name="Source_20_Text"><text:span text:style-name="T4">mu</text:span></text:span><text:span text:style-name="T3"> y desviación típica </text:span><text:span text:style-name="Source_20_Text"><text:span text:style-name="T4">sigma</text:span></text:span><text:span text:style-name="T3">, ¿qué valor deja el 5% de la probabilidad a la izquierda?”</text:span></text:p>
        <text:p text:style-name="P46"><text:span text:style-name="T2">Si sale </text:span><text:span text:style-name="Source_20_Text"><text:span text:style-name="T4">-0.03</text:span></text:span><text:span text:style-name="T2">, significa:</text:span></text:p>
        <text:list text:style-name="L50">
          <text:list-item>
            <text:p text:style-name="P106"><text:span text:style-name="T2">el 5% de los días tiene retorno </text:span><text:span text:style-name="Strong_20_Emphasis"><text:span text:style-name="T3">menor o igual</text:span></text:span><text:span text:style-name="T2"> que </text:span><text:span text:style-name="Source_20_Text"><text:span text:style-name="T4">-0.03</text:span></text:span></text:p>
          </text:list-item>
          <text:list-item>
            <text:p text:style-name="P106"><text:span text:style-name="T2">o sea, el 5% peor de los días es de </text:span><text:span text:style-name="Strong_20_Emphasis"><text:span text:style-name="T3">-3% o peor</text:span></text:span></text:p>
          </text:list-item>
        </text:list>
        <text:p text:style-name="P46"><text:span text:style-name="Strong_20_Emphasis"><text:span text:style-name="T3">English summary:</text:span></text:span><text:span text:style-name="T2"> The PPF [función percent point] is the inverse [inversa] of the CDF [función acumulada]: it converts a probability [probabilidad] into a threshold [umbral].</text:span></text:p>
        <text:p text:style-name="P53"/>
        <text:h text:style-name="P100" text:outline-level="2"><text:span text:style-name="T28">3) Por qué el </text:span><text:span text:style-name="Strong_20_Emphasis"><text:span text:style-name="T28">5% quantile</text:span></text:span><text:span text:style-name="T28"> se llama </text:span><text:span text:style-name="Strong_20_Emphasis"><text:span text:style-name="T28">95% VaR</text:span></text:span></text:h>
        <text:p text:style-name="P47">Aquí está el punto que más confunde.</text:p>
        <text:p text:style-name="P46"><text:span text:style-name="T2">Si el </text:span><text:span text:style-name="Strong_20_Emphasis"><text:span text:style-name="T3">5% quantile</text:span></text:span><text:span text:style-name="T2"> del retorno diario es </text:span><text:span text:style-name="Source_20_Text"><text:span text:style-name="T4">-0.03</text:span></text:span><text:span text:style-name="T2">, eso quiere decir:</text:span></text:p>
        <text:p text:style-name="P52"><draw:frame draw:style-name="fr2" draw:name="Frame15" text:anchor-type="char" svg:width="0.041cm" draw:z-index="15"><draw:text-box fo:min-height="0.041cm"><text:p text:style-name="P14">P(R≤−0.03)=0.05</text:p></draw:text-box></draw:frame><text:span text:style-name="T15">P</text:span>(<text:span text:style-name="T15">R</text:span>≤−0.03)=0.05</text:p>
        <text:p text:style-name="P47">o sea:</text:p>
        <text:list text:style-name="L51">
          <text:list-item>
            <text:p text:style-name="P107"><text:soft-page-break/><text:span text:style-name="T2">hay un </text:span><text:span text:style-name="Strong_20_Emphasis"><text:span text:style-name="T3">5%</text:span></text:span><text:span text:style-name="T2"> de probabilidad de tener un retorno </text:span><text:span text:style-name="Strong_20_Emphasis"><text:span text:style-name="T3">peor que -3%</text:span></text:span></text:p>
          </text:list-item>
        </text:list>
        <text:p text:style-name="P47">La forma financiera de decir eso es:</text:p>
        <text:list text:style-name="L52">
          <text:list-item>
            <text:p text:style-name="P108"><text:span text:style-name="T2">con un </text:span><text:span text:style-name="Strong_20_Emphasis"><text:span text:style-name="T3">95% confidence level</text:span></text:span><text:span text:style-name="T2"> (</text:span><text:span text:style-name="Source_20_Text"><text:span text:style-name="T4">nivel de confianza del 95%</text:span></text:span><text:span text:style-name="T2">)</text:span></text:p>
          </text:list-item>
          <text:list-item>
            <text:p text:style-name="P108"><text:span text:style-name="T2">la pérdida diaria </text:span><text:span text:style-name="Strong_20_Emphasis"><text:span text:style-name="T3">no debería superar</text:span></text:span><text:span text:style-name="T2"> el 3%</text:span></text:p>
          </text:list-item>
          <text:list-item>
            <text:p text:style-name="P109">salvo en el 5% peor de los casos</text:p>
          </text:list-item>
        </text:list>
        <text:p text:style-name="P46"><text:span text:style-name="T2">Por eso se llama </text:span><text:span text:style-name="Strong_20_Emphasis"><text:span text:style-name="T3">95% VaR</text:span></text:span><text:span text:style-name="T2">.</text:span></text:p>
        <text:p text:style-name="P49">Ojo con el signo:</text:p>
        <text:list text:style-name="L53">
          <text:list-item>
            <text:p text:style-name="P110"><text:span text:style-name="T2">en retornos, el cuantil sale negativo (</text:span><text:span text:style-name="Source_20_Text"><text:span text:style-name="T4">-0.03</text:span></text:span><text:span text:style-name="T2">)</text:span></text:p>
          </text:list-item>
          <text:list-item>
            <text:p text:style-name="P110"><text:span text:style-name="T2">en muchos textos financieros, el </text:span><text:span text:style-name="Strong_20_Emphasis"><text:span text:style-name="T3">VaR</text:span></text:span><text:span text:style-name="T2"> se reporta como magnitud positiva de pérdida (</text:span><text:span text:style-name="Source_20_Text"><text:span text:style-name="T4">3%</text:span></text:span><text:span text:style-name="T2">)</text:span></text:p>
          </text:list-item>
        </text:list>
        <text:p text:style-name="P47">O sea:</text:p>
        <text:list text:style-name="L54">
          <text:list-item>
            <text:p text:style-name="P111"><text:span text:style-name="Strong_20_Emphasis"><text:span text:style-name="T3">5% quantile del return</text:span></text:span><text:span text:style-name="T2"> = </text:span><text:span text:style-name="Source_20_Text"><text:span text:style-name="T4">-3%</text:span></text:span></text:p>
          </text:list-item>
          <text:list-item>
            <text:p text:style-name="P111"><text:span text:style-name="Strong_20_Emphasis"><text:span text:style-name="T3">95% VaR</text:span></text:span><text:span text:style-name="T2"> = </text:span><text:span text:style-name="Source_20_Text"><text:span text:style-name="T4">3%</text:span></text:span><text:span text:style-name="T2"> de pérdida</text:span></text:p>
          </text:list-item>
        </text:list>
        <text:p text:style-name="P47">Es la misma idea, con distinta convención de signo.</text:p>
        <text:p text:style-name="P46"><text:span text:style-name="Strong_20_Emphasis"><text:span text:style-name="T3">English summary:</text:span></text:span><text:span text:style-name="T2"> The 5% return quantile [cuantil del 5%] corresponds to a 95% VaR [VaR al 95%] because only the worst 5% tail [cola peor del 5%] lies beyond that loss threshold [umbral de pérdida].</text:span></text:p>
        <text:p text:style-name="P53"/>
        <text:h text:style-name="P54" text:outline-level="2">4) Tu lectura de “95% quantile” hay que corregirla un poco</text:h>
        <text:p text:style-name="P47">Aquí sí había una pequeña confusión.</text:p>
        <text:p text:style-name="P49">Si:</text:p>
        <text:section text:style-name="Sect3" text:name="Section18">
          <text:p text:style-name="P55"><text:bookmark text:name="code-block-viewer Copy 26"/><text:span text:style-name="Source_20_Text"><text:span text:style-name="T7">norm</text:span></text:span><text:span text:style-name="Source_20_Text"><text:span text:style-name="T5">.</text:span></text:span><text:span text:style-name="Source_20_Text"><text:span text:style-name="T6">ppf(</text:span></text:span><text:span text:style-name="Source_20_Text"><text:span text:style-name="T14">0.95</text:span></text:span><text:span text:style-name="Source_20_Text"><text:span text:style-name="T6">, </text:span></text:span><text:span text:style-name="Source_20_Text"><text:span text:style-name="T7">mu</text:span></text:span><text:span text:style-name="Source_20_Text"><text:span text:style-name="T6">, </text:span></text:span><text:span text:style-name="Source_20_Text"><text:span text:style-name="T7">sigma</text:span></text:span><text:span text:style-name="Source_20_Text"><text:span text:style-name="T6">)</text:span></text:span></text:p>
        </text:section>
        <text:p text:style-name="P46"><text:span text:style-name="T13">da por ejemplo </text:span><text:span text:style-name="Source_20_Text"><text:span text:style-name="T12">0.024</text:span></text:span><text:span text:style-name="T13">, eso </text:span><text:span text:style-name="Strong_20_Emphasis"><text:span text:style-name="T25">no</text:span></text:span><text:span text:style-name="T13"> significa:</text:span></text:p>
        <text:p text:style-name="P112">“<text:span text:style-name="T30">hay 95% de probabilidad de que incremente 2.4%”</text:span></text:p>
        <text:p text:style-name="P47">Lo correcto es:</text:p>
        <text:p text:style-name="P52"><draw:frame draw:style-name="fr2" draw:name="Frame16" text:anchor-type="char" svg:width="0.041cm" draw:z-index="16"><draw:text-box fo:min-height="0.041cm"><text:p text:style-name="P14">P(R≤0.024)=0.95</text:p></draw:text-box></draw:frame><text:soft-page-break/><text:span text:style-name="T15">P</text:span>(<text:span text:style-name="T15">R</text:span>≤0.024)=0.95</text:p>
        <text:p text:style-name="P47">O sea:</text:p>
        <text:list text:style-name="L55">
          <text:list-item>
            <text:p text:style-name="P113"><text:span text:style-name="T2">el </text:span><text:span text:style-name="Strong_20_Emphasis"><text:span text:style-name="T3">95%</text:span></text:span><text:span text:style-name="T2"> de los retornos está </text:span><text:span text:style-name="Strong_20_Emphasis"><text:span text:style-name="T3">por debajo o igual</text:span></text:span><text:span text:style-name="T2"> a </text:span><text:span text:style-name="Source_20_Text"><text:span text:style-name="T4">+2.4%</text:span></text:span></text:p>
          </text:list-item>
          <text:list-item>
            <text:p text:style-name="P113"><text:span text:style-name="T2">solo el </text:span><text:span text:style-name="Strong_20_Emphasis"><text:span text:style-name="T3">5%</text:span></text:span><text:span text:style-name="T2"> de los días está </text:span><text:span text:style-name="Strong_20_Emphasis"><text:span text:style-name="T3">por encima</text:span></text:span><text:span text:style-name="T2"> de </text:span><text:span text:style-name="Source_20_Text"><text:span text:style-name="T4">+2.4%</text:span></text:span></text:p>
          </text:list-item>
        </text:list>
        <text:p text:style-name="P47">Así se leen siempre los cuantiles:</text:p>
        <text:list text:style-name="L56">
          <text:list-item>
            <text:p text:style-name="P114"><text:span text:style-name="Source_20_Text"><text:span text:style-name="T4">q95 = 0.024</text:span></text:span><text:span text:style-name="T2"> no significa “95% de subir 2.4%”</text:span></text:p>
          </text:list-item>
          <text:list-item>
            <text:p text:style-name="P115">significa “2.4% es el punto que deja al 95% de los valores por debajo”</text:p>
          </text:list-item>
        </text:list>
        <text:p text:style-name="P46"><text:span text:style-name="Strong_20_Emphasis"><text:span text:style-name="T3">English summary:</text:span></text:span><text:span text:style-name="T2"> The 95% quantile [cuantil 95%] does </text:span><text:span text:style-name="Strong_20_Emphasis"><text:span text:style-name="T3">not</text:span></text:span><text:span text:style-name="T2"> mean “95% chance of gaining 2.4%”; it means 2.4% is the cutoff [punto de corte] with 95% of observations [observaciones] below it.</text:span></text:p>
        <text:p text:style-name="P53"/>
        <text:h text:style-name="P100" text:outline-level="2"><text:span text:style-name="T28">5) La parte del pantallazo: </text:span><text:span text:style-name="Strong_20_Emphasis"><text:span text:style-name="T28">“Is it safe to use Normal Distribution?”</text:span></text:span></text:h>
        <text:p text:style-name="P47">La idea del pantallazo es esta:</text:p>
        <text:list text:style-name="L57">
          <text:list-item>
            <text:p text:style-name="P116"><text:span text:style-name="T2">los retornos diarios y mensuales de acciones suelen ser </text:span><text:span text:style-name="Strong_20_Emphasis"><text:span text:style-name="T3">más o menos simétricos</text:span></text:span><text:span text:style-name="T2"> alrededor de su media</text:span></text:p>
          </text:list-item>
          <text:list-item>
            <text:p text:style-name="P116"><text:span text:style-name="T2">pero las </text:span><text:span text:style-name="Strong_20_Emphasis"><text:span text:style-name="T3">colas</text:span></text:span><text:span text:style-name="T2"> (</text:span><text:span text:style-name="Source_20_Text"><text:span text:style-name="T4">tails</text:span></text:span><text:span text:style-name="T2">) son </text:span><text:span text:style-name="Strong_20_Emphasis"><text:span text:style-name="T3">más gruesas</text:span></text:span><text:span text:style-name="T2"> o </text:span><text:span text:style-name="Strong_20_Emphasis"><text:span text:style-name="T3">más pesadas</text:span></text:span><text:span text:style-name="T2"> (</text:span><text:span text:style-name="Source_20_Text"><text:span text:style-name="T4">fatter tails</text:span></text:span><text:span text:style-name="T2">) que en una normal</text:span></text:p>
          </text:list-item>
        </text:list>
        <text:p text:style-name="P47">Qué significa eso de forma simple:</text:p>
        <text:list text:style-name="L58">
          <text:list-item>
            <text:p text:style-name="P117">en el centro, la normal puede parecer razonable</text:p>
          </text:list-item>
          <text:list-item>
            <text:p text:style-name="P117">pero en los extremos, la normal suele quedarse corta</text:p>
          </text:list-item>
        </text:list>
        <text:p text:style-name="P47">O sea:</text:p>
        <text:list text:style-name="L59">
          <text:list-item>
            <text:p text:style-name="P118"><text:span text:style-name="T2">hay </text:span><text:span text:style-name="Strong_20_Emphasis"><text:span text:style-name="T3">más outliers</text:span></text:span><text:span text:style-name="T2"> (</text:span><text:span text:style-name="Source_20_Text"><text:span text:style-name="T4">valores extremos</text:span></text:span><text:span text:style-name="T2">)</text:span></text:p>
          </text:list-item>
          <text:list-item>
            <text:p text:style-name="P119">más días muy malos y muy buenos</text:p>
          </text:list-item>
          <text:list-item>
            <text:p text:style-name="P119">de los que la normal predice</text:p>
          </text:list-item>
        </text:list>
        <text:p text:style-name="P47">Eso es exactamente lo que te marca la imagen:</text:p>
        <text:list text:style-name="L60">
          <text:list-item>
            <text:p text:style-name="P120"><text:soft-page-break/>la campana azul normal en el centro</text:p>
          </text:list-item>
          <text:list-item>
            <text:p text:style-name="P120">y en las zonas amarillas de los lados, más masa en las colas de la real que en la normal</text:p>
          </text:list-item>
        </text:list>
        <text:p text:style-name="P46"><text:span text:style-name="Strong_20_Emphasis"><text:span text:style-name="T3">English summary:</text:span></text:span><text:span text:style-name="T2"> The slide says stock returns are roughly symmetric [simétricos], but they have fatter tails [colas más pesadas], meaning more extreme outcomes [resultados extremos] than a normal model predicts.</text:span></text:p>
        <text:p text:style-name="P53"/>
        <text:h text:style-name="P100" text:outline-level="2"><text:span text:style-name="T28">6) Consecuencia práctica: la normal suele </text:span><text:span text:style-name="Strong_20_Emphasis"><text:span text:style-name="T28">infraestimar</text:span></text:span><text:span text:style-name="T28"> el riesgo extremo</text:span></text:h>
        <text:p text:style-name="P47">Esto es lo importante en finanzas.</text:p>
        <text:p text:style-name="P49">Si modelas retornos con normal:</text:p>
        <text:list text:style-name="L61">
          <text:list-item>
            <text:p text:style-name="P121">el centro puede salir aceptable</text:p>
          </text:list-item>
          <text:list-item>
            <text:p text:style-name="P121">pero las colas suelen salir demasiado finas</text:p>
          </text:list-item>
        </text:list>
        <text:p text:style-name="P47">Entonces:</text:p>
        <text:list text:style-name="L62">
          <text:list-item>
            <text:p text:style-name="P122"><text:span text:style-name="T2">la probabilidad de un crash (</text:span><text:span text:style-name="Source_20_Text"><text:span text:style-name="T4">desplome</text:span></text:span><text:span text:style-name="T2">) te sale demasiado pequeña</text:span></text:p>
          </text:list-item>
          <text:list-item>
            <text:p text:style-name="P123">el VaR te puede salir demasiado optimista</text:p>
          </text:list-item>
          <text:list-item>
            <text:p text:style-name="P123">los eventos raros parecen más raros de lo que realmente son</text:p>
          </text:list-item>
        </text:list>
        <text:p text:style-name="P47">Eso es lo que quieren decir Fama y French con esa frase del pantallazo.</text:p>
        <text:p text:style-name="P49">No están diciendo:</text:p>
        <text:list text:style-name="L63">
          <text:list-item>
            <text:p text:style-name="P124">“<text:span text:style-name="T26">la normal no sirve para nada”</text:span></text:p>
          </text:list-item>
        </text:list>
        <text:p text:style-name="P47">Están diciendo:</text:p>
        <text:list text:style-name="L64">
          <text:list-item>
            <text:p text:style-name="P125">“<text:span text:style-name="T26">para extremos, cuidado: la normal no captura bien las colas”</text:span></text:p>
          </text:list-item>
        </text:list>
        <text:p text:style-name="P46"><text:span text:style-name="Strong_20_Emphasis"><text:span text:style-name="T3">English summary:</text:span></text:span><text:span text:style-name="T2"> In practice [en la práctica], the normal model often underestimates [infraestima] tail risk [riesgo de cola], so extreme losses [pérdidas extremas] appear less likely than they really are.</text:span></text:p>
        <text:p text:style-name="P53"><text:soft-page-break/></text:p>
        <text:h text:style-name="P100" text:outline-level="2"><text:span text:style-name="T28">7) Por qué mencionan la </text:span><text:span text:style-name="Strong_20_Emphasis"><text:span text:style-name="T28">t-distribution</text:span></text:span></text:h>
        <text:p text:style-name="P46"><text:span text:style-name="T2">La </text:span><text:span text:style-name="Strong_20_Emphasis"><text:span text:style-name="T3">t-distribution</text:span></text:span><text:span text:style-name="T2"> (</text:span><text:span text:style-name="Source_20_Text"><text:span text:style-name="T4">distribución t de Student</text:span></text:span><text:span text:style-name="T2">) se usa mucho porque:</text:span></text:p>
        <text:list text:style-name="L65">
          <text:list-item>
            <text:p text:style-name="P126">se parece a la normal en el centro</text:p>
          </text:list-item>
          <text:list-item>
            <text:p text:style-name="P126">pero tiene colas más pesadas</text:p>
          </text:list-item>
        </text:list>
        <text:p text:style-name="P47">Eso la hace más razonable para retornos financieros cuando quieres modelar mejor extremos.</text:p>
        <text:p text:style-name="P46"><text:span text:style-name="T2">Lo de </text:span><text:span text:style-name="Strong_20_Emphasis"><text:span text:style-name="T3">low degrees of freedom</text:span></text:span><text:span text:style-name="T2"> (</text:span><text:span text:style-name="Source_20_Text"><text:span text:style-name="T4">pocos grados de libertad</text:span></text:span><text:span text:style-name="T2">) significa:</text:span></text:p>
        <text:list text:style-name="L66">
          <text:list-item>
            <text:p text:style-name="P127">cuanto menos grados de libertad, más pesadas son las colas</text:p>
          </text:list-item>
          <text:list-item>
            <text:p text:style-name="P127">cuanto más grados de libertad, más se parece a la normal</text:p>
          </text:list-item>
        </text:list>
        <text:p text:style-name="P47">O sea:</text:p>
        <text:list text:style-name="L67">
          <text:list-item>
            <text:p text:style-name="P128"><text:span text:style-name="Strong_20_Emphasis"><text:span text:style-name="T3">t con pocos grados de libertad</text:span></text:span><text:span text:style-name="T2"> = admite más eventos extremos</text:span></text:p>
          </text:list-item>
          <text:list-item>
            <text:p text:style-name="P128"><text:span text:style-name="Strong_20_Emphasis"><text:span text:style-name="T3">normal</text:span></text:span><text:span text:style-name="T2"> = admite menos extremos</text:span></text:p>
          </text:list-item>
        </text:list>
        <text:p text:style-name="P46"><text:span text:style-name="Strong_20_Emphasis"><text:span text:style-name="T3">English summary:</text:span></text:span><text:span text:style-name="T2"> A Student t-distribution [distribución t] with low degrees of freedom [pocos grados de libertad] has heavier tails [colas más pesadas], so it can model extreme returns [retornos extremos] better than a normal.</text:span></text:p>
        <text:p text:style-name="P53"/>
        <text:h text:style-name="P54" text:outline-level="2">8) Lo de Apple y el 40% en un año: qué conclusión quieren sacar</text:h>
        <text:p text:style-name="P47">El vídeo hace este razonamiento:</text:p>
        <text:list text:style-name="L68">
          <text:list-item>
            <text:p text:style-name="P129">ajusta una normal a los retornos diarios</text:p>
          </text:list-item>
          <text:list-item>
            <text:p text:style-name="P129">la escala a 220 días</text:p>
          </text:list-item>
          <text:list-item>
            <text:p text:style-name="P129">calcula la probabilidad de perder más de 40% en un año</text:p>
          </text:list-item>
          <text:list-item>
            <text:p text:style-name="P129">si sale muy baja, concluye que fue un evento extremo</text:p>
          </text:list-item>
        </text:list>
        <text:p text:style-name="P47">Hasta ahí, matemáticamente dentro del modelo, correcto.</text:p>
        <text:p text:style-name="P49">El problema es este:</text:p>
        <text:list text:style-name="L69">
          <text:list-item>
            <text:p text:style-name="P130"><text:soft-page-break/><text:span text:style-name="T2">si el modelo normal </text:span><text:span text:style-name="Strong_20_Emphasis"><text:span text:style-name="T3">subestima</text:span></text:span><text:span text:style-name="T2"> colas</text:span></text:p>
          </text:list-item>
          <text:list-item>
            <text:p text:style-name="P130"><text:span text:style-name="T2">entonces esa probabilidad calculada puede salir </text:span><text:span text:style-name="Strong_20_Emphasis"><text:span text:style-name="T3">demasiado pequeña</text:span></text:span></text:p>
          </text:list-item>
        </text:list>
        <text:p text:style-name="P46"><text:span text:style-name="T2">O sea, el número puede ser correcto </text:span><text:span text:style-name="Strong_20_Emphasis"><text:span text:style-name="T3">dentro del modelo</text:span></text:span><text:span text:style-name="T2">, pero el modelo puede ser malo para extremos.</text:span></text:p>
        <text:p text:style-name="P49">Eso es justo la crítica del pantallazo.</text:p>
        <text:p text:style-name="P46"><text:span text:style-name="Strong_20_Emphasis"><text:span text:style-name="T3">English summary:</text:span></text:span><text:span text:style-name="T2"> The annual 40% loss example [pérdida anual del 40%] may be rare under the normal model [modelo normal], but that model can still be too optimistic [demasiado optimista] in the tails [colas].</text:span></text:p>
        <text:p text:style-name="P53"/>
        <text:h text:style-name="P54" text:outline-level="2">9) Qué debes quedarte para examen o para no perderte</text:h>
        <text:p text:style-name="P47">Qué hace cada cosa:</text:p>
        <text:list text:style-name="L70">
          <text:list-item>
            <text:p text:style-name="P131"><text:span text:style-name="Strong_20_Emphasis"><text:span text:style-name="T3">PDF</text:span></text:span><text:span text:style-name="T2">: densidad local, no probabilidad directa</text:span></text:p>
          </text:list-item>
          <text:list-item>
            <text:p text:style-name="P131"><text:span text:style-name="Strong_20_Emphasis"><text:span text:style-name="T3">CDF</text:span></text:span><text:span text:style-name="T2">: probabilidad acumulada hasta un valor</text:span></text:p>
          </text:list-item>
          <text:list-item>
            <text:p text:style-name="P131"><text:span text:style-name="Strong_20_Emphasis"><text:span text:style-name="T3">PPF / quantile</text:span></text:span><text:span text:style-name="T2">: valor que corresponde a una probabilidad acumulada</text:span></text:p>
          </text:list-item>
          <text:list-item>
            <text:p text:style-name="P131"><text:span text:style-name="Strong_20_Emphasis"><text:span text:style-name="T3">5% quantile</text:span></text:span><text:span text:style-name="T2">: umbral del peor 5%</text:span></text:p>
          </text:list-item>
          <text:list-item>
            <text:p text:style-name="P131"><text:span text:style-name="Strong_20_Emphasis"><text:span text:style-name="T3">95% VaR</text:span></text:span><text:span text:style-name="T2">: la misma idea, expresada como nivel de confianza</text:span></text:p>
          </text:list-item>
          <text:list-item>
            <text:p text:style-name="P131"><text:span text:style-name="Strong_20_Emphasis"><text:span text:style-name="T3">Fatter tails</text:span></text:span><text:span text:style-name="T2">: más eventos extremos que en una normal</text:span></text:p>
          </text:list-item>
        </text:list>
        <text:p text:style-name="P46"><text:span text:style-name="Strong_20_Emphasis"><text:span text:style-name="T3">English summary:</text:span></text:span><text:span text:style-name="T2"> Key takeaway [idea clave]: PDF [densidad], CDF [acumulada], PPF/quantile [cuantil], VaR [valor en riesgo], and fatter tails [colas más pesadas] are the core concepts [conceptos núcleo].</text:span></text:p>
        <text:p text:style-name="P53"/>
        <text:h text:style-name="P54" text:outline-level="2">10) Tu traducción mental correcta de esa parte del vídeo</text:h>
        <text:p text:style-name="P47">Léelo así:</text:p>
        <text:list text:style-name="L71">
          <text:list-item>
            <text:p text:style-name="P132"><text:span text:style-name="T22">“</text:span><text:span text:style-name="Source_20_Text"><text:span text:style-name="T4">norm.ppf(0.05, mu, sigma)</text:span></text:span><text:span text:style-name="T2">”<text:line-break/>= dame el retorno que marca el peor 5%</text:span></text:p>
          </text:list-item>
          <text:list-item>
            <text:p text:style-name="P133"><text:soft-page-break/>“<text:span text:style-name="T26">95% VaR”<text:line-break/>= con 95% de confianza, no deberías perder más que ese umbral</text:span></text:p>
          </text:list-item>
          <text:list-item>
            <text:p text:style-name="P133">“<text:span text:style-name="T26">Is it safe to use normal distribution?”<text:line-break/>= ¿es prudente usar normal para riesgo extremo?</text:span></text:p>
          </text:list-item>
          <text:list-item>
            <text:p text:style-name="P133">“<text:span text:style-name="T26">Fatter tails”<text:line-break/>= en mercado real hay más hostias grandes de las que dice la normal</text:span></text:p>
          </text:list-item>
        </text:list>
        <text:p text:style-name="P46"><text:span text:style-name="Strong_20_Emphasis"><text:span text:style-name="T3">English summary:</text:span></text:span><text:span text:style-name="T2"> A good plain-English reading [lectura simple] is: </text:span><text:span text:style-name="Source_20_Text"><text:span text:style-name="T4">ppf(0.05)</text:span></text:span><text:span text:style-name="T2"> finds the worst 5% cutoff [corte del peor 5%], and fat tails [colas gruesas] mean the market has more extreme moves [movimientos extremos] than the normal assumes.</text:span></text:p>
        <text:p text:style-name="P46"><text:span text:style-name="T2">Si quieres, el siguiente paso útil es hacerte una </text:span><text:span text:style-name="Strong_20_Emphasis"><text:span text:style-name="T3">chuleta de 12 líneas</text:span></text:span><text:span text:style-name="T2"> con:<text:line-break/></text:span><text:span text:style-name="Source_20_Text"><text:span text:style-name="T4">pdf</text:span></text:span><text:span text:style-name="T2">, </text:span><text:span text:style-name="Source_20_Text"><text:span text:style-name="T4">cdf</text:span></text:span><text:span text:style-name="T2">, </text:span><text:span text:style-name="Source_20_Text"><text:span text:style-name="T4">ppf</text:span></text:span><text:span text:style-name="T2">, </text:span><text:span text:style-name="Source_20_Text"><text:span text:style-name="T4">q05</text:span></text:span><text:span text:style-name="T2">, </text:span><text:span text:style-name="Source_20_Text"><text:span text:style-name="T4">q95</text:span></text:span><text:span text:style-name="T2">, </text:span><text:span text:style-name="Source_20_Text"><text:span text:style-name="T4">VaR</text:span></text:span><text:span text:style-name="T2">, </text:span><text:span text:style-name="Source_20_Text"><text:span text:style-name="T4">fat tails</text:span></text:span><text:span text:style-name="T2">, y cómo leer cada uno sin equivocarte.</text:span></text:p>
        <text:p text:style-name="P97"><draw:frame draw:style-name="fr1" draw:name="Frame17" text:anchor-type="char" svg:width="0.041cm" draw:z-index="17"><draw:text-box fo:min-height="0.041cm"><text:p text:style-name="P14"><text:line-break/></text:p></draw:text-box></draw:frame><draw:frame draw:style-name="fr4" draw:name="Image2" text:anchor-type="as-char" svg:width="12.674cm" svg:height="3.387cm" draw:z-index="18"><draw:image xlink:href="https://chatgpt.com/backend-api/estuary/content?id=file_000000006a2c720cb4419aae7719e72b&amp;ts=494097&amp;p=fs&amp;cid=1&amp;sig=590bc044068a22697ef708c9deb7d890ba6cf49e4620282c4b3e0350fcf14f4a&amp;v=0" xlink:type="simple" xlink:show="embed" xlink:actuate="onLoad"/><svg:title>image.png</svg:title></draw:frame></text:p>
        <text:p text:style-name="P97"><draw:frame draw:style-name="fr4" draw:name="Image3" text:anchor-type="as-char" svg:width="54.187cm" svg:height="3.387cm" draw:z-index="19"><draw:image xlink:href="https://chatgpt.com/backend-api/estuary/content?id=file_000000001fdc71f58af5713e425fada7&amp;ts=494097&amp;p=fs&amp;cid=1&amp;sig=7abd32edb81a6151311af4ef69620c811ba7cd9d362e597a497b40497c5a36fa&amp;v=0" xlink:type="simple" xlink:show="embed" xlink:actuate="onLoad"/><svg:title>image.png</svg:title></draw:frame></text:p>
        <text:section text:style-name="Sect2" text:name="_r_ss_">
          <text:p text:style-name="P98">Explícame este vídeo, el primer vídeo y sobre todo esta parte. Creo que todo lo anterior lo he entendido, pero todo esto, pero esto del final me cuesta entenderlo.: ​In this video, ​we are going to discuss basic concepts about population and sample. ​Population is a group of individuals who have something in common. ​We may be interested in some properties about a certain group, ​which we call target population, that cannot be observed completely. ​For example, all registered voters in Thailand, or ​all Hong Kong citizens who played golf at least once past year, ​or all neurons from your brain. ​Since we cannot get information for every individual of these populations, ​we have to take sample, which is a part of target population. ​Sample is a small group of population. ​It is a <text:soft-page-break/>representative of the population, hence, it has to be randomly selected. ​This process is called random sampling. ​There are two kinds of sampling, called a sampling without replacement, or ​with replacement, depending on whether you put the select individuals ​back into population before you select the next one. ​In a sampling without replacement, ​an individual is randomly selected from the population. ​The next individual will be selected ​without putting the previous individual back. ​Every individual is selected from a different pool. ​If the population size is very large, this method is a factor ​because it can generate a random sample with different individuals. ​There is another kind of sampling method, sampling with replacement. ​A randomly selected individual will be put back ​before the next individual being selected. ​Hence, it is possible that the same individual can be selected more than once. ​When the population is small, this method can make sure that ​everyone in the population has the same chance being selected. ​In this example, we first create a blank DataFrame and ​we create a new column in this DataFrame. ​Name the column as Population. ​Then I run this python code to perform sampling from the population ​by drawing five individuals randomly without replacement. ​And stored them, as a_sample_without_replacement. ​In we can use method sample to get samples. ​Here, the key word replace=False ​means the sampling is a sampling without replacement. ​We can define replace True to perform sampling with replacement. ​Here are the results of two samples. ​You can see that for sampling without replacement, ​which is on the left-hand side, there are no duplicates individuals found. ​As we can see, there are no duplicate index numbers either. ​However, on the right-hand side, which is the sampling with replacement, ​it is possible to see the same individual is drawn for multiple times. ​Besides population sample, there is another pair of concepts, parameter and ​statistics, of which are very important in categorizing population and sample. ​Parameter is a characteristic or summary number of populations. ​Statistic is a characteristic or summary number of sample. ​For example, mean, ​variance, standard deviation of population are characteristics of population. ​Once target populations are fixed, these summary numbers will not change. ​Sample also has mean, variance, and standard deviation, ​but their values changes in different samples, ​even if they are drawn from the same population. ​Let's print out the parameters of population which we have just created. ​We can calculate the mean, variance, and the standard ​deviation using dataframe methods, .mean, .var, .std. ​The mathematic formulas for mean and variance are given. ​In calculating var and std, we set the keyword ddof as 0. ​Which means the <text:soft-page-break/>denominator of the population variance is N, ​which is the number of the population. ​The .shape, as described in the previous module, ​offers a size of the data frame in rows and columns. ​We use .shape(0) to display only the number of rows. ​Also, these methods can be applied to compute statistics of samples. ​First, let us get a sample with size 10 from population, using replacement. ​The sample and sample variance standard deviation are printed out. ​Notice that when we compute a sample variance and ​std, we need the ddof equal to 1. ​It means the denominator of a sample variance has to ​be n-1 instead of n, which is the sample size. ​To understand why the denominator of the sample variance is n-1, let ​us generate 500 samples, each sample with size equal to 50. ​We calculate sample variance for ​each sample using n and n-1 as denominators. ​You'll find that the real population variance is 571.8. ​As you can see, the average of sample variances using ​n-1 is closer to population variance than using n. ​The average of sample variance using n as denominator is always ​smaller than population variance, which is some mathematical reasons. ​n-1, in fact, is called degrees of freedom. ​For sample variance, there is another explanation why sample ​variance is divided by n-1, which is the degrees of freedom. ​Degrees of freedom is a number of values used in ​calculation that are free to variate. ​When we use the sample mean to compute the sample variance, ​we will lose one degree of freedom. ​For example, sample size equal to 3, ​sample mean equal to 100 is used in computing sample variance. ​We can choose two individuals independently, for example, ​90 and 80 in the table, but ​the third is not free to variate because of constraint of sample mean. ​The only choice for a third number is 130. ​When we compute the variance, ​using degrees of freedom is better than using sample size. ​In the sense that the average of estimator will be equal to population variance, ​which is called an unbiased estimator. ​In the next video, we will talk about distribution of sample statistics. </text:p>
        </text:section>
        <text:p text:style-name="P99"><draw:frame draw:style-name="fr1" draw:name="Frame18" text:anchor-type="char" svg:width="0.041cm" draw:z-index="20"><draw:text-box fo:min-height="0.041cm"><text:p text:style-name="P14"><text:line-break/></text:p></draw:text-box></draw:frame>Thought for 20s</text:p>
        <text:p text:style-name="P47">14/05/2026 11:17:50 CEST</text:p>
        <text:p text:style-name="P46"><text:span text:style-name="T2">Sí, tu duda tiene </text:span><text:span text:style-name="Strong_20_Emphasis"><text:span text:style-name="T3">todo el sentido</text:span></text:span><text:span text:style-name="T2">. Y la respuesta correcta es esta:</text:span></text:p>
        <text:list text:style-name="L72">
          <text:list-item>
            <text:p text:style-name="P134"><text:span text:style-name="Strong_20_Emphasis"><text:span text:style-name="T3">Si de verdad tienes toda la población y puedes usarla, entonces sí: calcula la media de todo y punto.</text:span></text:span><text:span text:style-name="T2"><text:line-break/>No necesitas inferencia (</text:span><text:span text:style-name="Source_20_Text"><text:span text:style-name="T4">inference</text:span></text:span><text:span text:style-name="T2"> = </text:span><text:span text:style-name="Strong_20_Emphasis"><text:span text:style-name="T3">inferencia</text:span></text:span><text:span text:style-name="T2">) para estimar la media de algo que ya </text:span><text:soft-page-break/><text:span text:style-name="T2">conoces completo. Ahí haces un </text:span><text:span text:style-name="Strong_20_Emphasis"><text:span text:style-name="T3">censo</text:span></text:span><text:span text:style-name="T2"> (</text:span><text:span text:style-name="Source_20_Text"><text:span text:style-name="T4">census</text:span></text:span><text:span text:style-name="T2"> = </text:span><text:span text:style-name="Strong_20_Emphasis"><text:span text:style-name="T3">censo</text:span></text:span><text:span text:style-name="T2">), no un muestreo.<text:line-break/></text:span><text:span text:style-name="Strong_20_Emphasis"><text:span text:style-name="T3">English summary:</text:span></text:span><text:span text:style-name="T2"> If you truly have the whole population [población completa], just compute the exact mean [media exacta]. Then you do a census [censo], not statistical inference [inferencia estadística].</text:span></text:p>
          </text:list-item>
          <text:list-item>
            <text:p text:style-name="P134"><text:span text:style-name="Strong_20_Emphasis"><text:span text:style-name="T3">Entonces, ¿por qué existe toda esta teoría? Porque casi nunca tienes la “población real” completa.</text:span></text:span><text:span text:style-name="T2"><text:line-break/>En estadística, muchas veces “población” no significa “una lista cerrada que ya tengo en disco”. Significa el conjunto total que querrías conocer, pero no observas entero.<text:line-break/>Ejemplos:</text:span></text:p>
          </text:list-item>
        </text:list>
        <text:list text:style-name="L73">
          <text:list-item>
            <text:p text:style-name="P135">todos los votantes de un país</text:p>
          </text:list-item>
          <text:list-item>
            <text:p text:style-name="P135">todos los futuros retornos posibles de una acción</text:p>
          </text:list-item>
          <text:list-item>
            <text:p text:style-name="P135">todos los clientes potenciales</text:p>
          </text:list-item>
          <text:list-item>
            <text:p text:style-name="P135">todos los errores posibles de un proceso</text:p>
          </text:list-item>
        </text:list>
        <text:p text:style-name="P46"><text:span text:style-name="T2">En finanzas esto es todavía más claro: tú no quieres solo la media de los </text:span><text:span text:style-name="Strong_20_Emphasis"><text:span text:style-name="T3">100 días pasados</text:span></text:span><text:span text:style-name="T2">; quieres inferir algo sobre el </text:span><text:span text:style-name="Strong_20_Emphasis"><text:span text:style-name="T3">proceso</text:span></text:span><text:span text:style-name="T2"> (</text:span><text:span text:style-name="Source_20_Text"><text:span text:style-name="T4">process</text:span></text:span><text:span text:style-name="T2"> = </text:span><text:span text:style-name="Strong_20_Emphasis"><text:span text:style-name="T3">proceso</text:span></text:span><text:span text:style-name="T2">) o sobre el comportamiento futuro. Los 100 días históricos son solo una muestra.<text:line-break/></text:span><text:span text:style-name="Strong_20_Emphasis"><text:span text:style-name="T3">English summary:</text:span></text:span><text:span text:style-name="T2"> Statistical theory matters because the real population [población real] is usually not fully observed [no observada por completo]. In finance [finanzas], past data [datos pasados] are only a sample [muestra] of an underlying process [proceso subyacente].</text:span></text:p>
        <text:list text:style-name="L74">
          <text:list-item>
            <text:p text:style-name="P136"><text:span text:style-name="Strong_20_Emphasis"><text:span text:style-name="T3">Lo de coger muchas muestras de 100 no es, en general, “el método operativo real”. Es una idea teórica para entender el error.</text:span></text:span><text:span text:style-name="T2"><text:line-break/>Esto es lo más importante.<text:line-break/>Cuando el curso dice:</text:span></text:p>
          </text:list-item>
        </text:list>
        <text:list text:style-name="L75">
          <text:list-item>
            <text:p text:style-name="P137">cogemos muchas muestras</text:p>
          </text:list-item>
          <text:list-item>
            <text:p text:style-name="P137"><text:soft-page-break/>calculamos muchas medias muestrales</text:p>
          </text:list-item>
          <text:list-item>
            <text:p text:style-name="P137">miramos su distribución</text:p>
          </text:list-item>
        </text:list>
        <text:p text:style-name="P46"><text:span text:style-name="T2">normalmente </text:span><text:span text:style-name="Strong_20_Emphasis"><text:span text:style-name="T3">no quiere decir</text:span></text:span><text:span text:style-name="T2"> que en la vida real vayas a estar cogiendo 100, luego otras 100, luego otras 100, y usando cada una por separado como sistema de trabajo.<text:line-break/>Lo que quieren enseñarte es:</text:span></text:p>
        <text:p text:style-name="P112">“<text:span text:style-name="T30">Si yo pudiera repetir el muestreo muchas veces, ¿cómo de variable sería mi estimación?”</text:span></text:p>
        <text:p text:style-name="P46"><text:span text:style-name="T2">Eso sirve para medir la </text:span><text:span text:style-name="Strong_20_Emphasis"><text:span text:style-name="T3">incertidumbre</text:span></text:span><text:span text:style-name="T2"> (</text:span><text:span text:style-name="Source_20_Text"><text:span text:style-name="T4">uncertainty</text:span></text:span><text:span text:style-name="T2"> = </text:span><text:span text:style-name="Strong_20_Emphasis"><text:span text:style-name="T3">incertidumbre</text:span></text:span><text:span text:style-name="T2">) de una media muestral.<text:line-break/></text:span><text:span text:style-name="Strong_20_Emphasis"><text:span text:style-name="T3">English summary:</text:span></text:span><text:span text:style-name="T2"> Repeated sampling [muestreo repetido] is mainly a theoretical device [recurso teórico] to understand estimator variability [variabilidad del estimador], not usually the literal workflow [flujo de trabajo literal].</text:span></text:p>
        <text:list text:style-name="L76">
          <text:list-item>
            <text:p text:style-name="P138"><text:span text:style-name="Strong_20_Emphasis"><text:span text:style-name="T3">En la práctica, si puedes recoger más datos útiles, normalmente los juntas.</text:span></text:span><text:span text:style-name="T2"><text:line-break/>Aquí tu intuición es correcta.<text:line-break/>Si has recogido 100 observaciones y luego otras 100 compatibles, lo normal es que:</text:span></text:p>
          </text:list-item>
        </text:list>
        <text:list text:style-name="L77">
          <text:list-item>
            <text:p text:style-name="P139">acabes usando 200</text:p>
          </text:list-item>
          <text:list-item>
            <text:p text:style-name="P139">no te quedes con dos medias separadas, salvo que tengas un motivo especial</text:p>
          </text:list-item>
        </text:list>
        <text:p text:style-name="P46"><text:span text:style-name="T2">Y si luego consigues 1.000 o 2.000, mejor todavía, porque la estimación suele ser más estable.<text:line-break/>O sea:<text:line-break/></text:span><text:span text:style-name="Strong_20_Emphasis"><text:span text:style-name="T3">para estimar mejor, más datos suele ser mejor</text:span></text:span><text:span text:style-name="T2">.<text:line-break/>Tu crítica aquí es válida: no tendría sentido práctico quedarse eternamente en bloques aislados de 100 si puedes consolidarlos.<text:line-break/></text:span><text:span text:style-name="Strong_20_Emphasis"><text:span text:style-name="T3">English summary:</text:span></text:span><text:span text:style-name="T2"> In practice [en la práctica], if more compatible data [datos </text:span><text:soft-page-break/><text:span text:style-name="T2">compatibles] are available, you usually combine them [combinarlos] to get a more stable estimate [estimación más estable].</text:span></text:p>
        <text:list text:style-name="L78">
          <text:list-item>
            <text:p text:style-name="P140"><text:span text:style-name="Strong_20_Emphasis"><text:span text:style-name="T3">Entonces, ¿qué sentido práctico tiene estudiar muchas muestras pequeñas?</text:span></text:span><text:span text:style-name="T2"><text:line-break/>Tiene varios:</text:span></text:p>
          </text:list-item>
        </text:list>
        <text:list text:style-name="L79">
          <text:list-item>
            <text:p text:style-name="P141">para entender cuánto “baila” una estimación</text:p>
          </text:list-item>
          <text:list-item>
            <text:p text:style-name="P141">para saber si una media observada es creíble o puede ser puro azar</text:p>
          </text:list-item>
          <text:list-item>
            <text:p text:style-name="P142"><text:span text:style-name="T2">para construir intervalos de confianza (</text:span><text:span text:style-name="Source_20_Text"><text:span text:style-name="T4">confidence intervals</text:span></text:span><text:span text:style-name="T2"> = </text:span><text:span text:style-name="Strong_20_Emphasis"><text:span text:style-name="T3">intervalos de confianza</text:span></text:span><text:span text:style-name="T2">)</text:span></text:p>
          </text:list-item>
          <text:list-item>
            <text:p text:style-name="P142"><text:span text:style-name="T2">para hacer contrastes de hipótesis (</text:span><text:span text:style-name="Source_20_Text"><text:span text:style-name="T4">hypothesis tests</text:span></text:span><text:span text:style-name="T2"> = </text:span><text:span text:style-name="Strong_20_Emphasis"><text:span text:style-name="T3">contrastes de hipótesis</text:span></text:span><text:span text:style-name="T2">)</text:span></text:p>
          </text:list-item>
          <text:list-item>
            <text:p text:style-name="P141">para entender por qué una muestra de 1.000 es mejor que una de 30</text:p>
          </text:list-item>
        </text:list>
        <text:p text:style-name="P46"><text:span text:style-name="T2">No es tanto “así trabajarás siempre”, sino “así entiendes qué fiabilidad tiene lo que calculas”.<text:line-break/></text:span><text:span text:style-name="Strong_20_Emphasis"><text:span text:style-name="T3">English summary:</text:span></text:span><text:span text:style-name="T2"> The practical value [utilidad práctica] of studying many samples [muchas muestras] is to quantify estimation error [error de estimación], build confidence intervals [intervalos de confianza], and test claims [contrastar afirmaciones].</text:span></text:p>
        <text:list text:style-name="L80">
          <text:list-item>
            <text:p text:style-name="P143"><text:span text:style-name="Strong_20_Emphasis"><text:span text:style-name="T3">Tu vocabulario sí está bien: media muestral, varianza muestral, desviación típica muestral.</text:span></text:span><text:span text:style-name="T2"><text:line-break/>Sí:</text:span></text:p>
          </text:list-item>
        </text:list>
        <text:list text:style-name="L81">
          <text:list-item>
            <text:p text:style-name="P144"><text:span text:style-name="Strong_20_Emphasis"><text:span text:style-name="T3">sample mean</text:span></text:span><text:span text:style-name="T2"> = </text:span><text:span text:style-name="Strong_20_Emphasis"><text:span text:style-name="T3">media muestral</text:span></text:span></text:p>
          </text:list-item>
          <text:list-item>
            <text:p text:style-name="P144"><text:span text:style-name="Strong_20_Emphasis"><text:span text:style-name="T3">sample variance</text:span></text:span><text:span text:style-name="T2"> = </text:span><text:span text:style-name="Strong_20_Emphasis"><text:span text:style-name="T3">varianza muestral</text:span></text:span></text:p>
          </text:list-item>
          <text:list-item>
            <text:p text:style-name="P144"><text:span text:style-name="Strong_20_Emphasis"><text:span text:style-name="T3">sample standard deviation</text:span></text:span><text:span text:style-name="T2"> = </text:span><text:span text:style-name="Strong_20_Emphasis"><text:span text:style-name="T3">desviación típica muestral</text:span></text:span><text:span text:style-name="T2"> o </text:span><text:span text:style-name="Strong_20_Emphasis"><text:span text:style-name="T3">desviación estándar muestral</text:span></text:span></text:p>
          </text:list-item>
        </text:list>
        <text:p text:style-name="P46"><text:span text:style-name="T2">Eso está bien dicho.<text:line-break/></text:span><text:span text:style-name="Strong_20_Emphasis"><text:span text:style-name="T3">English summary:</text:span></text:span><text:span text:style-name="T2"> Your terminology [terminología] is correct: sample mean [media </text:span><text:soft-page-break/><text:span text:style-name="T2">muestral], sample variance [varianza muestral], and sample standard deviation [desviación típica muestral].</text:span></text:p>
        <text:list text:style-name="L82">
          <text:list-item>
            <text:p text:style-name="P145"><text:span text:style-name="Strong_20_Emphasis"><text:span text:style-name="T3">La clave práctica real es esta: tú normalmente solo ves una muestra, pero necesitas saber cómo se comportaría tu estimación si repitieras el muestreo.</text:span></text:span><text:span text:style-name="T2"><text:line-break/>Ese es el núcleo de todo.</text:span></text:p>
          </text:list-item>
        </text:list>
        <text:p text:style-name="P47">No puedes viajar a universos paralelos y sacar 10.000 muestras reales.<text:line-break/>Así que la estadística construye una teoría sobre:</text:p>
        <text:list text:style-name="L83">
          <text:list-item>
            <text:p text:style-name="P146">cómo variaría la media muestral</text:p>
          </text:list-item>
          <text:list-item>
            <text:p text:style-name="P146">cuál sería su distribución</text:p>
          </text:list-item>
          <text:list-item>
            <text:p text:style-name="P146">cuánto error típico tiene</text:p>
          </text:list-item>
        </text:list>
        <text:p text:style-name="P47">Eso te permite decir cosas como:</text:p>
        <text:list text:style-name="L84">
          <text:list-item>
            <text:p text:style-name="P147">“<text:span text:style-name="T26">mi media observada es 0.8, pero con este error estándar”</text:span></text:p>
          </text:list-item>
          <text:list-item>
            <text:p text:style-name="P147">“<text:span text:style-name="T26">este resultado parece significativo”</text:span></text:p>
          </text:list-item>
          <text:list-item>
            <text:p text:style-name="P147">“<text:span text:style-name="T26">esta diferencia podría ser ruido”</text:span></text:p>
          </text:list-item>
        </text:list>
        <text:p text:style-name="P46"><text:span text:style-name="Strong_20_Emphasis"><text:span text:style-name="T3">English summary:</text:span></text:span><text:span text:style-name="T2"> In reality [en realidad], you usually have one sample [una muestra], but statistics models how your estimator [estimador] would behave across repeated samples [muestras repetidas].</text:span></text:p>
        <text:list text:style-name="L85">
          <text:list-item>
            <text:p text:style-name="P148"><text:span text:style-name="Strong_20_Emphasis"><text:span text:style-name="T3">En bolsa/retornos, además, la “población” no es simplemente todos los días pasados.</text:span></text:span><text:span text:style-name="T2"><text:line-break/>Esto es crucial para que te encaje.</text:span></text:p>
          </text:list-item>
        </text:list>
        <text:p text:style-name="P47">Si tienes 1.000 retornos pasados, claro que puedes calcular su media exacta.<text:line-break/>Pero eso solo te da:</text:p>
        <text:list text:style-name="L86">
          <text:list-item>
            <text:p text:style-name="P149"><text:span text:style-name="T2">la media de </text:span><text:span text:style-name="Strong_20_Emphasis"><text:span text:style-name="T3">esos 1.000 días pasados</text:span></text:span></text:p>
          </text:list-item>
        </text:list>
        <text:p text:style-name="P47">Lo que suele interesarte de verdad es:</text:p>
        <text:list text:style-name="L87">
          <text:list-item>
            <text:p text:style-name="P150"><text:soft-page-break/>la media del proceso generador de retornos</text:p>
          </text:list-item>
          <text:list-item>
            <text:p text:style-name="P151"><text:span text:style-name="T2">o si el activo tiene una deriva positiva real (</text:span><text:span text:style-name="Source_20_Text"><text:span text:style-name="T4">positive drift</text:span></text:span><text:span text:style-name="T2"> = </text:span><text:span text:style-name="Strong_20_Emphasis"><text:span text:style-name="T3">deriva positiva real</text:span></text:span><text:span text:style-name="T2">)</text:span></text:p>
          </text:list-item>
          <text:list-item>
            <text:p text:style-name="P150">o qué puedes esperar en el futuro</text:p>
          </text:list-item>
        </text:list>
        <text:p text:style-name="P46"><text:span text:style-name="T2">Ahí los 1.000 días pasados actúan como muestra, no como verdad total del fenómeno.<text:line-break/></text:span><text:span text:style-name="Strong_20_Emphasis"><text:span text:style-name="T3">English summary:</text:span></text:span><text:span text:style-name="T2"> In finance [finanzas], historical returns [retornos históricos] are often treated as a sample [muestra] from an underlying return process [proceso subyacente de retornos], not as the full truth [verdad completa].</text:span></text:p>
        <text:list text:style-name="L88">
          <text:list-item>
            <text:p text:style-name="P152"><text:span text:style-name="Strong_20_Emphasis"><text:span text:style-name="T3">Versión simple y brutalmente práctica:</text:span></text:span></text:p>
          </text:list-item>
        </text:list>
        <text:list text:style-name="L89">
          <text:list-item>
            <text:p text:style-name="P153">Si tienes todo lo que te interesa conocer, calcula todo y se acabó.</text:p>
          </text:list-item>
          <text:list-item>
            <text:p text:style-name="P153">Si no lo tienes, usas una muestra.</text:p>
          </text:list-item>
          <text:list-item>
            <text:p text:style-name="P153">Y si usas una muestra, necesitas saber cuánto puede equivocarse esa muestra.</text:p>
          </text:list-item>
        </text:list>
        <text:p text:style-name="P46"><text:span text:style-name="T2">Eso es exactamente para lo que sirve todo este bloque del curso.<text:line-break/></text:span><text:span text:style-name="Strong_20_Emphasis"><text:span text:style-name="T3">English summary:</text:span></text:span><text:span text:style-name="T2"> The blunt practical rule [regla práctica] is: if you have the full target [objetivo completo], compute it directly [directamente]; if not, use a sample [muestra] and quantify its error [cuantificar su error].</text:span></text:p>
        <text:list text:style-name="L90">
          <text:list-item>
            <text:p text:style-name="P154"><text:span text:style-name="Strong_20_Emphasis"><text:span text:style-name="T3">Tu intuición final correcta sería esta:</text:span></text:span></text:p>
          </text:list-item>
        </text:list>
        <text:p text:style-name="P112">“<text:span text:style-name="T30">Lo de muchas muestras no es porque yo vaya a trabajar siempre así, sino porque la estadística necesita modelar cuánto variaría mi estimación si pudiera repetir el experimento muchas veces.”</text:span></text:p>
        <text:p text:style-name="P46"><text:span text:style-name="T2">Esa frase sí es correcta.<text:line-break/></text:span><text:span text:style-name="Strong_20_Emphasis"><text:span text:style-name="T3">English summary:</text:span></text:span><text:span text:style-name="T2"> The correct intuition [intuición correcta] is that repeated sampling [muestreo repetido] is used to model estimator uncertainty [incertidumbre del estimador], not because that is always the literal data-collection procedure [procedimiento literal de recogida de datos].</text:span></text:p>
        <text:p text:style-name="P49">Mañana, cuando sigas, lo más útil es que distingas muy bien estas dos preguntas:</text:p>
        <text:list text:style-name="L91">
          <text:list-item>
            <text:p text:style-name="P155"><text:soft-page-break/><text:span text:style-name="Strong_20_Emphasis"><text:span text:style-name="T3">¿cuál es la media de los datos que tengo?</text:span></text:span></text:p>
          </text:list-item>
          <text:list-item>
            <text:p text:style-name="P155"><text:span text:style-name="Strong_20_Emphasis"><text:span text:style-name="T3">¿qué me permite inferir esa media sobre la población o el proceso real?</text:span></text:span></text:p>
          </text:list-item>
        </text:list>
        <text:section text:style-name="Sect2" text:name="_r_t8_">
          <text:p text:style-name="P156">DIces que: La fórmula importante que debes recordar Si la población tiene desviación típica σ, entonces la media muestral tiene desviación típica: n ​ σ ​ A eso se le suele llamar standard error (error estándar) de la media. Cuanto mayor es n, menor es el error estándar. English summary: The key formula is the standard error [error estándar]: sigma / sqrt(n). Larger sample size [tamaño muestral] means less variability [variabilidad] in the sample mean. Explicame esto pero resumido y al grano con dos ejemplos resumidos también</text:p>
        </text:section>
        <text:p text:style-name="P99"><draw:frame draw:style-name="fr1" draw:name="Frame19" text:anchor-type="char" svg:width="0.041cm" draw:z-index="21"><draw:text-box fo:min-height="0.041cm"><text:p text:style-name="P14"><text:line-break/></text:p></draw:text-box></draw:frame><draw:frame draw:style-name="fr1" draw:name="Frame20" text:anchor-type="char" svg:width="0.041cm" draw:z-index="22"><draw:text-box fo:min-height="0.041cm"><text:p text:style-name="P14"><text:line-break/></text:p></draw:text-box></draw:frame>Thought for 11s</text:p>
        <text:p text:style-name="P47">14/05/2026 13:33:24 CEST</text:p>
        <text:p text:style-name="P49">Sí. La idea es esta:</text:p>
        <text:list text:style-name="L92">
          <text:list-item>
            <text:p text:style-name="P157"><text:span text:style-name="Strong_20_Emphasis"><text:span text:style-name="T3">Qué significa</text:span></text:span><text:span text:style-name="T2"><text:line-break/>La media de una muestra de tamaño </text:span><text:span text:style-name="Source_20_Text"><text:span text:style-name="T4">n</text:span></text:span><text:span text:style-name="T2"> </text:span><text:span text:style-name="Strong_20_Emphasis"><text:span text:style-name="T3">varía menos</text:span></text:span><text:span text:style-name="T2"> que los datos individuales.<text:line-break/>Su desviación típica es:</text:span></text:p>
          </text:list-item>
        </text:list>
        <text:p text:style-name="P50"><draw:frame draw:style-name="fr2" draw:name="Frame21" text:anchor-type="char" svg:width="0.041cm" draw:z-index="23"><draw:text-box fo:min-height="0.041cm"><text:p text:style-name="P14">σn</text:p></draw:text-box></draw:frame><text:span text:style-name="T15">n</text:span>​<text:span text:style-name="T15">σ</text:span>​</text:p>
        <text:list text:style-name="L93">
          <text:list-item>
            <text:p text:style-name="P158"><text:span text:style-name="Source_20_Text"><text:span text:style-name="T4">σ</text:span></text:span><text:span text:style-name="T2"> = desviación típica de la población</text:span></text:p>
          </text:list-item>
          <text:list-item>
            <text:p text:style-name="P158"><text:span text:style-name="Source_20_Text"><text:span text:style-name="T4">n</text:span></text:span><text:span text:style-name="T2"> = tamaño de la muestra</text:span></text:p>
          </text:list-item>
          <text:list-item>
            <text:p text:style-name="P158"><text:span text:style-name="Source_20_Text"><text:span text:style-name="T4">σ / √n</text:span></text:span><text:span text:style-name="T2"> = </text:span><text:span text:style-name="Strong_20_Emphasis"><text:span text:style-name="T3">standard error</text:span></text:span><text:span text:style-name="T2"> (</text:span><text:span text:style-name="Source_20_Text"><text:span text:style-name="T4">error estándar</text:span></text:span><text:span text:style-name="T2">) de la media</text:span></text:p>
          </text:list-item>
        </text:list>
        <text:p text:style-name="P46"><text:span text:style-name="T2">Cuanto mayor es </text:span><text:span text:style-name="Source_20_Text"><text:span text:style-name="T4">n</text:span></text:span><text:span text:style-name="T2">, más pequeña es esa variación.<text:line-break/>O sea: una media hecha con muchos datos es más estable [steady] que una hecha con pocos.</text:span></text:p>
        <text:p text:style-name="P46"><text:span text:style-name="Strong_20_Emphasis"><text:span text:style-name="T3">English summary:</text:span></text:span><text:span text:style-name="T2"> The sample mean varies less than individual data. Its standard deviation is </text:span><text:span text:style-name="Source_20_Text"><text:span text:style-name="T4">sigma / sqrt(n)</text:span></text:span><text:span text:style-name="T2">, called the standard error [error estándar].</text:span></text:p>
        <text:list text:style-name="L94">
          <text:list-item>
            <text:p text:style-name="P159"><text:span text:style-name="Strong_20_Emphasis"><text:span text:style-name="T3">Qué utilidad tiene</text:span></text:span><text:span text:style-name="T2"><text:line-break/>Sirve para saber </text:span><text:span text:style-name="Strong_20_Emphasis"><text:span text:style-name="T3">cuánto puede bailar</text:span></text:span><text:span text:style-name="T2"> [wobble] la media muestral si repites el muestreo.<text:line-break/>No te dice cuánto varían los datos, sino cuánto varía </text:span><text:span text:style-name="Strong_20_Emphasis"><text:span text:style-name="T3">la media</text:span></text:span><text:span text:style-name="T2"> de una muestra a otra.</text:span></text:p>
          </text:list-item>
        </text:list>
        <text:p text:style-name="P46"><text:soft-page-break/><text:span text:style-name="Strong_20_Emphasis"><text:span text:style-name="T3">English summary:</text:span></text:span><text:span text:style-name="T2"> It measures how much the sample mean can fluctuate [fluctuate] from sample to sample.</text:span></text:p>
        <text:list text:style-name="L95">
          <text:list-item>
            <text:p text:style-name="P160"><text:span text:style-name="Strong_20_Emphasis"><text:span text:style-name="T3">Ejemplo 1</text:span></text:span><text:span text:style-name="T2"><text:line-break/>Si </text:span><text:span text:style-name="Source_20_Text"><text:span text:style-name="T4">σ = 10</text:span></text:span><text:span text:style-name="T2"> y </text:span><text:span text:style-name="Source_20_Text"><text:span text:style-name="T4">n = 4</text:span></text:span><text:span text:style-name="T2">:</text:span></text:p>
          </text:list-item>
        </text:list>
        <text:p text:style-name="P52"><draw:frame draw:style-name="fr2" draw:name="Frame22" text:anchor-type="char" svg:width="0.041cm" draw:z-index="26"><draw:text-box fo:min-height="0.041cm"><text:p text:style-name="P14">104=102=5</text:p></draw:text-box></draw:frame>4​10​=210​=5</text:p>
        <text:p text:style-name="P47">La media muestral tiene desviación típica 5.<text:line-break/>Todavía baila bastante.</text:p>
        <text:p text:style-name="P46"><text:span text:style-name="Strong_20_Emphasis"><text:span text:style-name="T3">English summary:</text:span></text:span><text:span text:style-name="T2"> With </text:span><text:span text:style-name="Source_20_Text"><text:span text:style-name="T4">sigma = 10</text:span></text:span><text:span text:style-name="T2"> and </text:span><text:span text:style-name="Source_20_Text"><text:span text:style-name="T4">n = 4</text:span></text:span><text:span text:style-name="T2">, the standard error is 5, so the sample mean is still quite variable.</text:span></text:p>
        <text:list text:style-name="L96">
          <text:list-item>
            <text:p text:style-name="P161"><text:span text:style-name="Strong_20_Emphasis"><text:span text:style-name="T3">Ejemplo 2</text:span></text:span><text:span text:style-name="T2"><text:line-break/>Si </text:span><text:span text:style-name="Source_20_Text"><text:span text:style-name="T4">σ = 10</text:span></text:span><text:span text:style-name="T2"> y </text:span><text:span text:style-name="Source_20_Text"><text:span text:style-name="T4">n = 100</text:span></text:span><text:span text:style-name="T2">:</text:span></text:p>
          </text:list-item>
        </text:list>
        <text:p text:style-name="P52"><draw:frame draw:style-name="fr2" draw:name="Frame23" text:anchor-type="char" svg:width="0.041cm" draw:z-index="25"><draw:text-box fo:min-height="0.041cm"><text:p text:style-name="P14">10100=1010=1</text:p></draw:text-box></draw:frame>100​10​=1010​=1</text:p>
        <text:p text:style-name="P47">Ahora la media muestral tiene desviación típica 1.<text:line-break/>Mucho más estable.</text:p>
        <text:p text:style-name="P46"><text:span text:style-name="Strong_20_Emphasis"><text:span text:style-name="T3">English summary:</text:span></text:span><text:span text:style-name="T2"> With </text:span><text:span text:style-name="Source_20_Text"><text:span text:style-name="T4">sigma = 10</text:span></text:span><text:span text:style-name="T2"> and </text:span><text:span text:style-name="Source_20_Text"><text:span text:style-name="T4">n = 100</text:span></text:span><text:span text:style-name="T2">, the standard error is 1, so the sample mean is much more stable.</text:span></text:p>
        <text:list text:style-name="L97">
          <text:list-item>
            <text:p text:style-name="P162"><text:span text:style-name="Strong_20_Emphasis"><text:span text:style-name="T3">Frase para quedarte</text:span></text:span><text:span text:style-name="T2"><text:line-break/>Más muestra → menos error estándar → media muestral más fiable [reliable].</text:span></text:p>
          </text:list-item>
        </text:list>
        <text:p text:style-name="P46"><text:span text:style-name="Strong_20_Emphasis"><text:span text:style-name="T3">English summary:</text:span></text:span><text:span text:style-name="T2"> Bigger sample [muestra más grande] means smaller standard error [error estándar] and a more reliable sample mean [media muestral].</text:span></text:p>
        <text:p text:style-name="P163"><draw:frame draw:style-name="fr1" draw:name="Frame24" text:anchor-type="char" svg:width="0.041cm" draw:z-index="24"><draw:text-box fo:min-height="0.041cm"><text:p text:style-name="P14"><text:line-break/></text:p></draw:text-box></draw:frame><draw:frame draw:style-name="fr4" draw:name="Image4" text:anchor-type="as-char" svg:width="3.387cm" svg:height="3.387cm" draw:z-index="27"><draw:image xlink:href="https://chatgpt.com/backend-api/estuary/content?id=file_00000000194471f6a1401e6238f74f04&amp;ts=494104&amp;p=fs&amp;cid=1&amp;sig=cb284b2444d65f698e6b50604d7c148092db144ccc0239d734c8ac260f2489da&amp;v=0" xlink:type="simple" xlink:show="embed" xlink:actuate="onLoad"/><svg:title>image.png</svg:title></draw:frame></text:p>
        <text:p text:style-name="P163"><text:soft-page-break/><draw:frame draw:style-name="fr3" draw:name="Image5" text:anchor-type="as-char" svg:width="3.387cm" svg:height="3.387cm" draw:z-index="28"><draw:image xlink:href="https://chatgpt.com/backend-api/estuary/content?id=file_00000000fb0071f698614e62e348b3db&amp;ts=494104&amp;p=fs&amp;cid=1&amp;sig=ae681d42c0bc49b6669a911895cde02706f84cc04ab301877cbe67aa6d40f21a&amp;v=0" xlink:type="simple" xlink:show="embed" xlink:actuate="onLoad"/><svg:title>image.png</svg:title></draw:frame></text:p>
        <text:p text:style-name="P163"><draw:frame draw:style-name="fr4" draw:name="Image6" text:anchor-type="as-char" svg:width="3.387cm" svg:height="3.387cm" draw:z-index="29"><draw:image xlink:href="https://chatgpt.com/backend-api/estuary/content?id=file_00000000e05471f68a0ae0a357e5cbf3&amp;ts=494104&amp;p=fs&amp;cid=1&amp;sig=19df3a8733cadb8167efc1b8c65f7f4f7483d90769551b4471d45b7157c24f71&amp;v=0" xlink:type="simple" xlink:show="embed" xlink:actuate="onLoad"/><svg:title>image.png</svg:title></draw:frame></text:p>
        <text:p text:style-name="P163"><draw:frame draw:style-name="fr4" draw:name="Image7" text:anchor-type="as-char" svg:width="3.387cm" svg:height="3.387cm" draw:z-index="30"><draw:image xlink:href="https://chatgpt.com/backend-api/estuary/content?id=file_00000000b07471f6b4914847407038a9&amp;ts=494104&amp;p=fs&amp;cid=1&amp;sig=1328ad68f0be83e1b4e979804b2919e8df9d9fd46741974a6d043aed1762f99d&amp;v=0" xlink:type="simple" xlink:show="embed" xlink:actuate="onLoad"/><svg:title>image.png</svg:title></draw:frame></text:p>
        <text:p text:style-name="P163"><draw:frame draw:style-name="fr3" draw:name="Image8" text:anchor-type="as-char" svg:width="3.387cm" svg:height="3.387cm" draw:z-index="31"><draw:image xlink:href="https://chatgpt.com/backend-api/estuary/content?id=file_0000000010c071f694db3780f97645ef&amp;ts=494104&amp;p=fs&amp;cid=1&amp;sig=f85bdb651c4338ee75c8b8195e78536a2651eb414840a6139f4a4e736805b023&amp;v=0" xlink:type="simple" xlink:show="embed" xlink:actuate="onLoad"/><svg:title>image.png</svg:title></draw:frame></text:p>
        <text:p text:style-name="P163"><draw:frame draw:style-name="fr4" draw:name="Image9" text:anchor-type="as-char" svg:width="3.387cm" svg:height="3.387cm" draw:z-index="32"><draw:image xlink:href="https://chatgpt.com/backend-api/estuary/content?id=file_00000000571c722fbb51e195726d1eb1&amp;ts=494104&amp;p=fs&amp;cid=1&amp;sig=7241e04f2a3f2696a588933fa2b8de3fb71a1f4afb50500b974c860d1db3d7da&amp;v=0" xlink:type="simple" xlink:show="embed" xlink:actuate="onLoad"/><svg:title>image.png</svg:title></draw:frame></text:p>
        <text:section text:style-name="Sect2" text:name="_r_u6_">
          <text:p text:style-name="P98">Vale, más o menos he entendido el vídeo ahora que me lo has explicado y que lo he vuelto a ver, pero hay un par de cosas que no termino de entender. Vamos a ver. Lo primero, el código ese que está haciendo. no termino de entenderlo, a ver. O sea, pd.DataFrame, np.random.normal, esa línea que es igual a, o sea, sample es igual a todo eso. ¿Eso qué hace? ¿Genera una lista de valores aleatorios con una característica normal de un tamaño de 30? ¿Hace eso? ¿O sea, una lista con 30 elementos cuya lista se asemeja a una normal? Y por cada... Si tu sample 0 coge toda esa lista y calcula la media, porque no tiene sentido coger el primer elemento y calcula la media de un solo elemento. Entonces, cuando se calcula el histograma, ¿qué es hist? ¿Qué es el histograma? El <text:soft-page-break/>histograma qué es? O sea, los valores reales. Bins 500, ¿qué significa eso de Bins 500? o sea, Bins 500 será como dividirlo en 500 partes. Normed 1, ¿eso qué es? ¿Normalizado a 1? Ese en el tercer gráfico, que dice que sí, que se parece a una distribución normal simétrica. Sin embargo, dice que The histogram of sample variance is not normal as you can see it is right skewed, es decir, el histograma de la varianza de muestras, o sea, de todas las muestras, se hace un histograma, pero el histograma, ¿qué es? Una gráfica con los valores y ya está. Eso es un histograma. y ahí se ve que las varianzas no dibujan exactamente una normal, sino que es un poco... Bueno, dice right skewed, ¿eso significa sesgada a la derecha? ¿qué significa sesgada a la derecha? Yo por lo que veo es que hay más valores a la derecha que a la izquierda de la campana. Luego en la siguiente imagen dice Population is normal. N donde N, N no era todos los valores que hay en una población. ¿Y por qué pone N, mu y luego desviación al cuadrado, es decir, la varianza? Pero bueno, aunque no entienda bien esa fórmula, N mu varianza, sample mil y esa normal. O sea, que la media de muestras también es normal. y luego en la otra imagen, no, no entiendo muy bien esta imagen, la verdad. PDataFrame normal 10, 5, 6, 100.000. ¿Esto qué hace? Lo de antes. O sea, crea una lista con 100.000 elementos que dibujan una normal. y luego dibuja el histograma?</text:p>
        </text:section>
        <text:p text:style-name="P99"><draw:frame draw:style-name="fr1" draw:name="Frame25" text:anchor-type="char" svg:width="0.041cm" draw:z-index="33"><draw:text-box fo:min-height="0.041cm"><text:p text:style-name="P14"><text:line-break/></text:p></draw:text-box></draw:frame>Thought for 31s</text:p>
        <text:p text:style-name="P47">14/05/2026 18:49:27 CEST</text:p>
        <text:p text:style-name="P46"><text:span text:style-name="T2">Sí. Lo que te falta aquí es </text:span><text:span text:style-name="Strong_20_Emphasis"><text:span text:style-name="T3">entender exactamente qué objeto crea cada línea</text:span></text:span><text:span text:style-name="T2"> y </text:span><text:span text:style-name="Strong_20_Emphasis"><text:span text:style-name="T3">qué dibuja cada histograma</text:span></text:span><text:span text:style-name="T2">. Voy al grano.</text:span></text:p>
        <text:h text:style-name="P100" text:outline-level="2"><text:span text:style-name="T28">1) Esta línea: </text:span><text:span text:style-name="Source_20_Text"><text:span text:style-name="T31">sample = pd.DataFrame(np.random.normal(10, 5, size=30))</text:span></text:span></text:h>
        <text:section text:style-name="Sect3" text:name="Section19">
          <text:p text:style-name="P55"><text:bookmark text:name="code-block-viewer Copy 27"/><text:span text:style-name="Source_20_Text"><text:span text:style-name="T7">sample</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pd</text:span></text:span><text:span text:style-name="Source_20_Text"><text:span text:style-name="T5">.</text:span></text:span><text:span text:style-name="Source_20_Text"><text:span text:style-name="T6">DataFrame(</text:span></text:span><text:span text:style-name="Source_20_Text"><text:span text:style-name="T7">np</text:span></text:span><text:span text:style-name="Source_20_Text"><text:span text:style-name="T5">.</text:span></text:span><text:span text:style-name="Source_20_Text"><text:span text:style-name="T6">random</text:span></text:span><text:span text:style-name="Source_20_Text"><text:span text:style-name="T5">.</text:span></text:span><text:span text:style-name="Source_20_Text"><text:span text:style-name="T6">normal(</text:span></text:span><text:span text:style-name="Source_20_Text"><text:span text:style-name="T14">10</text:span></text:span><text:span text:style-name="Source_20_Text"><text:span text:style-name="T6">, </text:span></text:span><text:span text:style-name="Source_20_Text"><text:span text:style-name="T14">5</text:span></text:span><text:span text:style-name="Source_20_Text"><text:span text:style-name="T6">, </text:span></text:span><text:span text:style-name="Source_20_Text"><text:span text:style-name="T7">size</text:span></text:span><text:span text:style-name="Source_20_Text"><text:span text:style-name="T5">=</text:span></text:span><text:span text:style-name="Source_20_Text"><text:span text:style-name="T14">30</text:span></text:span><text:span text:style-name="Source_20_Text"><text:span text:style-name="T6">))</text:span></text:span></text:p>
        </text:section>
        <text:p text:style-name="P73">Hace esto:</text:p>
        <text:list text:style-name="L98">
          <text:list-item>
            <text:p text:style-name="P164"><text:span text:style-name="Source_20_Text"><text:span text:style-name="T4">np.random.normal(10, 5, size=30)</text:span></text:span><text:span text:style-name="T2"> genera </text:span><text:span text:style-name="Strong_20_Emphasis"><text:span text:style-name="T3">30 números aleatorios</text:span></text:span><text:span text:style-name="T2"> independientes</text:span></text:p>
          </text:list-item>
          <text:list-item>
            <text:p text:style-name="P164"><text:span text:style-name="T2">esos números vienen de una </text:span><text:span text:style-name="Strong_20_Emphasis"><text:span text:style-name="T3">Normal</text:span></text:span><text:span text:style-name="T2"> con:</text:span></text:p>
            <text:list>
              <text:list-item>
                <text:p text:style-name="P164"><text:span text:style-name="T2">media </text:span><text:span text:style-name="Source_20_Text"><text:span text:style-name="T4">10</text:span></text:span></text:p>
              </text:list-item>
              <text:list-item>
                <text:p text:style-name="P164"><text:span text:style-name="T2">desviación típica </text:span><text:span text:style-name="Source_20_Text"><text:span text:style-name="T4">5</text:span></text:span></text:p>
              </text:list-item>
            </text:list>
          </text:list-item>
          <text:list-item>
            <text:p text:style-name="P164"><text:soft-page-break/><text:span text:style-name="T2">luego </text:span><text:span text:style-name="Source_20_Text"><text:span text:style-name="T4">pd.DataFrame(...)</text:span></text:span><text:span text:style-name="T2"> mete esos 30 números en una tabla de pandas</text:span></text:p>
          </text:list-item>
        </text:list>
        <text:p text:style-name="P46"><text:span text:style-name="T2">O sea: </text:span><text:span text:style-name="Strong_20_Emphasis"><text:span text:style-name="T3">sí</text:span></text:span><text:span text:style-name="T2">, genera algo parecido a una “lista” de 30 valores aleatorios, pero técnicamente queda como </text:span><text:span text:style-name="Strong_20_Emphasis"><text:span text:style-name="T3">DataFrame de 30 filas y 1 columna</text:span></text:span><text:span text:style-name="T2">, no como lista.</text:span></text:p>
        <text:p text:style-name="P46"><text:span text:style-name="T2">Muy importante:<text:line-break/></text:span><text:span text:style-name="Strong_20_Emphasis"><text:span text:style-name="T3">no significa</text:span></text:span><text:span text:style-name="T2"> que “la lista de 30 ya dibuje una campana perfecta”.<text:line-break/>Solo significa que </text:span><text:span text:style-name="Strong_20_Emphasis"><text:span text:style-name="T3">cada dato</text:span></text:span><text:span text:style-name="T2"> ha sido sacado de esa distribución normal. Con solo 30 datos, la forma puede salir algo irregular [rough].</text:span></text:p>
        <text:p text:style-name="P46"><text:span text:style-name="Strong_20_Emphasis"><text:span text:style-name="T3">English summary:</text:span></text:span><text:span text:style-name="T2"> </text:span><text:span text:style-name="Source_20_Text"><text:span text:style-name="T4">np.random.normal(10, 5, size=30)</text:span></text:span><text:span text:style-name="T2"> generates 30 random draws [extracciones aleatorias] from a normal distribution [distribución normal], and </text:span><text:span text:style-name="Source_20_Text"><text:span text:style-name="T4">pd.DataFrame(...)</text:span></text:span><text:span text:style-name="T2"> stores them in a one-column table [tabla de una columna].</text:span></text:p>
        <text:p text:style-name="P53"/>
        <text:h text:style-name="P100" text:outline-level="2"><text:span text:style-name="T28">2) Entonces, ¿qué es </text:span><text:span text:style-name="Source_20_Text"><text:span text:style-name="T31">sample[0]</text:span></text:span><text:span text:style-name="T28">?</text:span></text:h>
        <text:p text:style-name="P46"><text:span text:style-name="T2">Como el DataFrame tiene una sola columna, pandas le pone por defecto el nombre </text:span><text:span text:style-name="Source_20_Text"><text:span text:style-name="T4">0</text:span></text:span><text:span text:style-name="T2">.</text:span></text:p>
        <text:p text:style-name="P49">Por eso:</text:p>
        <text:section text:style-name="Sect3" text:name="Section20">
          <text:p text:style-name="P55"><text:bookmark text:name="code-block-viewer Copy 28"/><text:span text:style-name="Source_20_Text"><text:span text:style-name="T7">sample</text:span></text:span><text:span text:style-name="Source_20_Text"><text:span text:style-name="T6">[</text:span></text:span><text:span text:style-name="Source_20_Text"><text:span text:style-name="T14">0</text:span></text:span><text:span text:style-name="Source_20_Text"><text:span text:style-name="T6">]</text:span></text:span></text:p>
        </text:section>
        <text:p text:style-name="P73">significa:</text:p>
        <text:list text:style-name="L99">
          <text:list-item>
            <text:p text:style-name="P165">“<text:span text:style-name="T26">coge la columna 0 del DataFrame”</text:span></text:p>
          </text:list-item>
        </text:list>
        <text:p text:style-name="P46"><text:span text:style-name="T2">No es el primer elemento.<text:line-break/>Es </text:span><text:span text:style-name="Strong_20_Emphasis"><text:span text:style-name="T3">toda la única columna</text:span></text:span><text:span text:style-name="T2">.</text:span></text:p>
        <text:p text:style-name="P49">Por eso esto sí tiene sentido:</text:p>
        <text:section text:style-name="Sect3" text:name="Section21">
          <text:p text:style-name="P55"><text:bookmark text:name="code-block-viewer Copy 29"/><text:span text:style-name="Source_20_Text"><text:span text:style-name="T7">sample</text:span></text:span><text:span text:style-name="Source_20_Text"><text:span text:style-name="T6">[</text:span></text:span><text:span text:style-name="Source_20_Text"><text:span text:style-name="T14">0</text:span></text:span><text:span text:style-name="Source_20_Text"><text:span text:style-name="T6">]</text:span></text:span><text:span text:style-name="Source_20_Text"><text:span text:style-name="T5">.</text:span></text:span><text:span text:style-name="Source_20_Text"><text:span text:style-name="T6">mean()</text:span></text:span></text:p>
        </text:section>
        <text:p text:style-name="P73">porque calcula la media de los 30 valores de esa columna.</text:p>
        <text:p text:style-name="P49">Y esto:</text:p>
        <text:section text:style-name="Sect3" text:name="Section22">
          <text:p text:style-name="P55"><text:bookmark text:name="code-block-viewer Copy 30"/><text:span text:style-name="Source_20_Text"><text:span text:style-name="T7">sample</text:span></text:span><text:span text:style-name="Source_20_Text"><text:span text:style-name="T6">[</text:span></text:span><text:span text:style-name="Source_20_Text"><text:span text:style-name="T14">0</text:span></text:span><text:span text:style-name="Source_20_Text"><text:span text:style-name="T6">]</text:span></text:span><text:span text:style-name="Source_20_Text"><text:span text:style-name="T5">.</text:span></text:span><text:span text:style-name="Source_20_Text"><text:span text:style-name="T6">var(</text:span></text:span><text:span text:style-name="Source_20_Text"><text:span text:style-name="T7">ddof</text:span></text:span><text:span text:style-name="Source_20_Text"><text:span text:style-name="T5">=</text:span></text:span><text:span text:style-name="Source_20_Text"><text:span text:style-name="T14">1</text:span></text:span><text:span text:style-name="Source_20_Text"><text:span text:style-name="T6">)</text:span></text:span></text:p>
        </text:section>
        <text:p text:style-name="P73"><text:soft-page-break/>calcula la varianza muestral de esos 30 valores.</text:p>
        <text:p text:style-name="P46"><text:span text:style-name="Strong_20_Emphasis"><text:span text:style-name="T3">English summary:</text:span></text:span><text:span text:style-name="T2"> </text:span><text:span text:style-name="Source_20_Text"><text:span text:style-name="T4">sample[0]</text:span></text:span><text:span text:style-name="T2"> is not the first value [primer valor]; it is the whole first column [columna completa], so </text:span><text:span text:style-name="Source_20_Text"><text:span text:style-name="T4">.mean()</text:span></text:span><text:span text:style-name="T2"> and </text:span><text:span text:style-name="Source_20_Text"><text:span text:style-name="T4">.var()</text:span></text:span><text:span text:style-name="T2"> are computed over all 30 observations [observaciones].</text:span></text:p>
        <text:p text:style-name="P53"/>
        <text:h text:style-name="P100" text:outline-level="2"><text:span text:style-name="T28">3) Qué hace el bucle </text:span><text:span text:style-name="Source_20_Text"><text:span text:style-name="T31">for t in range(1000):</text:span></text:span></text:h>
        <text:section text:style-name="Sect3" text:name="Section23">
          <text:p text:style-name="P55"><text:bookmark text:name="code-block-viewer Copy 31"/><text:span text:style-name="Source_20_Text"><text:span text:style-name="T7">meanlist</text:span></text:span><text:span text:style-name="Source_20_Text"><text:span text:style-name="T6"> </text:span></text:span><text:span text:style-name="Source_20_Text"><text:span text:style-name="T5">=</text:span></text:span><text:span text:style-name="Source_20_Text"><text:span text:style-name="T6"> []</text:span></text:span></text:p>
          <text:p text:style-name="P55"><text:span text:style-name="Source_20_Text"><text:span text:style-name="T10">varlist</text:span></text:span><text:span text:style-name="Source_20_Text"><text:span text:style-name="T9"> </text:span></text:span><text:span text:style-name="Source_20_Text"><text:span text:style-name="T8">=</text:span></text:span><text:span text:style-name="Source_20_Text"><text:span text:style-name="T9"> []</text:span></text:span></text:p>
          <text:p text:style-name="P55"><text:span text:style-name="Source_20_Text"><text:span text:style-name="T8">for</text:span></text:span><text:span text:style-name="Source_20_Text"><text:span text:style-name="T9"> </text:span></text:span><text:span text:style-name="Source_20_Text"><text:span text:style-name="T10">t</text:span></text:span><text:span text:style-name="Source_20_Text"><text:span text:style-name="T9"> </text:span></text:span><text:span text:style-name="Source_20_Text"><text:span text:style-name="T8">in</text:span></text:span><text:span text:style-name="Source_20_Text"><text:span text:style-name="T9"> </text:span></text:span><text:span text:style-name="Source_20_Text"><text:span text:style-name="T10">range</text:span></text:span><text:span text:style-name="Source_20_Text"><text:span text:style-name="T9">(</text:span></text:span><text:span text:style-name="Source_20_Text"><text:span text:style-name="T18">1000</text:span></text:span><text:span text:style-name="Source_20_Text"><text:span text:style-name="T9">):</text:span></text:span></text:p>
          <text:p text:style-name="P55"><text:span text:style-name="Source_20_Text"><text:span text:style-name="T32"><text:s text:c="4"/></text:span></text:span><text:span text:style-name="Source_20_Text"><text:span text:style-name="T10">sample</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pd</text:span></text:span><text:span text:style-name="Source_20_Text"><text:span text:style-name="T8">.</text:span></text:span><text:span text:style-name="Source_20_Text"><text:span text:style-name="T9">DataFrame(</text:span></text:span><text:span text:style-name="Source_20_Text"><text:span text:style-name="T10">np</text:span></text:span><text:span text:style-name="Source_20_Text"><text:span text:style-name="T8">.</text:span></text:span><text:span text:style-name="Source_20_Text"><text:span text:style-name="T9">random</text:span></text:span><text:span text:style-name="Source_20_Text"><text:span text:style-name="T8">.</text:span></text:span><text:span text:style-name="Source_20_Text"><text:span text:style-name="T9">normal(</text:span></text:span><text:span text:style-name="Source_20_Text"><text:span text:style-name="T18">10</text:span></text:span><text:span text:style-name="Source_20_Text"><text:span text:style-name="T9">, </text:span></text:span><text:span text:style-name="Source_20_Text"><text:span text:style-name="T18">5</text:span></text:span><text:span text:style-name="Source_20_Text"><text:span text:style-name="T9">, </text:span></text:span><text:span text:style-name="Source_20_Text"><text:span text:style-name="T10">size</text:span></text:span><text:span text:style-name="Source_20_Text"><text:span text:style-name="T8">=</text:span></text:span><text:span text:style-name="Source_20_Text"><text:span text:style-name="T18">30</text:span></text:span><text:span text:style-name="Source_20_Text"><text:span text:style-name="T9">))</text:span></text:span></text:p>
          <text:p text:style-name="P55"><text:span text:style-name="Source_20_Text"><text:span text:style-name="T32"><text:s text:c="4"/></text:span></text:span><text:span text:style-name="Source_20_Text"><text:span text:style-name="T10">meanlist</text:span></text:span><text:span text:style-name="Source_20_Text"><text:span text:style-name="T8">.</text:span></text:span><text:span text:style-name="Source_20_Text"><text:span text:style-name="T9">append(</text:span></text:span><text:span text:style-name="Source_20_Text"><text:span text:style-name="T10">sample</text:span></text:span><text:span text:style-name="Source_20_Text"><text:span text:style-name="T9">[</text:span></text:span><text:span text:style-name="Source_20_Text"><text:span text:style-name="T18">0</text:span></text:span><text:span text:style-name="Source_20_Text"><text:span text:style-name="T9">]</text:span></text:span><text:span text:style-name="Source_20_Text"><text:span text:style-name="T8">.</text:span></text:span><text:span text:style-name="Source_20_Text"><text:span text:style-name="T9">mean())</text:span></text:span></text:p>
          <text:p text:style-name="P55"><text:span text:style-name="Source_20_Text"><text:span text:style-name="T32"><text:s text:c="4"/></text:span></text:span><text:span text:style-name="Source_20_Text"><text:span text:style-name="T10">varlist</text:span></text:span><text:span text:style-name="Source_20_Text"><text:span text:style-name="T8">.</text:span></text:span><text:span text:style-name="Source_20_Text"><text:span text:style-name="T9">append(</text:span></text:span><text:span text:style-name="Source_20_Text"><text:span text:style-name="T10">sample</text:span></text:span><text:span text:style-name="Source_20_Text"><text:span text:style-name="T9">[</text:span></text:span><text:span text:style-name="Source_20_Text"><text:span text:style-name="T18">0</text:span></text:span><text:span text:style-name="Source_20_Text"><text:span text:style-name="T9">]</text:span></text:span><text:span text:style-name="Source_20_Text"><text:span text:style-name="T8">.</text:span></text:span><text:span text:style-name="Source_20_Text"><text:span text:style-name="T9">var(</text:span></text:span><text:span text:style-name="Source_20_Text"><text:span text:style-name="T10">ddof</text:span></text:span><text:span text:style-name="Source_20_Text"><text:span text:style-name="T8">=</text:span></text:span><text:span text:style-name="Source_20_Text"><text:span text:style-name="T18">1</text:span></text:span><text:span text:style-name="Source_20_Text"><text:span text:style-name="T9">))</text:span></text:span></text:p>
        </text:section>
        <text:p text:style-name="P73">Esto hace 1000 veces lo mismo:</text:p>
        <text:list text:style-name="L100">
          <text:list-item>
            <text:p text:style-name="P166">genera una muestra nueva de 30 valores</text:p>
          </text:list-item>
          <text:list-item>
            <text:p text:style-name="P166">calcula su media</text:p>
          </text:list-item>
          <text:list-item>
            <text:p text:style-name="P166">calcula su varianza</text:p>
          </text:list-item>
          <text:list-item>
            <text:p text:style-name="P167"><text:span text:style-name="T2">guarda esa media en </text:span><text:span text:style-name="Source_20_Text"><text:span text:style-name="T4">meanlist</text:span></text:span></text:p>
          </text:list-item>
          <text:list-item>
            <text:p text:style-name="P167"><text:span text:style-name="T2">guarda esa varianza en </text:span><text:span text:style-name="Source_20_Text"><text:span text:style-name="T4">varlist</text:span></text:span></text:p>
          </text:list-item>
        </text:list>
        <text:p text:style-name="P47">Al final:</text:p>
        <text:list text:style-name="L101">
          <text:list-item>
            <text:p text:style-name="P168"><text:span text:style-name="Source_20_Text"><text:span text:style-name="T4">meanlist</text:span></text:span><text:span text:style-name="T2"> tiene </text:span><text:span text:style-name="Strong_20_Emphasis"><text:span text:style-name="T3">1000 medias muestrales</text:span></text:span></text:p>
          </text:list-item>
          <text:list-item>
            <text:p text:style-name="P168"><text:span text:style-name="Source_20_Text"><text:span text:style-name="T4">varlist</text:span></text:span><text:span text:style-name="T2"> tiene </text:span><text:span text:style-name="Strong_20_Emphasis"><text:span text:style-name="T3">1000 varianzas muestrales</text:span></text:span></text:p>
          </text:list-item>
        </text:list>
        <text:p text:style-name="P47">Eso es justo lo que el vídeo quiere enseñar:</text:p>
        <text:list text:style-name="L102">
          <text:list-item>
            <text:p text:style-name="P169">cómo varían las medias de muestra a muestra</text:p>
          </text:list-item>
          <text:list-item>
            <text:p text:style-name="P169">cómo varían las varianzas de muestra a muestra</text:p>
          </text:list-item>
        </text:list>
        <text:p text:style-name="P46"><text:span text:style-name="Strong_20_Emphasis"><text:span text:style-name="T3">English summary:</text:span></text:span><text:span text:style-name="T2"> The loop [bucle] repeats the experiment 1000 times, saving 1000 sample means [medias muestrales] and 1000 sample variances [varianzas muestrales].</text:span></text:p>
        <text:p text:style-name="P53"/>
        <text:h text:style-name="P54" text:outline-level="2"><text:soft-page-break/>4) Qué hace esta parte</text:h>
        <text:section text:style-name="Sect3" text:name="Section24">
          <text:p text:style-name="P55"><text:bookmark text:name="code-block-viewer Copy 32"/><text:span text:style-name="Source_20_Text"><text:span text:style-name="T7">collection</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pd</text:span></text:span><text:span text:style-name="Source_20_Text"><text:span text:style-name="T5">.</text:span></text:span><text:span text:style-name="Source_20_Text"><text:span text:style-name="T6">DataFrame()</text:span></text:span></text:p>
          <text:p text:style-name="P55"><text:span text:style-name="Source_20_Text"><text:span text:style-name="T10">collection</text:span></text:span><text:span text:style-name="Source_20_Text"><text:span text:style-name="T9">[</text:span></text:span><text:span text:style-name="Source_20_Text"><text:span text:style-name="T17">'meanlist'</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meanlist</text:span></text:span></text:p>
          <text:p text:style-name="P55"><text:span text:style-name="Source_20_Text"><text:span text:style-name="T10">collection</text:span></text:span><text:span text:style-name="Source_20_Text"><text:span text:style-name="T9">[</text:span></text:span><text:span text:style-name="Source_20_Text"><text:span text:style-name="T17">'varlist'</text:span></text:span><text:span text:style-name="Source_20_Text"><text:span text:style-name="T9">] </text:span></text:span><text:span text:style-name="Source_20_Text"><text:span text:style-name="T8">=</text:span></text:span><text:span text:style-name="Source_20_Text"><text:span text:style-name="T9"> </text:span></text:span><text:span text:style-name="Source_20_Text"><text:span text:style-name="T10">varlist</text:span></text:span></text:p>
        </text:section>
        <text:p text:style-name="P46"><text:span text:style-name="T13">Crea otra tabla llamada </text:span><text:span text:style-name="Source_20_Text"><text:span text:style-name="T12">collection</text:span></text:span><text:span text:style-name="T13"> con dos columnas:</text:span></text:p>
        <text:list text:style-name="L103">
          <text:list-item>
            <text:p text:style-name="P170"><text:span text:style-name="Source_20_Text"><text:span text:style-name="T4">meanlist</text:span></text:span><text:span text:style-name="T2">: las 1000 medias</text:span></text:p>
          </text:list-item>
          <text:list-item>
            <text:p text:style-name="P170"><text:span text:style-name="Source_20_Text"><text:span text:style-name="T4">varlist</text:span></text:span><text:span text:style-name="T2">: las 1000 varianzas</text:span></text:p>
          </text:list-item>
        </text:list>
        <text:p text:style-name="P47">Es solo una forma ordenada de guardar resultados para luego graficarlos.</text:p>
        <text:p text:style-name="P46"><text:span text:style-name="Strong_20_Emphasis"><text:span text:style-name="T3">English summary:</text:span></text:span><text:span text:style-name="T2"> </text:span><text:span text:style-name="Source_20_Text"><text:span text:style-name="T4">collection</text:span></text:span><text:span text:style-name="T2"> is just a results table [tabla de resultados] with one column for sample means [medias] and one for sample variances [varianzas].</text:span></text:p>
        <text:p text:style-name="P53"/>
        <text:h text:style-name="P100" text:outline-level="2"><text:span text:style-name="T28">5) Qué es un </text:span><text:span text:style-name="Strong_20_Emphasis"><text:span text:style-name="T28">histograma</text:span></text:span><text:span text:style-name="T28"> (</text:span><text:span text:style-name="Source_20_Text"><text:span text:style-name="T31">histogram</text:span></text:span><text:span text:style-name="T28">)</text:span></text:h>
        <text:p text:style-name="P46"><text:span text:style-name="T2">Un </text:span><text:span text:style-name="Strong_20_Emphasis"><text:span text:style-name="T3">histograma</text:span></text:span><text:span text:style-name="T2"> no es “una gráfica con valores y ya está”.</text:span></text:p>
        <text:p text:style-name="P49">Es una gráfica que:</text:p>
        <text:list text:style-name="L104">
          <text:list-item>
            <text:p text:style-name="P171">divide el eje X en intervalos</text:p>
          </text:list-item>
          <text:list-item>
            <text:p text:style-name="P171">cuenta cuántos valores caen en cada intervalo</text:p>
          </text:list-item>
          <text:list-item>
            <text:p text:style-name="P171">y levanta una barra según esa frecuencia o densidad</text:p>
          </text:list-item>
        </text:list>
        <text:p text:style-name="P47">En otras palabras:</text:p>
        <text:list text:style-name="L105">
          <text:list-item>
            <text:p text:style-name="P172">agrupa datos en “cajones” [bins]</text:p>
          </text:list-item>
          <text:list-item>
            <text:p text:style-name="P172">y muestra cómo se distribuyen</text:p>
          </text:list-item>
        </text:list>
        <text:p text:style-name="P46"><text:span text:style-name="T2">Si haces histograma de </text:span><text:span text:style-name="Source_20_Text"><text:span text:style-name="T4">meanlist</text:span></text:span><text:span text:style-name="T2">, estás viendo:</text:span></text:p>
        <text:list text:style-name="L106">
          <text:list-item>
            <text:p text:style-name="P173">cómo se reparten esas 1000 medias muestrales</text:p>
          </text:list-item>
        </text:list>
        <text:p text:style-name="P46"><text:span text:style-name="T2">Si haces histograma de </text:span><text:span text:style-name="Source_20_Text"><text:span text:style-name="T4">varlist</text:span></text:span><text:span text:style-name="T2">, estás viendo:</text:span></text:p>
        <text:list text:style-name="L107">
          <text:list-item>
            <text:p text:style-name="P174">cómo se reparten esas 1000 varianzas muestrales</text:p>
          </text:list-item>
        </text:list>
        <text:p text:style-name="P46"><text:soft-page-break/><text:span text:style-name="Strong_20_Emphasis"><text:span text:style-name="T3">English summary:</text:span></text:span><text:span text:style-name="T2"> A histogram [histograma] groups values into intervals [intervalos] and shows how often [frecuencia] values fall in each interval.</text:span></text:p>
        <text:p text:style-name="P53"/>
        <text:h text:style-name="P100" text:outline-level="2"><text:span text:style-name="T28">6) Qué significa </text:span><text:span text:style-name="Source_20_Text"><text:span text:style-name="T31">bins=500</text:span></text:span></text:h>
        <text:section text:style-name="Sect3" text:name="Section25">
          <text:p text:style-name="P55"><text:bookmark text:name="code-block-viewer Copy 33"/><text:span text:style-name="Source_20_Text"><text:span text:style-name="T7">collection</text:span></text:span><text:span text:style-name="Source_20_Text"><text:span text:style-name="T6">[</text:span></text:span><text:span text:style-name="Source_20_Text"><text:span text:style-name="T11">'meanlist'</text:span></text:span><text:span text:style-name="Source_20_Text"><text:span text:style-name="T6">]</text:span></text:span><text:span text:style-name="Source_20_Text"><text:span text:style-name="T5">.</text:span></text:span><text:span text:style-name="Source_20_Text"><text:span text:style-name="T6">hist(</text:span></text:span><text:span text:style-name="Source_20_Text"><text:span text:style-name="T7">bins</text:span></text:span><text:span text:style-name="Source_20_Text"><text:span text:style-name="T5">=</text:span></text:span><text:span text:style-name="Source_20_Text"><text:span text:style-name="T14">500</text:span></text:span><text:span text:style-name="Source_20_Text"><text:span text:style-name="T6">, </text:span></text:span><text:span text:style-name="Source_20_Text"><text:span text:style-name="T7">normed</text:span></text:span><text:span text:style-name="Source_20_Text"><text:span text:style-name="T5">=</text:span></text:span><text:span text:style-name="Source_20_Text"><text:span text:style-name="T14">1</text:span></text:span><text:span text:style-name="Source_20_Text"><text:span text:style-name="T6">)</text:span></text:span></text:p>
        </text:section>
        <text:p text:style-name="P46"><text:span text:style-name="Source_20_Text"><text:span text:style-name="T12">bins=500</text:span></text:span><text:span text:style-name="T13"> significa:</text:span></text:p>
        <text:list text:style-name="L108">
          <text:list-item>
            <text:p text:style-name="P175"><text:span text:style-name="T2">divide el rango de valores en </text:span><text:span text:style-name="Strong_20_Emphasis"><text:span text:style-name="T3">500 intervalos</text:span></text:span></text:p>
          </text:list-item>
          <text:list-item>
            <text:p text:style-name="P176">y cuenta cuánto cae en cada uno</text:p>
          </text:list-item>
        </text:list>
        <text:p text:style-name="P47">Sí: es básicamente “dividir en 500 partes”, aunque más preciso sería decir “500 intervalos”.</text:p>
        <text:p text:style-name="P49">Efecto práctico:</text:p>
        <text:list text:style-name="L109">
          <text:list-item>
            <text:p text:style-name="P177">pocos bins → gráfico más basto [coarse]</text:p>
          </text:list-item>
          <text:list-item>
            <text:p text:style-name="P177">muchos bins → gráfico más detallado, pero también más serrado o ruidoso [noisy]</text:p>
          </text:list-item>
        </text:list>
        <text:p text:style-name="P47">500 aquí es bastante alto.</text:p>
        <text:p text:style-name="P46"><text:span text:style-name="Strong_20_Emphasis"><text:span text:style-name="T3">English summary:</text:span></text:span><text:span text:style-name="T2"> </text:span><text:span text:style-name="Source_20_Text"><text:span text:style-name="T4">bins=500</text:span></text:span><text:span text:style-name="T2"> means the histogram range [rango] is split into 500 intervals [intervalos], giving a very detailed but possibly noisy [ruidoso] plot.</text:span></text:p>
        <text:p text:style-name="P53"/>
        <text:h text:style-name="P100" text:outline-level="2"><text:span text:style-name="T28">7) Qué significa </text:span><text:span text:style-name="Source_20_Text"><text:span text:style-name="T31">normed=1</text:span></text:span></text:h>
        <text:p text:style-name="P46"><text:span text:style-name="Source_20_Text"><text:span text:style-name="T4">normed=1</text:span></text:span><text:span text:style-name="T2"> es sintaxis antigua. Hoy sería algo como </text:span><text:span text:style-name="Source_20_Text"><text:span text:style-name="T4">density=True</text:span></text:span><text:span text:style-name="T2">.</text:span></text:p>
        <text:p text:style-name="P49">Significa:</text:p>
        <text:list text:style-name="L110">
          <text:list-item>
            <text:p text:style-name="P178">no dibujes barras como conteo bruto</text:p>
          </text:list-item>
          <text:list-item>
            <text:p text:style-name="P179"><text:span text:style-name="Strong_20_Emphasis"><text:span text:style-name="T3">normaliza</text:span></text:span><text:span text:style-name="T2"> el histograma para que el </text:span><text:span text:style-name="Strong_20_Emphasis"><text:span text:style-name="T3">área total sea 1</text:span></text:span></text:p>
          </text:list-item>
        </text:list>
        <text:p text:style-name="P47">Eso permite compararlo con una densidad teórica.</text:p>
        <text:p text:style-name="P46"><text:span text:style-name="T2">O sea, sí: tu intuición “normalizado a 1” va bien, pero no es la altura máxima a 1.<text:line-break/>Es el </text:span><text:span text:style-name="Strong_20_Emphasis"><text:span text:style-name="T3">área total bajo las barras</text:span></text:span><text:span text:style-name="T2"> la que queda aproximadamente en 1.</text:span></text:p>
        <text:p text:style-name="P46"><text:soft-page-break/><text:span text:style-name="Strong_20_Emphasis"><text:span text:style-name="T3">English summary:</text:span></text:span><text:span text:style-name="T2"> </text:span><text:span text:style-name="Source_20_Text"><text:span text:style-name="T4">normed=1</text:span></text:span><text:span text:style-name="T2"> means the histogram is normalized [normalizado] so that the total area [área total] is 1, not the maximum height [altura máxima].</text:span></text:p>
        <text:p text:style-name="P53"/>
        <text:h text:style-name="P100" text:outline-level="2"><text:span text:style-name="T28">8) Por qué la distribución de </text:span><text:span text:style-name="Source_20_Text"><text:span text:style-name="T31">meanlist</text:span></text:span><text:span text:style-name="T28"> parece normal</text:span></text:h>
        <text:p text:style-name="P47">Porque están haciendo esto:</text:p>
        <text:list text:style-name="L111">
          <text:list-item>
            <text:p text:style-name="P180">población original: Normal con media 10 y desviación 5</text:p>
          </text:list-item>
          <text:list-item>
            <text:p text:style-name="P180">de esa población sacan muchas muestras de tamaño 30</text:p>
          </text:list-item>
          <text:list-item>
            <text:p text:style-name="P180">calculan la media de cada muestra</text:p>
          </text:list-item>
        </text:list>
        <text:p text:style-name="P181"><draw:frame draw:style-name="fr2" draw:name="Frame26" text:anchor-type="char" svg:width="0.041cm" draw:z-index="40"><draw:text-box fo:min-height="0.041cm"><text:p text:style-name="P14">N(μ,σ2)</text:p></draw:text-box></draw:frame>Teorema:<text:line-break/>si la población es normal <text:span text:style-name="T23">N</text:span><text:span text:style-name="T24">(</text:span><text:span text:style-name="T23">μ</text:span><text:span text:style-name="T24">,</text:span><text:span text:style-name="T23">σ</text:span><text:span text:style-name="T24">2)</text:span>, entonces la media muestral también es normal:</text:p>
        <text:p text:style-name="P50"><draw:frame draw:style-name="fr2" draw:name="Frame27" text:anchor-type="char" svg:width="0.041cm" draw:z-index="39"><draw:text-box fo:min-height="0.041cm"><text:p text:style-name="P14">Xˉ∼N(μ,σ2n)</text:p></draw:text-box></draw:frame><text:span text:style-name="T15">X</text:span>ˉ∼<text:span text:style-name="T15">N</text:span><text:span text:style-name="T16">(</text:span><text:span text:style-name="T15">μ</text:span>,<text:span text:style-name="T15">nσ</text:span>2​<text:span text:style-name="T16">)</text:span></text:p>
        <text:p text:style-name="P47">Aquí:</text:p>
        <text:list text:style-name="L112">
          <text:list-item>
            <text:p text:style-name="P182"><draw:frame draw:style-name="fr2" draw:name="Frame28" text:anchor-type="char" svg:width="0.041cm" draw:z-index="38"><draw:text-box fo:min-height="0.041cm"><text:p text:style-name="P14">μ=10</text:p></draw:text-box></draw:frame><text:span text:style-name="T15">μ</text:span>=10</text:p>
          </text:list-item>
          <text:list-item>
            <text:p text:style-name="P182"><draw:frame draw:style-name="fr2" draw:name="Frame29" text:anchor-type="char" svg:width="0.041cm" draw:z-index="37"><draw:text-box fo:min-height="0.041cm"><text:p text:style-name="P14">σ=5</text:p></draw:text-box></draw:frame><text:span text:style-name="T15">σ</text:span>=5</text:p>
          </text:list-item>
          <text:list-item>
            <text:p text:style-name="P182"><draw:frame draw:style-name="fr2" draw:name="Frame30" text:anchor-type="char" svg:width="0.041cm" draw:z-index="36"><draw:text-box fo:min-height="0.041cm"><text:p text:style-name="P14">n=30</text:p></draw:text-box></draw:frame><text:span text:style-name="T15">n</text:span>=30</text:p>
          </text:list-item>
        </text:list>
        <text:p text:style-name="P47">Entonces la media muestral tiene:</text:p>
        <text:list text:style-name="L113">
          <text:list-item>
            <text:p text:style-name="P183">media = 10</text:p>
          </text:list-item>
          <text:list-item>
            <text:p text:style-name="P184"><draw:frame draw:style-name="fr2" draw:name="Frame31" text:anchor-type="char" svg:width="0.041cm" draw:z-index="35"><draw:text-box fo:min-height="0.041cm"><text:p text:style-name="P14">25/30</text:p></draw:text-box></draw:frame>varianza = <text:span text:style-name="T24">25/30</text:span></text:p>
          </text:list-item>
          <text:list-item>
            <text:p text:style-name="P185"><draw:frame draw:style-name="fr2" draw:name="Frame32" text:anchor-type="char" svg:width="0.041cm" draw:z-index="34"><draw:text-box fo:min-height="0.041cm"><text:p text:style-name="P14">5/30≈0.91</text:p></draw:text-box></draw:frame>desviación típica = <text:span text:style-name="T24">5/30​≈0.91</text:span></text:p>
          </text:list-item>
        </text:list>
        <text:p text:style-name="P47">Por eso el histograma de las medias sale:</text:p>
        <text:list text:style-name="L114">
          <text:list-item>
            <text:p text:style-name="P186">centrado en 10</text:p>
          </text:list-item>
          <text:list-item>
            <text:p text:style-name="P186">bastante estrecho</text:p>
          </text:list-item>
          <text:list-item>
            <text:p text:style-name="P186">con forma aproximadamente normal</text:p>
          </text:list-item>
        </text:list>
        <text:p text:style-name="P46"><text:span text:style-name="Strong_20_Emphasis"><text:span text:style-name="T3">English summary:</text:span></text:span><text:span text:style-name="T2"> The sample means [medias muestrales] look normal because if the population [población] is normal, the sample mean [media muestral] is also normal, with smaller variance [varianza menor].</text:span></text:p>
        <text:p text:style-name="P53"/>
        <text:h text:style-name="P100" text:outline-level="2"><text:soft-page-break/><text:span text:style-name="T28">9) Por qué la distribución de </text:span><text:span text:style-name="Source_20_Text"><text:span text:style-name="T31">varlist</text:span></text:span><text:span text:style-name="T28"> </text:span><text:span text:style-name="Strong_20_Emphasis"><text:span text:style-name="T28">no</text:span></text:span><text:span text:style-name="T28"> parece normal</text:span></text:h>
        <text:p text:style-name="P46"><text:span text:style-name="T2">El vídeo dice que es </text:span><text:span text:style-name="Strong_20_Emphasis"><text:span text:style-name="T3">right-skewed</text:span></text:span><text:span text:style-name="T2">.</text:span></text:p>
        <text:p text:style-name="P46"><text:span text:style-name="T2">Sí: </text:span><text:span text:style-name="Strong_20_Emphasis"><text:span text:style-name="T3">right-skewed</text:span></text:span><text:span text:style-name="T2"> = </text:span><text:span text:style-name="Strong_20_Emphasis"><text:span text:style-name="T3">sesgada a la derecha</text:span></text:span><text:span text:style-name="T2">.</text:span></text:p>
        <text:p text:style-name="P49">Eso significa:</text:p>
        <text:list text:style-name="L115">
          <text:list-item>
            <text:p text:style-name="P187">la cola larga está a la derecha</text:p>
          </text:list-item>
          <text:list-item>
            <text:p text:style-name="P187">hay algunos valores relativamente grandes que se alargan hacia ese lado</text:p>
          </text:list-item>
        </text:list>
        <text:p text:style-name="P47">No significa exactamente “hay más valores a la derecha que a la izquierda”.<text:line-break/>Significa más bien:</text:p>
        <text:list text:style-name="L116">
          <text:list-item>
            <text:p text:style-name="P188">la distribución no es simétrica</text:p>
          </text:list-item>
          <text:list-item>
            <text:p text:style-name="P188">y los valores extremos grandes están más estirados hacia la derecha</text:p>
          </text:list-item>
        </text:list>
        <text:p text:style-name="P47">En una varianza esto tiene sentido, porque:</text:p>
        <text:list text:style-name="L117">
          <text:list-item>
            <text:p text:style-name="P189">la varianza nunca puede ser negativa</text:p>
          </text:list-item>
          <text:list-item>
            <text:p text:style-name="P189">puede salir moderada muchas veces</text:p>
          </text:list-item>
          <text:list-item>
            <text:p text:style-name="P189">y a veces salir bastante grande</text:p>
          </text:list-item>
        </text:list>
        <text:p text:style-name="P47">Por eso la forma suele quedar asimétrica [skewed].</text:p>
        <text:p text:style-name="P46"><text:span text:style-name="Strong_20_Emphasis"><text:span text:style-name="T3">English summary:</text:span></text:span><text:span text:style-name="T2"> Right-skewed [sesgada a la derecha] means the distribution is asymmetric [asimétrica] with a longer tail [cola más larga] on the right side.</text:span></text:p>
        <text:p text:style-name="P53"/>
        <text:h text:style-name="P100" text:outline-level="2"><text:span text:style-name="T28">10) Esta notación: </text:span><text:span text:style-name="Source_20_Text"><text:span text:style-name="T31">N(μ, σ²)</text:span></text:span><text:span text:style-name="T28"> no es el tamaño </text:span><text:span text:style-name="Source_20_Text"><text:span text:style-name="T31">N</text:span></text:span></text:h>
        <text:p text:style-name="P47">Aquí hay una trampa de notación.</text:p>
        <text:p text:style-name="P49">Cuando ves:</text:p>
        <text:p text:style-name="P50"><draw:frame draw:style-name="fr2" draw:name="Frame33" text:anchor-type="char" svg:width="0.041cm" draw:z-index="41"><draw:text-box fo:min-height="0.041cm"><text:p text:style-name="P14">N(μ,σ2)</text:p></draw:text-box></draw:frame><text:span text:style-name="T15">N</text:span>(<text:span text:style-name="T15">μ</text:span>,<text:span text:style-name="T15">σ</text:span>2)</text:p>
        <text:p text:style-name="P46"><text:span text:style-name="T2">esa </text:span><text:span text:style-name="Source_20_Text"><text:span text:style-name="T4">N</text:span></text:span><text:span text:style-name="T2"> </text:span><text:span text:style-name="Strong_20_Emphasis"><text:span text:style-name="T3">no</text:span></text:span><text:span text:style-name="T2"> significa “número de elementos”.<text:line-break/>Significa </text:span><text:span text:style-name="Strong_20_Emphasis"><text:span text:style-name="T3">Normal distribution</text:span></text:span><text:span text:style-name="T2">.</text:span></text:p>
        <text:p text:style-name="P49"><text:soft-page-break/>Se lee:</text:p>
        <text:p text:style-name="P105"><text:span text:style-name="T22">“</text:span><text:span text:style-name="T3">distribución normal con media </text:span><text:span text:style-name="Source_20_Text"><text:span text:style-name="T4">μ</text:span></text:span><text:span text:style-name="T3"> y varianza </text:span><text:span text:style-name="Source_20_Text"><text:span text:style-name="T4">σ²</text:span></text:span><text:span text:style-name="T3">”</text:span></text:p>
        <text:p text:style-name="P47">O sea:</text:p>
        <text:list text:style-name="L118">
          <text:list-item>
            <text:p text:style-name="P190"><text:span text:style-name="Source_20_Text"><text:span text:style-name="T4">N(...)</text:span></text:span><text:span text:style-name="T2"> = Normal</text:span></text:p>
          </text:list-item>
          <text:list-item>
            <text:p text:style-name="P190"><text:span text:style-name="Source_20_Text"><text:span text:style-name="T4">μ</text:span></text:span><text:span text:style-name="T2"> = media</text:span></text:p>
          </text:list-item>
          <text:list-item>
            <text:p text:style-name="P190"><text:span text:style-name="Source_20_Text"><text:span text:style-name="T4">σ²</text:span></text:span><text:span text:style-name="T2"> = varianza</text:span></text:p>
          </text:list-item>
        </text:list>
        <text:p text:style-name="P46"><text:span text:style-name="T2">No tiene nada que ver con el </text:span><text:span text:style-name="Source_20_Text"><text:span text:style-name="T4">N</text:span></text:span><text:span text:style-name="T2"> de tamaño poblacional en ese contexto.</text:span></text:p>
        <text:p text:style-name="P46"><text:span text:style-name="Strong_20_Emphasis"><text:span text:style-name="T3">English summary:</text:span></text:span><text:span text:style-name="T2"> In </text:span><text:span text:style-name="Source_20_Text"><text:span text:style-name="T4">N(mu, sigma^2)</text:span></text:span><text:span text:style-name="T2">, the </text:span><text:span text:style-name="Source_20_Text"><text:span text:style-name="T4">N</text:span></text:span><text:span text:style-name="T2"> means Normal distribution [distribución normal], not population size [tamaño de población].</text:span></text:p>
        <text:p text:style-name="P53"/>
        <text:h text:style-name="P54" text:outline-level="2">11) Qué quiere decir esta fórmula</text:h>
        <text:p text:style-name="P191"><draw:frame draw:style-name="fr2" draw:name="Frame34" text:anchor-type="char" svg:width="0.041cm" draw:z-index="42"><draw:text-box fo:min-height="0.041cm"><text:p text:style-name="P14">Population is normal N(μ,σ2)</text:p></draw:text-box></draw:frame><draw:frame draw:style-name="fr2" draw:name="Frame35" text:anchor-type="char" svg:width="0.041cm" draw:z-index="43"><draw:text-box fo:min-height="0.041cm"><text:p text:style-name="P14">⇓</text:p></draw:text-box></draw:frame><draw:frame draw:style-name="fr2" draw:name="Frame36" text:anchor-type="char" svg:width="0.041cm" draw:z-index="44"><draw:text-box fo:min-height="0.041cm"><text:p text:style-name="P14">Sample mean is also normal N(μ,σ2n)</text:p></draw:text-box></draw:frame><text:span text:style-name="T24">Population is normal </text:span><text:span text:style-name="T23">N</text:span><text:span text:style-name="T24">(</text:span><text:span text:style-name="T23">μ</text:span><text:span text:style-name="T24">,</text:span><text:span text:style-name="T23">σ</text:span><text:span text:style-name="T24">2)</text:span><text:span text:style-name="T33">⇓</text:span><text:span text:style-name="T24">Sample mean is also normal </text:span><text:span text:style-name="T23">N</text:span><text:span text:style-name="T34">(</text:span><text:span text:style-name="T23">μ</text:span><text:span text:style-name="T24">,</text:span><text:span text:style-name="T23">nσ</text:span><text:span text:style-name="T24">2​</text:span><text:span text:style-name="T34">)</text:span></text:p>
        <text:p text:style-name="P47">Quiere decir:</text:p>
        <text:list text:style-name="L119">
          <text:list-item>
            <text:p text:style-name="P192">si los datos originales tienen distribución normal</text:p>
          </text:list-item>
          <text:list-item>
            <text:p text:style-name="P192">entonces las medias de las muestras también tienen distribución normal</text:p>
          </text:list-item>
          <text:list-item>
            <text:p text:style-name="P193"><text:span text:style-name="T2">con la </text:span><text:span text:style-name="Strong_20_Emphasis"><text:span text:style-name="T3">misma media</text:span></text:span></text:p>
          </text:list-item>
          <text:list-item>
            <text:p text:style-name="P193"><text:span text:style-name="T2">pero con </text:span><text:span text:style-name="Strong_20_Emphasis"><text:span text:style-name="T3">menos varianza</text:span></text:span></text:p>
          </text:list-item>
        </text:list>
        <text:p text:style-name="P47">¿Por qué menos varianza?<text:line-break/>Porque una media “promedia” ruido.<text:line-break/>Eso ya lo habías entendido bien.</text:p>
        <text:p text:style-name="P46"><text:span text:style-name="Strong_20_Emphasis"><text:span text:style-name="T3">English summary:</text:span></text:span><text:span text:style-name="T2"> If the original population [población original] is normal, the sample mean [media muestral] is also normal, with the same center [centro] but reduced variance [varianza reducida].</text:span></text:p>
        <text:p text:style-name="P53"/>
        <text:h text:style-name="P100" text:outline-level="2"><text:soft-page-break/><text:span text:style-name="T28">12) La última imagen: </text:span><text:span text:style-name="Source_20_Text"><text:span text:style-name="T31">pop = pd.DataFrame(normal(10,5,size=100000))</text:span></text:span></text:h>
        <text:p text:style-name="P47">Sí, hace básicamente esto:</text:p>
        <text:section text:style-name="Sect3" text:name="Section26">
          <text:p text:style-name="P55"><text:bookmark text:name="code-block-viewer Copy 34"/><text:span text:style-name="Source_20_Text"><text:span text:style-name="T7">pop</text:span></text:span><text:span text:style-name="Source_20_Text"><text:span text:style-name="T6"> </text:span></text:span><text:span text:style-name="Source_20_Text"><text:span text:style-name="T5">=</text:span></text:span><text:span text:style-name="Source_20_Text"><text:span text:style-name="T6"> </text:span></text:span><text:span text:style-name="Source_20_Text"><text:span text:style-name="T7">pd</text:span></text:span><text:span text:style-name="Source_20_Text"><text:span text:style-name="T5">.</text:span></text:span><text:span text:style-name="Source_20_Text"><text:span text:style-name="T6">DataFrame(</text:span></text:span><text:span text:style-name="Source_20_Text"><text:span text:style-name="T7">normal</text:span></text:span><text:span text:style-name="Source_20_Text"><text:span text:style-name="T6">(</text:span></text:span><text:span text:style-name="Source_20_Text"><text:span text:style-name="T14">10</text:span></text:span><text:span text:style-name="Source_20_Text"><text:span text:style-name="T6">,</text:span></text:span><text:span text:style-name="Source_20_Text"><text:span text:style-name="T14">5</text:span></text:span><text:span text:style-name="Source_20_Text"><text:span text:style-name="T6">,</text:span></text:span><text:span text:style-name="Source_20_Text"><text:span text:style-name="T7">size</text:span></text:span><text:span text:style-name="Source_20_Text"><text:span text:style-name="T5">=</text:span></text:span><text:span text:style-name="Source_20_Text"><text:span text:style-name="T14">100000</text:span></text:span><text:span text:style-name="Source_20_Text"><text:span text:style-name="T6">))</text:span></text:span></text:p>
        </text:section>
        <text:list text:style-name="L120">
          <text:list-item>
            <text:p text:style-name="P194">genera 100000 valores aleatorios de una normal con media 10 y desviación 5</text:p>
          </text:list-item>
          <text:list-item>
            <text:p text:style-name="P195">los mete en un DataFrame</text:p>
          </text:list-item>
          <text:list-item>
            <text:p text:style-name="P196"><text:span text:style-name="T2">eso se usa como </text:span><text:span text:style-name="Strong_20_Emphasis"><text:span text:style-name="T3">aproximación de la población</text:span></text:span></text:p>
          </text:list-item>
        </text:list>
        <text:p text:style-name="P47">No es “la población real infinita”, claro.<text:line-break/>Pero con 100000 valores ya tienes una aproximación bastante buena [decent].</text:p>
        <text:p text:style-name="P49">Luego hacen:</text:p>
        <text:section text:style-name="Sect3" text:name="Section27">
          <text:p text:style-name="P55"><text:bookmark text:name="code-block-viewer Copy 35"/><text:span text:style-name="Source_20_Text"><text:span text:style-name="T7">pop</text:span></text:span><text:span text:style-name="Source_20_Text"><text:span text:style-name="T6">[</text:span></text:span><text:span text:style-name="Source_20_Text"><text:span text:style-name="T14">0</text:span></text:span><text:span text:style-name="Source_20_Text"><text:span text:style-name="T6">]</text:span></text:span><text:span text:style-name="Source_20_Text"><text:span text:style-name="T5">.</text:span></text:span><text:span text:style-name="Source_20_Text"><text:span text:style-name="T6">hist(</text:span></text:span><text:span text:style-name="Source_20_Text"><text:span text:style-name="T7">bins</text:span></text:span><text:span text:style-name="Source_20_Text"><text:span text:style-name="T5">=</text:span></text:span><text:span text:style-name="Source_20_Text"><text:span text:style-name="T14">500</text:span></text:span><text:span text:style-name="Source_20_Text"><text:span text:style-name="T6">, </text:span></text:span><text:span text:style-name="Source_20_Text"><text:span text:style-name="T7">color</text:span></text:span><text:span text:style-name="Source_20_Text"><text:span text:style-name="T5">=</text:span></text:span><text:span text:style-name="Source_20_Text"><text:span text:style-name="T11">'cyan'</text:span></text:span><text:span text:style-name="Source_20_Text"><text:span text:style-name="T6">, </text:span></text:span><text:span text:style-name="Source_20_Text"><text:span text:style-name="T7">normed</text:span></text:span><text:span text:style-name="Source_20_Text"><text:span text:style-name="T5">=</text:span></text:span><text:span text:style-name="Source_20_Text"><text:span text:style-name="T14">1</text:span></text:span><text:span text:style-name="Source_20_Text"><text:span text:style-name="T6">)</text:span></text:span></text:p>
          <text:p text:style-name="P55"><text:span text:style-name="Source_20_Text"><text:span text:style-name="T10">collection</text:span></text:span><text:span text:style-name="Source_20_Text"><text:span text:style-name="T9">[</text:span></text:span><text:span text:style-name="Source_20_Text"><text:span text:style-name="T17">'meanlist'</text:span></text:span><text:span text:style-name="Source_20_Text"><text:span text:style-name="T9">]</text:span></text:span><text:span text:style-name="Source_20_Text"><text:span text:style-name="T8">.</text:span></text:span><text:span text:style-name="Source_20_Text"><text:span text:style-name="T9">hist(</text:span></text:span><text:span text:style-name="Source_20_Text"><text:span text:style-name="T10">bins</text:span></text:span><text:span text:style-name="Source_20_Text"><text:span text:style-name="T8">=</text:span></text:span><text:span text:style-name="Source_20_Text"><text:span text:style-name="T18">500</text:span></text:span><text:span text:style-name="Source_20_Text"><text:span text:style-name="T9">, </text:span></text:span><text:span text:style-name="Source_20_Text"><text:span text:style-name="T10">normed</text:span></text:span><text:span text:style-name="Source_20_Text"><text:span text:style-name="T8">=</text:span></text:span><text:span text:style-name="Source_20_Text"><text:span text:style-name="T18">1</text:span></text:span><text:span text:style-name="Source_20_Text"><text:span text:style-name="T9">, </text:span></text:span><text:span text:style-name="Source_20_Text"><text:span text:style-name="T10">color</text:span></text:span><text:span text:style-name="Source_20_Text"><text:span text:style-name="T8">=</text:span></text:span><text:span text:style-name="Source_20_Text"><text:span text:style-name="T17">'red'</text:span></text:span><text:span text:style-name="Source_20_Text"><text:span text:style-name="T9">)</text:span></text:span></text:p>
        </text:section>
        <text:p text:style-name="P73">Eso superpone [overlay]:</text:p>
        <text:list text:style-name="L121">
          <text:list-item>
            <text:p text:style-name="P197">en azul/cyan: la distribución de la población</text:p>
          </text:list-item>
          <text:list-item>
            <text:p text:style-name="P197">en rojo: la distribución de las medias muestrales</text:p>
          </text:list-item>
        </text:list>
        <text:p text:style-name="P47">Y se ve la idea clave:</text:p>
        <text:list text:style-name="L122">
          <text:list-item>
            <text:p text:style-name="P198">la roja está mucho más estrecha</text:p>
          </text:list-item>
          <text:list-item>
            <text:p text:style-name="P198">porque las medias muestrales varían menos que los datos individuales</text:p>
          </text:list-item>
        </text:list>
        <text:p text:style-name="P46"><text:span text:style-name="Strong_20_Emphasis"><text:span text:style-name="T3">English summary:</text:span></text:span><text:span text:style-name="T2"> That code creates a large simulated population [población simulada] and overlays [superpone] its histogram with the histogram of sample means [medias muestrales], showing that sample means are much less spread out [menos dispersas].</text:span></text:p>
        <text:p text:style-name="P53"/>
        <text:h text:style-name="P54" text:outline-level="2">13) Tu resumen correcto, ya limpio</text:h>
        <text:p text:style-name="P47">Lo que hace el código es:</text:p>
        <text:list text:style-name="L123">
          <text:list-item>
            <text:p text:style-name="P199"><text:soft-page-break/>crear muchas muestras aleatorias de 30 valores cada una</text:p>
          </text:list-item>
          <text:list-item>
            <text:p text:style-name="P199">calcular la media y la varianza de cada muestra</text:p>
          </text:list-item>
          <text:list-item>
            <text:p text:style-name="P199">guardar todas esas medias y varianzas</text:p>
          </text:list-item>
          <text:list-item>
            <text:p text:style-name="P199">hacer histogramas</text:p>
          </text:list-item>
          <text:list-item>
            <text:p text:style-name="P199">comprobar visualmente que:</text:p>
            <text:list>
              <text:list-item>
                <text:p text:style-name="P199">las medias muestrales forman algo parecido a una normal</text:p>
              </text:list-item>
              <text:list-item>
                <text:p text:style-name="P199">las varianzas muestrales no son normales y salen sesgadas a la derecha</text:p>
              </text:list-item>
            </text:list>
          </text:list-item>
        </text:list>
        <text:p text:style-name="P46"><text:span text:style-name="Strong_20_Emphasis"><text:span text:style-name="T3">English summary:</text:span></text:span><text:span text:style-name="T2"> The code repeatedly samples [muestrea repetidamente], computes sample statistics [estadísticos muestrales], and plots histograms [histogramas] to study their empirical distributions [distribuciones empíricas].</text:span></text:p>
        <text:p text:style-name="P53"/>
        <text:h text:style-name="P54" text:outline-level="2">14) Lo más importante que te estaba faltando</text:h>
        <text:p text:style-name="P47">Tu duda principal era buena:</text:p>
        <text:p text:style-name="P105"><text:span text:style-name="T22">“</text:span><text:span text:style-name="T3">¿</text:span><text:span text:style-name="Source_20_Text"><text:span text:style-name="T4">sample[0]</text:span></text:span><text:span text:style-name="T3"> coge el primer elemento?”</text:span></text:p>
        <text:p text:style-name="P46"><text:span text:style-name="T2">No.<text:line-break/>Coge la </text:span><text:span text:style-name="Strong_20_Emphasis"><text:span text:style-name="T3">columna 0 completa</text:span></text:span><text:span text:style-name="T2">.<text:line-break/>Ese era el atasco principal.</text:span></text:p>
        <text:p text:style-name="P49">Y la otra:</text:p>
        <text:p text:style-name="P112">“<text:span text:style-name="T30">¿histograma qué es?”</text:span></text:p>
        <text:p text:style-name="P47">Respuesta corta:</text:p>
        <text:list text:style-name="L124">
          <text:list-item>
            <text:p text:style-name="P200">un gráfico de frecuencias agrupadas por intervalos</text:p>
          </text:list-item>
        </text:list>
        <text:p text:style-name="P46"><text:span text:style-name="Strong_20_Emphasis"><text:span text:style-name="T3">English summary:</text:span></text:span><text:span text:style-name="T2"> Your main sticking points [atascos] were </text:span><text:span text:style-name="Source_20_Text"><text:span text:style-name="T4">sample[0]</text:span></text:span><text:span text:style-name="T2"> and histogram [histograma]: </text:span><text:span text:style-name="Source_20_Text"><text:span text:style-name="T4">sample[0]</text:span></text:span><text:span text:style-name="T2"> is the full column [columna completa], and a histogram is a grouped frequency plot [gráfico de frecuencias agrupadas].</text:span></text:p>
        <text:p text:style-name="P46"><text:soft-page-break/><text:span text:style-name="T2">Mañana, para fijarlo, te conviene hacer tú mismo un mini ejemplo con </text:span><text:span text:style-name="Source_20_Text"><text:span text:style-name="T4">size=5</text:span></text:span><text:span text:style-name="T2"> y luego imprimir </text:span><text:span text:style-name="Source_20_Text"><text:span text:style-name="T4">sample</text:span></text:span><text:span text:style-name="T2">, </text:span><text:span text:style-name="Source_20_Text"><text:span text:style-name="T4">sample[0]</text:span></text:span><text:span text:style-name="T2">, </text:span><text:span text:style-name="Source_20_Text"><text:span text:style-name="T4">sample[0].mean()</text:span></text:span><text:span text:style-name="T2"> y </text:span><text:span text:style-name="Source_20_Text"><text:span text:style-name="T4">sample[0].var(ddof=1)</text:span></text:span><text:span text:style-name="T2">.</text:span></text:p>
        <text:section text:style-name="Sect2" text:name="thread-bottom-container">
          <text:p text:style-name="P201"><text:a xlink:type="simple" xlink:href="https://chatgpt.com/g/g-p-6978f80b183c8191922a4f32bd71fffd/c/69e89292-d108-8394-8ed6-0e756f9660e0#settings/Connectors/Advanced" office:target-frame-name="_self" xlink:show="replace" text:style-name="Internet_20_link" text:visited-style-name="Visited_20_Internet_20_Link"><text:span text:style-name="T35">DEVELOPER MODE</text:span></text:a></text:p>
          <text:section text:style-name="Sect2" text:name="prompt-textarea">
            <text:p text:style-name="P98"/>
          </text:section>
        </text:section>
      </text:section>
      <text:p text:style-name="P202"><draw:frame draw:style-name="fr1" draw:name="aria-notify-live-region-assertive" text:anchor-type="char" svg:width="0.041cm" draw:z-index="45"><draw:text-box fo:min-height="0.041cm"><text:p text:style-name="P14"/></draw:text-box></draw:fram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body" svg:font-family="apple-system-body, 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draw:fill="solid" draw:fill-color="#333333"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333333"/>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4T19:09:50.359893300</meta:creation-date>
    <dc:date>2026-05-14T19:12:22.301751500</dc:date>
    <meta:editing-duration>PT2M34S</meta:editing-duration>
    <meta:editing-cycles>1</meta:editing-cycles>
    <meta:document-statistic meta:table-count="2" meta:image-count="9" meta:object-count="0" meta:page-count="49" meta:paragraph-count="807" meta:word-count="10130" meta:character-count="61210" meta:non-whitespace-character-count="51870"/>
    <meta:generator>LibreOffice/26.2.2.2$Windows_X86_64 LibreOffice_project/1f77d10d6938fd34972958f64b2bcfa54f8b1ba5</meta:generator>
  </office:meta>
</office:document-meta>
</file>